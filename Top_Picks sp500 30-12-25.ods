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ati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map style:condition="is-true-formula(LEFT([.A1];2)=&quot;SI&quot;)" style:apply-style-name="ConditionalStyle_5f_1" style:base-cell-address="Dati.A1"/>
    </style:style>
    <style:style style:name="ce3" style:family="table-cell" style:parent-style-name="Excel_20_Built-in_20_Normal">
      <style:map style:condition="is-true-formula(NOT(ISERROR(SEARCH(&quot;LEADING&quot;;[.A1]))))" style:apply-style-name="ConditionalStyle_5f_1" style:base-cell-address="Dati.A1"/>
      <style:map style:condition="is-true-formula(NOT(ISERROR(SEARCH(&quot;LAGGING&quot;;[.A1]))))" style:apply-style-name="ConditionalStyle_5f_2" style:base-cell-address="Dati.A1"/>
    </style:style>
    <style:style style:name="ce4" style:family="table-cell" style:parent-style-name="Excel_20_Built-in_20_Normal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number-columns-repeated="2" table:default-cell-style-name="ce4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>
            <text:p>Ticker</text:p>
          </table:table-cell>
          <table:table-cell table:style-name="ce1" office:value-type="string">
            <text:p>Settore</text:p>
          </table:table-cell>
          <table:table-cell table:style-name="ce1" office:value-type="string">
            <text:p>TARGET MATCH</text:p>
          </table:table-cell>
          <table:table-cell table:style-name="ce1" office:value-type="string">
            <text:p>SCORE (Max 6)</text:p>
          </table:table-cell>
          <table:table-cell table:style-name="ce1" office:value-type="string">
            <text:p>RRG Trend</text:p>
          </table:table-cell>
          <table:table-cell table:style-name="ce1" office:value-type="string">
            <text:p>Prezzo</text:p>
          </table:table-cell>
          <table:table-cell table:style-name="ce1" office:value-type="string">
            <text:p>P/E</text:p>
          </table:table-cell>
          <table:table-cell table:style-name="ce1" office:value-type="string">
            <text:p>D/E Ratio</text:p>
          </table:table-cell>
          <table:table-cell table:style-name="ce1" office:value-type="string">
            <text:p>MOL %</text:p>
          </table:table-cell>
          <table:table-cell table:style-name="ce1" office:value-type="string">
            <text:p>ROE %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Note</text:p>
          </table:table-cell>
          <table:table-cell table:number-columns-repeated="1012"/>
        </table:table-row>
        <table:table-row table:style-name="ro2">
          <table:table-cell office:value-type="string">
            <text:p>XY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37.78">
            <text:p>137,78</text:p>
          </table:table-cell>
          <table:table-cell office:value-type="float" office:value="35.510307">
            <text:p>35,510307</text:p>
          </table:table-cell>
          <table:table-cell office:value-type="float" office:value="0.18253">
            <text:p>0,18253</text:p>
          </table:table-cell>
          <table:table-cell office:value-type="percentage" office:value="0.20846">
            <text:p>20,85%</text:p>
          </table:table-cell>
          <table:table-cell office:value-type="percentage" office:value="0.08555">
            <text:p>8,56%</text:p>
          </table:table-cell>
          <table:table-cell office:value-type="float" office:value="1.174">
            <text:p>1,174</text:p>
          </table:table-cell>
          <table:table-cell table:number-columns-repeated="1013"/>
        </table:table-row>
        <table:table-row table:style-name="ro2">
          <table:table-cell office:value-type="string">
            <text:p>DIS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15.1957">
            <text:p>115,1957</text:p>
          </table:table-cell>
          <table:table-cell office:value-type="float" office:value="16.81689">
            <text:p>16,81689</text:p>
          </table:table-cell>
          <table:table-cell office:value-type="float" office:value="0.39632">
            <text:p>0,39632</text:p>
          </table:table-cell>
          <table:table-cell office:value-type="percentage" office:value="0.20566">
            <text:p>20,57%</text:p>
          </table:table-cell>
          <table:table-cell office:value-type="percentage" office:value="0.12203">
            <text:p>12,20%</text:p>
          </table:table-cell>
          <table:table-cell office:value-type="float" office:value="1.497">
            <text:p>1,497</text:p>
          </table:table-cell>
          <table:table-cell table:number-columns-repeated="1013"/>
        </table:table-row>
        <table:table-row table:style-name="ro2">
          <table:table-cell office:value-type="string">
            <text:p>AOS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67.86">
            <text:p>67,86</text:p>
          </table:table-cell>
          <table:table-cell office:value-type="float" office:value="18.291105">
            <text:p>18,291105</text:p>
          </table:table-cell>
          <table:table-cell office:value-type="float" office:value="0.12063">
            <text:p>0,12063</text:p>
          </table:table-cell>
          <table:table-cell office:value-type="percentage" office:value="0.20477">
            <text:p>20,48%</text:p>
          </table:table-cell>
          <table:table-cell office:value-type="percentage" office:value="0.28209">
            <text:p>28,21%</text:p>
          </table:table-cell>
          <table:table-cell office:value-type="float" office:value="1.335">
            <text:p>1,335</text:p>
          </table:table-cell>
          <table:table-cell table:number-columns-repeated="1013"/>
        </table:table-row>
        <table:table-row table:style-name="ro2">
          <table:table-cell office:value-type="string">
            <text:p>AM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07.3">
            <text:p>207,3</text:p>
          </table:table-cell>
          <table:table-cell office:value-type="float" office:value="32.69716">
            <text:p>32,69716</text:p>
          </table:table-cell>
          <table:table-cell office:value-type="float" office:value="0.2609">
            <text:p>0,2609</text:p>
          </table:table-cell>
          <table:table-cell office:value-type="percentage" office:value="0.31644">
            <text:p>31,64%</text:p>
          </table:table-cell>
          <table:table-cell office:value-type="percentage" office:value="0.14632">
            <text:p>14,63%</text:p>
          </table:table-cell>
          <table:table-cell office:value-type="float" office:value="1.047">
            <text:p>1,047</text:p>
          </table:table-cell>
          <table:table-cell table:number-columns-repeated="1013"/>
        </table:table-row>
        <table:table-row table:style-name="ro2">
          <table:table-cell office:value-type="string">
            <text:p>AD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75.39">
            <text:p>275,39</text:p>
          </table:table-cell>
          <table:table-cell office:value-type="float" office:value="60.525276">
            <text:p>60,525276</text:p>
          </table:table-cell>
          <table:table-cell office:value-type="float" office:value="0.265">
            <text:p>0,265</text:p>
          </table:table-cell>
          <table:table-cell office:value-type="percentage" office:value="0.45321998">
            <text:p>45,32%</text:p>
          </table:table-cell>
          <table:table-cell office:value-type="percentage" office:value="0.06573">
            <text:p>6,57%</text:p>
          </table:table-cell>
          <table:table-cell office:value-type="float" office:value="1.039">
            <text:p>1,039</text:p>
          </table:table-cell>
          <table:table-cell table:number-columns-repeated="1013"/>
        </table:table-row>
        <table:table-row table:style-name="ro2">
          <table:table-cell office:value-type="string">
            <text:p>VRT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454.835">
            <text:p>454,835</text:p>
          </table:table-cell>
          <table:table-cell office:value-type="float" office:value="32.00809">
            <text:p>32,00809</text:p>
          </table:table-cell>
          <table:table-cell office:value-type="float" office:value="0.10594">
            <text:p>0,10594</text:p>
          </table:table-cell>
          <table:table-cell office:value-type="percentage" office:value="0.40192002">
            <text:p>40,19%</text:p>
          </table:table-cell>
          <table:table-cell office:value-type="percentage" office:value="0.22307">
            <text:p>22,31%</text:p>
          </table:table-cell>
          <table:table-cell office:value-type="float" office:value="0.321">
            <text:p>0,321</text:p>
          </table:table-cell>
          <table:table-cell table:number-columns-repeated="1013"/>
        </table:table-row>
        <table:table-row table:style-name="ro2">
          <table:table-cell office:value-type="string">
            <text:p>ACG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96.23">
            <text:p>96,23</text:p>
          </table:table-cell>
          <table:table-cell office:value-type="float" office:value="9.018744">
            <text:p>9,018744</text:p>
          </table:table-cell>
          <table:table-cell office:value-type="float" office:value="0.11501">
            <text:p>0,11501</text:p>
          </table:table-cell>
          <table:table-cell office:value-type="percentage" office:value="0.25646">
            <text:p>25,65%</text:p>
          </table:table-cell>
          <table:table-cell office:value-type="percentage" office:value="0.17811">
            <text:p>17,81%</text:p>
          </table:table-cell>
          <table:table-cell office:value-type="float" office:value="0.447">
            <text:p>0,447</text:p>
          </table:table-cell>
          <table:table-cell table:number-columns-repeated="1013"/>
        </table:table-row>
        <table:table-row table:style-name="ro2">
          <table:table-cell office:value-type="string">
            <text:p>TRMB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79.66">
            <text:p>79,66</text:p>
          </table:table-cell>
          <table:table-cell office:value-type="float" office:value="54.561646">
            <text:p>54,561646</text:p>
          </table:table-cell>
          <table:table-cell office:value-type="float" office:value="0.24038">
            <text:p>0,24038</text:p>
          </table:table-cell>
          <table:table-cell office:value-type="percentage" office:value="0.21606001">
            <text:p>21,61%</text:p>
          </table:table-cell>
          <table:table-cell office:value-type="percentage" office:value="0.06131">
            <text:p>6,13%</text:p>
          </table:table-cell>
          <table:table-cell office:value-type="float" office:value="1.601">
            <text:p>1,601</text:p>
          </table:table-cell>
          <table:table-cell table:number-columns-repeated="1013"/>
        </table:table-row>
        <table:table-row table:style-name="ro2">
          <table:table-cell office:value-type="string">
            <text:p>TYL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60.25">
            <text:p>460,25</text:p>
          </table:table-cell>
          <table:table-cell office:value-type="float" office:value="64.01252">
            <text:p>64,01252</text:p>
          </table:table-cell>
          <table:table-cell office:value-type="float" office:value="0.1786">
            <text:p>0,1786</text:p>
          </table:table-cell>
          <table:table-cell office:value-type="percentage" office:value="0.20062">
            <text:p>20,06%</text:p>
          </table:table-cell>
          <table:table-cell office:value-type="percentage" office:value="0.091680005">
            <text:p>9,17%</text:p>
          </table:table-cell>
          <table:table-cell office:value-type="float" office:value="0.912">
            <text:p>0,912</text:p>
          </table:table-cell>
          <table:table-cell table:number-columns-repeated="1013"/>
        </table:table-row>
        <table:table-row table:style-name="ro2">
          <table:table-cell office:value-type="string">
            <text:p>GOOGL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3.65">
            <text:p>313,65</text:p>
          </table:table-cell>
          <table:table-cell office:value-type="float" office:value="30.962486">
            <text:p>30,962486</text:p>
          </table:table-cell>
          <table:table-cell office:value-type="float" office:value="0.11424">
            <text:p>0,11424</text:p>
          </table:table-cell>
          <table:table-cell office:value-type="percentage" office:value="0.37660998">
            <text:p>37,66%</text:p>
          </table:table-cell>
          <table:table-cell office:value-type="percentage" office:value="0.3545">
            <text:p>35,45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GOOG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4.46">
            <text:p>314,46</text:p>
          </table:table-cell>
          <table:table-cell office:value-type="float" office:value="31.073122">
            <text:p>31,073122</text:p>
          </table:table-cell>
          <table:table-cell office:value-type="float" office:value="0.11424">
            <text:p>0,11424</text:p>
          </table:table-cell>
          <table:table-cell office:value-type="percentage" office:value="0.37660998">
            <text:p>37,66%</text:p>
          </table:table-cell>
          <table:table-cell office:value-type="percentage" office:value="0.3545">
            <text:p>35,45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AMZN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31.12">
            <text:p>231,12</text:p>
          </table:table-cell>
          <table:table-cell office:value-type="float" office:value="32.644066">
            <text:p>32,644066</text:p>
          </table:table-cell>
          <table:table-cell office:value-type="float" office:value="0.43405">
            <text:p>0,43405</text:p>
          </table:table-cell>
          <table:table-cell office:value-type="percentage" office:value="0.20207001">
            <text:p>20,21%</text:p>
          </table:table-cell>
          <table:table-cell office:value-type="percentage" office:value="0.24327">
            <text:p>24,33%</text:p>
          </table:table-cell>
          <table:table-cell office:value-type="float" office:value="1.372">
            <text:p>1,372</text:p>
          </table:table-cell>
          <table:table-cell table:number-columns-repeated="1013"/>
        </table:table-row>
        <table:table-row table:style-name="ro2">
          <table:table-cell office:value-type="string">
            <text:p>AI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86.2915">
            <text:p>86,2915</text:p>
          </table:table-cell>
          <table:table-cell office:value-type="float" office:value="15.520054">
            <text:p>15,520054</text:p>
          </table:table-cell>
          <table:table-cell office:value-type="float" office:value="0.2248">
            <text:p>0,2248</text:p>
          </table:table-cell>
          <table:table-cell office:value-type="percentage" office:value="0.3066">
            <text:p>30,66%</text:p>
          </table:table-cell>
          <table:table-cell office:value-type="percentage" office:value="0.07688">
            <text:p>7,69%</text:p>
          </table:table-cell>
          <table:table-cell office:value-type="float" office:value="0.626">
            <text:p>0,626</text:p>
          </table:table-cell>
          <table:table-cell table:number-columns-repeated="1013"/>
        </table:table-row>
        <table:table-row table:style-name="ro2">
          <table:table-cell office:value-type="string">
            <text:p>TTD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38.335">
            <text:p>38,335</text:p>
          </table:table-cell>
          <table:table-cell office:value-type="float" office:value="43.5625">
            <text:p>43,5625</text:p>
          </table:table-cell>
          <table:table-cell office:value-type="float" office:value="0.14456">
            <text:p>0,14456</text:p>
          </table:table-cell>
          <table:table-cell office:value-type="percentage" office:value="0.22207001">
            <text:p>22,21%</text:p>
          </table:table-cell>
          <table:table-cell office:value-type="percentage" office:value="0.16783">
            <text:p>16,78%</text:p>
          </table:table-cell>
          <table:table-cell office:value-type="float" office:value="1.069">
            <text:p>1,069</text:p>
          </table:table-cell>
          <table:table-cell table:number-columns-repeated="1013"/>
        </table:table-row>
        <table:table-row table:style-name="ro2">
          <table:table-cell office:value-type="string">
            <text:p>TKO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14.07">
            <text:p>214,07</text:p>
          </table:table-cell>
          <table:table-cell office:value-type="float" office:value="82.019165">
            <text:p>82,019165</text:p>
          </table:table-cell>
          <table:table-cell office:value-type="float" office:value="0.42785">
            <text:p>0,42785</text:p>
          </table:table-cell>
          <table:table-cell office:value-type="percentage" office:value="0.41373003">
            <text:p>41,37%</text:p>
          </table:table-cell>
          <table:table-cell office:value-type="percentage" office:value="0.08129">
            <text:p>8,13%</text:p>
          </table:table-cell>
          <table:table-cell office:value-type="float" office:value="0.254">
            <text:p>0,254</text:p>
          </table:table-cell>
          <table:table-cell table:number-columns-repeated="1013"/>
        </table:table-row>
        <table:table-row table:style-name="ro2">
          <table:table-cell office:value-type="string">
            <text:p>AMA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0.755">
            <text:p>260,755</text:p>
          </table:table-cell>
          <table:table-cell office:value-type="float" office:value="30.145088">
            <text:p>30,145088</text:p>
          </table:table-cell>
          <table:table-cell office:value-type="float" office:value="0.34533">
            <text:p>0,34533</text:p>
          </table:table-cell>
          <table:table-cell office:value-type="percentage" office:value="0.31535998">
            <text:p>31,54%</text:p>
          </table:table-cell>
          <table:table-cell office:value-type="percentage" office:value="0.35508">
            <text:p>35,51%</text:p>
          </table:table-cell>
          <table:table-cell office:value-type="float" office:value="1.666">
            <text:p>1,666</text:p>
          </table:table-cell>
          <table:table-cell table:number-columns-repeated="1013"/>
        </table:table-row>
        <table:table-row table:style-name="ro2">
          <table:table-cell office:value-type="string">
            <text:p>CDN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317.155">
            <text:p>317,155</text:p>
          </table:table-cell>
          <table:table-cell office:value-type="float" office:value="81.740974">
            <text:p>81,740974</text:p>
          </table:table-cell>
          <table:table-cell office:value-type="float" office:value="0.47685">
            <text:p>0,47685</text:p>
          </table:table-cell>
          <table:table-cell office:value-type="percentage" office:value="0.36118">
            <text:p>36,12%</text:p>
          </table:table-cell>
          <table:table-cell office:value-type="percentage" office:value="0.21736">
            <text:p>21,74%</text:p>
          </table:table-cell>
          <table:table-cell office:value-type="float" office:value="1.051">
            <text:p>1,051</text:p>
          </table:table-cell>
          <table:table-cell table:number-columns-repeated="1013"/>
        </table:table-row>
        <table:table-row table:style-name="ro2">
          <table:table-cell office:value-type="string">
            <text:p>ROP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50.58">
            <text:p>450,58</text:p>
          </table:table-cell>
          <table:table-cell office:value-type="float" office:value="31.03168">
            <text:p>31,03168</text:p>
          </table:table-cell>
          <table:table-cell office:value-type="float" office:value="0.47288">
            <text:p>0,47288</text:p>
          </table:table-cell>
          <table:table-cell office:value-type="percentage" office:value="0.39513">
            <text:p>39,51%</text:p>
          </table:table-cell>
          <table:table-cell office:value-type="percentage" office:value="0.081549995">
            <text:p>8,15%</text:p>
          </table:table-cell>
          <table:table-cell office:value-type="float" office:value="0.938">
            <text:p>0,938</text:p>
          </table:table-cell>
          <table:table-cell table:number-columns-repeated="1013"/>
        </table:table-row>
        <table:table-row table:style-name="ro2">
          <table:table-cell office:value-type="string">
            <text:p>RMD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43.04">
            <text:p>243,04</text:p>
          </table:table-cell>
          <table:table-cell office:value-type="float" office:value="24.901638">
            <text:p>24,901638</text:p>
          </table:table-cell>
          <table:table-cell office:value-type="float" office:value="0.13826">
            <text:p>0,13826</text:p>
          </table:table-cell>
          <table:table-cell office:value-type="percentage" office:value="0.36870998">
            <text:p>36,87%</text:p>
          </table:table-cell>
          <table:table-cell office:value-type="percentage" office:value="0.25413">
            <text:p>25,41%</text:p>
          </table:table-cell>
          <table:table-cell office:value-type="float" office:value="0.867">
            <text:p>0,867</text:p>
          </table:table-cell>
          <table:table-cell table:number-columns-repeated="1013"/>
        </table:table-row>
        <table:table-row table:style-name="ro2">
          <table:table-cell office:value-type="string">
            <text:p>BRK-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504.15">
            <text:p>504,15</text:p>
          </table:table-cell>
          <table:table-cell office:value-type="float" office:value="16.12248">
            <text:p>16,12248</text:p>
          </table:table-cell>
          <table:table-cell office:value-type="float" office:value="0.18166">
            <text:p>0,18166</text:p>
          </table:table-cell>
          <table:table-cell office:value-type="percentage" office:value="0.27910998">
            <text:p>27,91%</text:p>
          </table:table-cell>
          <table:table-cell office:value-type="percentage" office:value="0.1017">
            <text:p>10,17%</text:p>
          </table:table-cell>
          <table:table-cell office:value-type="float" office:value="0.703">
            <text:p>0,703</text:p>
          </table:table-cell>
          <table:table-cell table:number-columns-repeated="1013"/>
        </table:table-row>
        <table:table-row table:style-name="ro2">
          <table:table-cell office:value-type="string">
            <text:p>BIIB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76.295">
            <text:p>176,295</text:p>
          </table:table-cell>
          <table:table-cell office:value-type="float" office:value="16.08531">
            <text:p>16,08531</text:p>
          </table:table-cell>
          <table:table-cell office:value-type="float" office:value="0.36194">
            <text:p>0,36194</text:p>
          </table:table-cell>
          <table:table-cell office:value-type="percentage" office:value="0.3387">
            <text:p>33,87%</text:p>
          </table:table-cell>
          <table:table-cell office:value-type="percentage" office:value="0.09307">
            <text:p>9,31%</text:p>
          </table:table-cell>
          <table:table-cell office:value-type="float" office:value="0.128">
            <text:p>0,128</text:p>
          </table:table-cell>
          <table:table-cell table:number-columns-repeated="1013"/>
        </table:table-row>
        <table:table-row table:style-name="ro2">
          <table:table-cell office:value-type="string">
            <text:p>CR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66.58">
            <text:p>266,58</text:p>
          </table:table-cell>
          <table:table-cell office:value-type="float" office:value="35.639034">
            <text:p>35,639034</text:p>
          </table:table-cell>
          <table:table-cell office:value-type="float" office:value="0.19385">
            <text:p>0,19385</text:p>
          </table:table-cell>
          <table:table-cell office:value-type="percentage" office:value="0.29271">
            <text:p>29,27%</text:p>
          </table:table-cell>
          <table:table-cell office:value-type="percentage" office:value="0.12184">
            <text:p>12,18%</text:p>
          </table:table-cell>
          <table:table-cell office:value-type="float" office:value="1.253">
            <text:p>1,253</text:p>
          </table:table-cell>
          <table:table-cell table:number-columns-repeated="1013"/>
        </table:table-row>
        <table:table-row table:style-name="ro2">
          <table:table-cell office:value-type="string">
            <text:p>SLB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8.64">
            <text:p>38,64</text:p>
          </table:table-cell>
          <table:table-cell office:value-type="float" office:value="15.03502">
            <text:p>15,03502</text:p>
          </table:table-cell>
          <table:table-cell office:value-type="float" office:value="0.47459">
            <text:p>0,47459</text:p>
          </table:table-cell>
          <table:table-cell office:value-type="percentage" office:value="0.21789">
            <text:p>21,79%</text:p>
          </table:table-cell>
          <table:table-cell office:value-type="percentage" office:value="0.15182">
            <text:p>15,18%</text:p>
          </table:table-cell>
          <table:table-cell office:value-type="float" office:value="0.732">
            <text:p>0,732</text:p>
          </table:table-cell>
          <table:table-cell table:number-columns-repeated="1013"/>
        </table:table-row>
        <table:table-row table:style-name="ro2">
          <table:table-cell office:value-type="string">
            <text:p>BLK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083.41">
            <text:p>1083,41</text:p>
          </table:table-cell>
          <table:table-cell office:value-type="float" office:value="27.879826">
            <text:p>27,879826</text:p>
          </table:table-cell>
          <table:table-cell office:value-type="float" office:value="0.2432">
            <text:p>0,2432</text:p>
          </table:table-cell>
          <table:table-cell office:value-type="percentage" office:value="0.39445">
            <text:p>39,45%</text:p>
          </table:table-cell>
          <table:table-cell office:value-type="percentage" office:value="0.120740004">
            <text:p>12,07%</text:p>
          </table:table-cell>
          <table:table-cell office:value-type="float" office:value="1.484">
            <text:p>1,484</text:p>
          </table:table-cell>
          <table:table-cell table:number-columns-repeated="1013"/>
        </table:table-row>
        <table:table-row table:style-name="ro2">
          <table:table-cell office:value-type="string">
            <text:p>SPGI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529.505">
            <text:p>529,505</text:p>
          </table:table-cell>
          <table:table-cell office:value-type="float" office:value="38.56555">
            <text:p>38,56555</text:p>
          </table:table-cell>
          <table:table-cell office:value-type="float" office:value="0.31784">
            <text:p>0,31784</text:p>
          </table:table-cell>
          <table:table-cell office:value-type="percentage" office:value="0.50286">
            <text:p>50,29%</text:p>
          </table:table-cell>
          <table:table-cell office:value-type="percentage" office:value="0.119940005">
            <text:p>11,99%</text:p>
          </table:table-cell>
          <table:table-cell office:value-type="float" office:value="1.188">
            <text:p>1,188</text:p>
          </table:table-cell>
          <table:table-cell table:number-columns-repeated="1013"/>
        </table:table-row>
        <table:table-row table:style-name="ro2">
          <table:table-cell office:value-type="string">
            <text:p>STE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55.5">
            <text:p>255,5</text:p>
          </table:table-cell>
          <table:table-cell office:value-type="float" office:value="36.657104">
            <text:p>36,657104</text:p>
          </table:table-cell>
          <table:table-cell office:value-type="float" office:value="0.29314">
            <text:p>0,29314</text:p>
          </table:table-cell>
          <table:table-cell office:value-type="percentage" office:value="0.27238">
            <text:p>27,24%</text:p>
          </table:table-cell>
          <table:table-cell office:value-type="percentage" office:value="0.101339996">
            <text:p>10,13%</text:p>
          </table:table-cell>
          <table:table-cell office:value-type="float" office:value="1.014">
            <text:p>1,014</text:p>
          </table:table-cell>
          <table:table-cell table:number-columns-repeated="1013"/>
        </table:table-row>
        <table:table-row table:style-name="ro2">
          <table:table-cell office:value-type="string">
            <text:p>SNA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50.13">
            <text:p>350,13</text:p>
          </table:table-cell>
          <table:table-cell office:value-type="float" office:value="18.369884">
            <text:p>18,369884</text:p>
          </table:table-cell>
          <table:table-cell office:value-type="float" office:value="0.2227">
            <text:p>0,2227</text:p>
          </table:table-cell>
          <table:table-cell office:value-type="percentage" office:value="0.27251">
            <text:p>27,25%</text:p>
          </table:table-cell>
          <table:table-cell office:value-type="percentage" office:value="0.18330999">
            <text:p>18,33%</text:p>
          </table:table-cell>
          <table:table-cell office:value-type="float" office:value="0.776">
            <text:p>0,776</text:p>
          </table:table-cell>
          <table:table-cell table:number-columns-repeated="1013"/>
        </table:table-row>
        <table:table-row table:style-name="ro2">
          <table:table-cell office:value-type="string">
            <text:p>SWK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64.26">
            <text:p>64,26</text:p>
          </table:table-cell>
          <table:table-cell office:value-type="float" office:value="20.863638">
            <text:p>20,863638</text:p>
          </table:table-cell>
          <table:table-cell office:value-type="float" office:value="0.20898">
            <text:p>0,20898</text:p>
          </table:table-cell>
          <table:table-cell office:value-type="percentage" office:value="0.23849002">
            <text:p>23,85%</text:p>
          </table:table-cell>
          <table:table-cell office:value-type="percentage" office:value="0.0789">
            <text:p>7,89%</text:p>
          </table:table-cell>
          <table:table-cell office:value-type="float" office:value="1.309">
            <text:p>1,309</text:p>
          </table:table-cell>
          <table:table-cell table:number-columns-repeated="1013"/>
        </table:table-row>
        <table:table-row table:style-name="ro2">
          <table:table-cell office:value-type="string">
            <text:p>TD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517.81">
            <text:p>517,81</text:p>
          </table:table-cell>
          <table:table-cell office:value-type="float" office:value="30.035383">
            <text:p>30,035383</text:p>
          </table:table-cell>
          <table:table-cell office:value-type="float" office:value="0.23989">
            <text:p>0,23989</text:p>
          </table:table-cell>
          <table:table-cell office:value-type="percentage" office:value="0.24138">
            <text:p>24,14%</text:p>
          </table:table-cell>
          <table:table-cell office:value-type="percentage" office:value="0.08127">
            <text:p>8,13%</text:p>
          </table:table-cell>
          <table:table-cell office:value-type="float" office:value="1.031">
            <text:p>1,031</text:p>
          </table:table-cell>
          <table:table-cell table:number-columns-repeated="1013"/>
        </table:table-row>
        <table:table-row table:style-name="ro2">
          <table:table-cell office:value-type="string">
            <text:p>FAST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41.04">
            <text:p>41,04</text:p>
          </table:table-cell>
          <table:table-cell office:value-type="float" office:value="38.35514">
            <text:p>38,35514</text:p>
          </table:table-cell>
          <table:table-cell office:value-type="float" office:value="0.13283">
            <text:p>0,13283</text:p>
          </table:table-cell>
          <table:table-cell office:value-type="percentage" office:value="0.22448">
            <text:p>22,45%</text:p>
          </table:table-cell>
          <table:table-cell office:value-type="percentage" office:value="0.32742">
            <text:p>32,74%</text:p>
          </table:table-cell>
          <table:table-cell office:value-type="float" office:value="0.884">
            <text:p>0,884</text:p>
          </table:table-cell>
          <table:table-cell table:number-columns-repeated="1013"/>
        </table:table-row>
        <table:table-row table:style-name="ro2">
          <table:table-cell office:value-type="string">
            <text:p>EXE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12.51">
            <text:p>112,51</text:p>
          </table:table-cell>
          <table:table-cell office:value-type="float" office:value="36.17685">
            <text:p>36,17685</text:p>
          </table:table-cell>
          <table:table-cell office:value-type="float" office:value="0.2795">
            <text:p>0,2795</text:p>
          </table:table-cell>
          <table:table-cell office:value-type="percentage" office:value="0.42026">
            <text:p>42,03%</text:p>
          </table:table-cell>
          <table:table-cell office:value-type="percentage" office:value="0.061189998">
            <text:p>6,12%</text:p>
          </table:table-cell>
          <table:table-cell office:value-type="float" office:value="0.437">
            <text:p>0,437</text:p>
          </table:table-cell>
          <table:table-cell table:number-columns-repeated="1013"/>
        </table:table-row>
        <table:table-row table:style-name="ro2">
          <table:table-cell office:value-type="string">
            <text:p>DOV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98.02">
            <text:p>198,02</text:p>
          </table:table-cell>
          <table:table-cell office:value-type="float" office:value="25.783855">
            <text:p>25,783855</text:p>
          </table:table-cell>
          <table:table-cell office:value-type="float" office:value="0.40076">
            <text:p>0,40076</text:p>
          </table:table-cell>
          <table:table-cell office:value-type="percentage" office:value="0.22278999">
            <text:p>22,28%</text:p>
          </table:table-cell>
          <table:table-cell office:value-type="percentage" office:value="0.15883">
            <text:p>15,88%</text:p>
          </table:table-cell>
          <table:table-cell office:value-type="float" office:value="1.309">
            <text:p>1,309</text:p>
          </table:table-cell>
          <table:table-cell table:number-columns-repeated="1013"/>
        </table:table-row>
        <table:table-row table:style-name="ro2">
          <table:table-cell office:value-type="string">
            <text:p>IVZ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.57">
            <text:p>26,57</text:p>
          </table:table-cell>
          <table:table-cell office:value-type="float" office:value="18.07483">
            <text:p>18,07483</text:p>
          </table:table-cell>
          <table:table-cell office:value-type="float" office:value="0.10983">
            <text:p>0,10983</text:p>
          </table:table-cell>
          <table:table-cell office:value-type="percentage" office:value="0.20030001">
            <text:p>20,03%</text:p>
          </table:table-cell>
          <table:table-cell office:value-type="percentage" office:value="0.06904">
            <text:p>6,90%</text:p>
          </table:table-cell>
          <table:table-cell office:value-type="float" office:value="1.64">
            <text:p>1,64</text:p>
          </table:table-cell>
          <table:table-cell table:number-columns-repeated="1013"/>
        </table:table-row>
        <table:table-row table:style-name="ro2">
          <table:table-cell office:value-type="string">
            <text:p>DECK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05.44">
            <text:p>105,44</text:p>
          </table:table-cell>
          <table:table-cell office:value-type="float" office:value="15.667162">
            <text:p>15,667162</text:p>
          </table:table-cell>
          <table:table-cell office:value-type="float" office:value="0.1422">
            <text:p>0,1422</text:p>
          </table:table-cell>
          <table:table-cell office:value-type="percentage" office:value="0.25019">
            <text:p>25,02%</text:p>
          </table:table-cell>
          <table:table-cell office:value-type="percentage" office:value="0.43312">
            <text:p>43,31%</text:p>
          </table:table-cell>
          <table:table-cell office:value-type="float" office:value="1.186">
            <text:p>1,186</text:p>
          </table:table-cell>
          <table:table-cell table:number-columns-repeated="1013"/>
        </table:table-row>
        <table:table-row table:style-name="ro2">
          <table:table-cell office:value-type="string">
            <text:p>FANG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51.005">
            <text:p>151,005</text:p>
          </table:table-cell>
          <table:table-cell office:value-type="float" office:value="10.611736">
            <text:p>10,611736</text:p>
          </table:table-cell>
          <table:table-cell office:value-type="float" office:value="0.3566">
            <text:p>0,3566</text:p>
          </table:table-cell>
          <table:table-cell office:value-type="percentage" office:value="0.7246">
            <text:p>72,46%</text:p>
          </table:table-cell>
          <table:table-cell office:value-type="percentage" office:value="0.10901">
            <text:p>10,90%</text:p>
          </table:table-cell>
          <table:table-cell office:value-type="float" office:value="0.612">
            <text:p>0,612</text:p>
          </table:table-cell>
          <table:table-cell table:number-columns-repeated="1013"/>
        </table:table-row>
        <table:table-row table:style-name="ro2">
          <table:table-cell office:value-type="string">
            <text:p>IEX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80.02">
            <text:p>180,02</text:p>
          </table:table-cell>
          <table:table-cell office:value-type="float" office:value="28.484177">
            <text:p>28,484177</text:p>
          </table:table-cell>
          <table:table-cell office:value-type="float" office:value="0.48121">
            <text:p>0,48121</text:p>
          </table:table-cell>
          <table:table-cell office:value-type="percentage" office:value="0.26809">
            <text:p>26,81%</text:p>
          </table:table-cell>
          <table:table-cell office:value-type="percentage" office:value="0.12197">
            <text:p>12,20%</text:p>
          </table:table-cell>
          <table:table-cell office:value-type="float" office:value="0.999">
            <text:p>0,999</text:p>
          </table:table-cell>
          <table:table-cell table:number-columns-repeated="1013"/>
        </table:table-row>
        <table:table-row table:style-name="ro2">
          <table:table-cell office:value-type="string">
            <text:p>EOG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05.58">
            <text:p>105,58</text:p>
          </table:table-cell>
          <table:table-cell office:value-type="float" office:value="10.484609">
            <text:p>10,484609</text:p>
          </table:table-cell>
          <table:table-cell office:value-type="float" office:value="0.26835">
            <text:p>0,26835</text:p>
          </table:table-cell>
          <table:table-cell office:value-type="percentage" office:value="0.51910996">
            <text:p>51,91%</text:p>
          </table:table-cell>
          <table:table-cell office:value-type="percentage" office:value="0.18476999">
            <text:p>18,48%</text:p>
          </table:table-cell>
          <table:table-cell office:value-type="float" office:value="0.504">
            <text:p>0,504</text:p>
          </table:table-cell>
          <table:table-cell table:number-columns-repeated="1013"/>
        </table:table-row>
        <table:table-row table:style-name="ro2">
          <table:table-cell office:value-type="string">
            <text:p>E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204.41">
            <text:p>204,41</text:p>
          </table:table-cell>
          <table:table-cell office:value-type="float" office:value="59.594753">
            <text:p>59,594753</text:p>
          </table:table-cell>
          <table:table-cell office:value-type="float" office:value="0.3665">
            <text:p>0,3665</text:p>
          </table:table-cell>
          <table:table-cell office:value-type="percentage" office:value="0.21500999">
            <text:p>21,50%</text:p>
          </table:table-cell>
          <table:table-cell office:value-type="percentage" office:value="0.13201">
            <text:p>13,20%</text:p>
          </table:table-cell>
          <table:table-cell office:value-type="float" office:value="0.757">
            <text:p>0,757</text:p>
          </table:table-cell>
          <table:table-cell table:number-columns-repeated="1013"/>
        </table:table-row>
        <table:table-row table:style-name="ro2">
          <table:table-cell office:value-type="string">
            <text:p>ABT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125.58">
            <text:p>125,58</text:p>
          </table:table-cell>
          <table:table-cell office:value-type="float" office:value="15.776382">
            <text:p>15,776382</text:p>
          </table:table-cell>
          <table:table-cell office:value-type="float" office:value="0.2531">
            <text:p>0,2531</text:p>
          </table:table-cell>
          <table:table-cell office:value-type="percentage" office:value="0.26793">
            <text:p>26,79%</text:p>
          </table:table-cell>
          <table:table-cell office:value-type="percentage" office:value="0.3062">
            <text:p>30,62%</text:p>
          </table:table-cell>
          <table:table-cell office:value-type="float" office:value="0.714">
            <text:p>0,714</text:p>
          </table:table-cell>
          <table:table-cell table:number-columns-repeated="1013"/>
        </table:table-row>
        <table:table-row table:style-name="ro2">
          <table:table-cell office:value-type="string">
            <text:p>EQT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54.66">
            <text:p>54,66</text:p>
          </table:table-cell>
          <table:table-cell office:value-type="float" office:value="17.80456">
            <text:p>17,80456</text:p>
          </table:table-cell>
          <table:table-cell office:value-type="float" office:value="0.30675">
            <text:p>0,30675</text:p>
          </table:table-cell>
          <table:table-cell office:value-type="percentage" office:value="0.67595">
            <text:p>67,60%</text:p>
          </table:table-cell>
          <table:table-cell office:value-type="percentage" office:value="0.08488">
            <text:p>8,49%</text:p>
          </table:table-cell>
          <table:table-cell office:value-type="float" office:value="0.621">
            <text:p>0,621</text:p>
          </table:table-cell>
          <table:table-cell table:number-columns-repeated="1013"/>
        </table:table-row>
        <table:table-row table:style-name="ro2">
          <table:table-cell office:value-type="string">
            <text:p>ABNB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37.16">
            <text:p>137,16</text:p>
          </table:table-cell>
          <table:table-cell office:value-type="float" office:value="32.735085">
            <text:p>32,735085</text:p>
          </table:table-cell>
          <table:table-cell office:value-type="float" office:value="0.26458">
            <text:p>0,26458</text:p>
          </table:table-cell>
          <table:table-cell office:value-type="percentage" office:value="0.23118">
            <text:p>23,12%</text:p>
          </table:table-cell>
          <table:table-cell office:value-type="percentage" office:value="0.30776">
            <text:p>30,78%</text:p>
          </table:table-cell>
          <table:table-cell office:value-type="float" office:value="1.118">
            <text:p>1,118</text:p>
          </table:table-cell>
          <table:table-cell table:number-columns-repeated="1013"/>
        </table:table-row>
        <table:table-row table:style-name="ro2">
          <table:table-cell office:value-type="string">
            <text:p>LRCX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174.46">
            <text:p>174,46</text:p>
          </table:table-cell>
          <table:table-cell office:value-type="float" office:value="38.427315">
            <text:p>38,427315</text:p>
          </table:table-cell>
          <table:table-cell office:value-type="float" office:value="0.43991">
            <text:p>0,43991</text:p>
          </table:table-cell>
          <table:table-cell office:value-type="percentage" office:value="0.35012">
            <text:p>35,01%</text:p>
          </table:table-cell>
          <table:table-cell office:value-type="percentage" office:value="0.62261003">
            <text:p>62,26%</text:p>
          </table:table-cell>
          <table:table-cell office:value-type="float" office:value="1.781">
            <text:p>1,781</text:p>
          </table:table-cell>
          <table:table-cell table:number-columns-repeated="1013"/>
        </table:table-row>
        <table:table-row table:style-name="ro2">
          <table:table-cell office:value-type="string">
            <text:p>PT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74.67">
            <text:p>174,67</text:p>
          </table:table-cell>
          <table:table-cell office:value-type="float" office:value="28.728619">
            <text:p>28,728619</text:p>
          </table:table-cell>
          <table:table-cell office:value-type="float" office:value="0.35802">
            <text:p>0,35802</text:p>
          </table:table-cell>
          <table:table-cell office:value-type="percentage" office:value="0.40543997">
            <text:p>40,54%</text:p>
          </table:table-cell>
          <table:table-cell office:value-type="percentage" office:value="0.2085">
            <text:p>20,85%</text:p>
          </table:table-cell>
          <table:table-cell office:value-type="float" office:value="1.03">
            <text:p>1,03</text:p>
          </table:table-cell>
          <table:table-cell table:number-columns-repeated="1013"/>
        </table:table-row>
        <table:table-row table:style-name="ro2">
          <table:table-cell office:value-type="string">
            <text:p>NEM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102.25">
            <text:p>102,25</text:p>
          </table:table-cell>
          <table:table-cell office:value-type="float" office:value="15.902022">
            <text:p>15,902022</text:p>
          </table:table-cell>
          <table:table-cell office:value-type="float" office:value="0.16914">
            <text:p>0,16914</text:p>
          </table:table-cell>
          <table:table-cell office:value-type="percentage" office:value="0.56964">
            <text:p>56,96%</text:p>
          </table:table-cell>
          <table:table-cell office:value-type="percentage" office:value="0.22875999">
            <text:p>22,88%</text:p>
          </table:table-cell>
          <table:table-cell office:value-type="float" office:value="0.431">
            <text:p>0,431</text:p>
          </table:table-cell>
          <table:table-cell table:number-columns-repeated="1013"/>
        </table:table-row>
        <table:table-row table:style-name="ro2">
          <table:table-cell office:value-type="string">
            <text:p>PN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105.76">
            <text:p>105,76</text:p>
          </table:table-cell>
          <table:table-cell office:value-type="float" office:value="26.910942">
            <text:p>26,910942</text:p>
          </table:table-cell>
          <table:table-cell office:value-type="float" office:value="0.4476">
            <text:p>0,4476</text:p>
          </table:table-cell>
          <table:table-cell office:value-type="percentage" office:value="0.26174998">
            <text:p>26,17%</text:p>
          </table:table-cell>
          <table:table-cell office:value-type="percentage" office:value="0.17966999">
            <text:p>17,97%</text:p>
          </table:table-cell>
          <table:table-cell office:value-type="float" office:value="1.208">
            <text:p>1,208</text:p>
          </table:table-cell>
          <table:table-cell table:number-columns-repeated="1013"/>
        </table:table-row>
        <table:table-row table:style-name="ro2">
          <table:table-cell office:value-type="string">
            <text:p>MSF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488.515">
            <text:p>488,515</text:p>
          </table:table-cell>
          <table:table-cell office:value-type="float" office:value="34.695667">
            <text:p>34,695667</text:p>
          </table:table-cell>
          <table:table-cell office:value-type="float" office:value="0.33154">
            <text:p>0,33154</text:p>
          </table:table-cell>
          <table:table-cell office:value-type="percentage" office:value="0.56646997">
            <text:p>56,65%</text:p>
          </table:table-cell>
          <table:table-cell office:value-type="percentage" office:value="0.32241002">
            <text:p>32,24%</text:p>
          </table:table-cell>
          <table:table-cell office:value-type="float" office:value="1.07">
            <text:p>1,07</text:p>
          </table:table-cell>
          <table:table-cell table:number-columns-repeated="1013"/>
        </table:table-row>
        <table:table-row table:style-name="ro2">
          <table:table-cell office:value-type="string">
            <text:p>MU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94.2">
            <text:p>294,2</text:p>
          </table:table-cell>
          <table:table-cell office:value-type="float" office:value="27.99239">
            <text:p>27,99239</text:p>
          </table:table-cell>
          <table:table-cell office:value-type="float" office:value="0.21244">
            <text:p>0,21244</text:p>
          </table:table-cell>
          <table:table-cell office:value-type="percentage" office:value="0.52548003">
            <text:p>52,55%</text:p>
          </table:table-cell>
          <table:table-cell office:value-type="percentage" office:value="0.22554001">
            <text:p>22,55%</text:p>
          </table:table-cell>
          <table:table-cell office:value-type="float" office:value="1.548">
            <text:p>1,548</text:p>
          </table:table-cell>
          <table:table-cell table:number-columns-repeated="1013"/>
        </table:table-row>
        <table:table-row table:style-name="ro2">
          <table:table-cell office:value-type="string">
            <text:p>COI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33.4365">
            <text:p>233,4365</text:p>
          </table:table-cell>
          <table:table-cell office:value-type="float" office:value="20.176016">
            <text:p>20,176016</text:p>
          </table:table-cell>
          <table:table-cell office:value-type="float" office:value="0.48559">
            <text:p>0,48559</text:p>
          </table:table-cell>
          <table:table-cell office:value-type="percentage" office:value="0.32553002">
            <text:p>32,55%</text:p>
          </table:table-cell>
          <table:table-cell office:value-type="percentage" office:value="0.26005">
            <text:p>26,01%</text:p>
          </table:table-cell>
          <table:table-cell office:value-type="float" office:value="3.691">
            <text:p>3,691</text:p>
          </table:table-cell>
          <table:table-cell table:number-columns-repeated="1013"/>
        </table:table-row>
        <table:table-row table:style-name="ro2">
          <table:table-cell office:value-type="string">
            <text:p>META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666.59">
            <text:p>666,59</text:p>
          </table:table-cell>
          <table:table-cell office:value-type="float" office:value="29.50819">
            <text:p>29,50819</text:p>
          </table:table-cell>
          <table:table-cell office:value-type="float" office:value="0.26311">
            <text:p>0,26311</text:p>
          </table:table-cell>
          <table:table-cell office:value-type="percentage" office:value="0.51937">
            <text:p>51,94%</text:p>
          </table:table-cell>
          <table:table-cell office:value-type="percentage" office:value="0.32643002">
            <text:p>32,64%</text:p>
          </table:table-cell>
          <table:table-cell office:value-type="float" office:value="1.273">
            <text:p>1,273</text:p>
          </table:table-cell>
          <table:table-cell table:number-columns-repeated="1013"/>
        </table:table-row>
        <table:table-row table:style-name="ro2">
          <table:table-cell office:value-type="string">
            <text:p>CF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AGGING</text:p>
          </table:table-cell>
          <table:table-cell office:value-type="float" office:value="77.3241">
            <text:p>77,3241</text:p>
          </table:table-cell>
          <table:table-cell office:value-type="float" office:value="9.349951">
            <text:p>9,349951</text:p>
          </table:table-cell>
          <table:table-cell office:value-type="float" office:value="0.44133">
            <text:p>0,44133</text:p>
          </table:table-cell>
          <table:table-cell office:value-type="percentage" office:value="0.45042">
            <text:p>45,04%</text:p>
          </table:table-cell>
          <table:table-cell office:value-type="percentage" office:value="0.21967">
            <text:p>21,97%</text:p>
          </table:table-cell>
          <table:table-cell office:value-type="float" office:value="0.679">
            <text:p>0,679</text:p>
          </table:table-cell>
          <table:table-cell table:number-columns-repeated="1013"/>
        </table:table-row>
        <table:table-row table:style-name="ro2">
          <table:table-cell office:value-type="string">
            <text:p>CBOE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256.015">
            <text:p>256,015</text:p>
          </table:table-cell>
          <table:table-cell office:value-type="float" office:value="27.528496">
            <text:p>27,528496</text:p>
          </table:table-cell>
          <table:table-cell office:value-type="float" office:value="0.32645">
            <text:p>0,32645</text:p>
          </table:table-cell>
          <table:table-cell office:value-type="percentage" office:value="0.32418">
            <text:p>32,42%</text:p>
          </table:table-cell>
          <table:table-cell office:value-type="percentage" office:value="0.21621001">
            <text:p>21,62%</text:p>
          </table:table-cell>
          <table:table-cell office:value-type="float" office:value="0.353">
            <text:p>0,353</text:p>
          </table:table-cell>
          <table:table-cell table:number-columns-repeated="1013"/>
        </table:table-row>
        <table:table-row table:style-name="ro2">
          <table:table-cell office:value-type="string">
            <text:p>CME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IMPROVING</text:p>
          </table:table-cell>
          <table:table-cell office:value-type="float" office:value="276.255">
            <text:p>276,255</text:p>
          </table:table-cell>
          <table:table-cell office:value-type="float" office:value="26.742983">
            <text:p>26,742983</text:p>
          </table:table-cell>
          <table:table-cell office:value-type="float" office:value="0.13372">
            <text:p>0,13372</text:p>
          </table:table-cell>
          <table:table-cell office:value-type="percentage" office:value="0.70383">
            <text:p>70,38%</text:p>
          </table:table-cell>
          <table:table-cell office:value-type="percentage" office:value="0.13346">
            <text:p>13,35%</text:p>
          </table:table-cell>
          <table:table-cell office:value-type="float" office:value="0.293">
            <text:p>0,293</text:p>
          </table:table-cell>
          <table:table-cell table:number-columns-repeated="1013"/>
        </table:table-row>
        <table:table-row table:style-name="ro2">
          <table:table-cell office:value-type="string">
            <text:p>DHR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30.155">
            <text:p>230,155</text:p>
          </table:table-cell>
          <table:table-cell office:value-type="float" office:value="47.259754">
            <text:p>47,259754</text:p>
          </table:table-cell>
          <table:table-cell office:value-type="float" office:value="0.35544">
            <text:p>0,35544</text:p>
          </table:table-cell>
          <table:table-cell office:value-type="percentage" office:value="0.31436002">
            <text:p>31,44%</text:p>
          </table:table-cell>
          <table:table-cell office:value-type="percentage" office:value="0.06843">
            <text:p>6,84%</text:p>
          </table:table-cell>
          <table:table-cell office:value-type="float" office:value="0.923">
            <text:p>0,923</text:p>
          </table:table-cell>
          <table:table-cell table:number-columns-repeated="1013"/>
        </table:table-row>
        <table:table-row table:style-name="ro2">
          <table:table-cell office:value-type="string">
            <text:p>CTVA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LEADING</text:p>
          </table:table-cell>
          <table:table-cell office:value-type="float" office:value="67.465">
            <text:p>67,465</text:p>
          </table:table-cell>
          <table:table-cell office:value-type="float" office:value="27.313763">
            <text:p>27,313763</text:p>
          </table:table-cell>
          <table:table-cell office:value-type="float" office:value="0.17175">
            <text:p>0,17175</text:p>
          </table:table-cell>
          <table:table-cell office:value-type="percentage" office:value="0.21518">
            <text:p>21,52%</text:p>
          </table:table-cell>
          <table:table-cell office:value-type="percentage" office:value="0.06705">
            <text:p>6,71%</text:p>
          </table:table-cell>
          <table:table-cell office:value-type="float" office:value="0.738">
            <text:p>0,738</text:p>
          </table:table-cell>
          <table:table-cell table:number-columns-repeated="1013"/>
        </table:table-row>
        <table:table-row table:style-name="ro2">
          <table:table-cell office:value-type="string">
            <text:p>CTRA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6.5">
            <text:p>26,5</text:p>
          </table:table-cell>
          <table:table-cell office:value-type="float" office:value="12.268518">
            <text:p>12,268518</text:p>
          </table:table-cell>
          <table:table-cell office:value-type="float" office:value="0.27957">
            <text:p>0,27957</text:p>
          </table:table-cell>
          <table:table-cell office:value-type="percentage" office:value="0.66112">
            <text:p>66,11%</text:p>
          </table:table-cell>
          <table:table-cell office:value-type="percentage" office:value="0.118549995">
            <text:p>11,85%</text:p>
          </table:table-cell>
          <table:table-cell office:value-type="float" office:value="0.309">
            <text:p>0,309</text:p>
          </table:table-cell>
          <table:table-cell table:number-columns-repeated="1013"/>
        </table:table-row>
        <table:table-row table:style-name="ro2">
          <table:table-cell office:value-type="string">
            <text:p>COP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93.73">
            <text:p>93,73</text:p>
          </table:table-cell>
          <table:table-cell office:value-type="float" office:value="13.238701">
            <text:p>13,238701</text:p>
          </table:table-cell>
          <table:table-cell office:value-type="float" office:value="0.36169">
            <text:p>0,36169</text:p>
          </table:table-cell>
          <table:table-cell office:value-type="percentage" office:value="0.41485">
            <text:p>41,49%</text:p>
          </table:table-cell>
          <table:table-cell office:value-type="percentage" office:value="0.15421">
            <text:p>15,42%</text:p>
          </table:table-cell>
          <table:table-cell office:value-type="float" office:value="0.328">
            <text:p>0,328</text:p>
          </table:table-cell>
          <table:table-cell table:number-columns-repeated="1013"/>
        </table:table-row>
        <table:table-row table:style-name="ro2">
          <table:table-cell office:value-type="string">
            <text:p>COO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82.45">
            <text:p>82,45</text:p>
          </table:table-cell>
          <table:table-cell office:value-type="float" office:value="44.090908">
            <text:p>44,090908</text:p>
          </table:table-cell>
          <table:table-cell office:value-type="float" office:value="0.33785">
            <text:p>0,33785</text:p>
          </table:table-cell>
          <table:table-cell office:value-type="percentage" office:value="0.26002002">
            <text:p>26,00%</text:p>
          </table:table-cell>
          <table:table-cell office:value-type="percentage" office:value="0.045939997">
            <text:p>4,59%</text:p>
          </table:table-cell>
          <table:table-cell office:value-type="float" office:value="1.049">
            <text:p>1,049</text:p>
          </table:table-cell>
          <table:table-cell table:number-columns-repeated="1013"/>
        </table:table-row>
        <table:table-row table:style-name="ro2">
          <table:table-cell office:value-type="string">
            <text:p>LULU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11.41">
            <text:p>211,41</text:p>
          </table:table-cell>
          <table:table-cell office:value-type="float" office:value="14.691452">
            <text:p>14,691452</text:p>
          </table:table-cell>
          <table:table-cell office:value-type="float" office:value="0.39156">
            <text:p>0,39156</text:p>
          </table:table-cell>
          <table:table-cell office:value-type="percentage" office:value="0.26512">
            <text:p>26,51%</text:p>
          </table:table-cell>
          <table:table-cell office:value-type="percentage" office:value="0.41017">
            <text:p>41,02%</text:p>
          </table:table-cell>
          <table:table-cell office:value-type="float" office:value="1.012">
            <text:p>1,012</text:p>
          </table:table-cell>
          <table:table-cell table:number-columns-repeated="1013"/>
        </table:table-row>
        <table:table-row table:style-name="ro2">
          <table:table-cell office:value-type="string">
            <text:p>KEY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206.6876">
            <text:p>206,6876</text:p>
          </table:table-cell>
          <table:table-cell office:value-type="float" office:value="41.090973">
            <text:p>41,090973</text:p>
          </table:table-cell>
          <table:table-cell office:value-type="float" office:value="0.47237">
            <text:p>0,47237</text:p>
          </table:table-cell>
          <table:table-cell office:value-type="percentage" office:value="0.22586">
            <text:p>22,59%</text:p>
          </table:table-cell>
          <table:table-cell office:value-type="percentage" office:value="0.1582">
            <text:p>15,82%</text:p>
          </table:table-cell>
          <table:table-cell office:value-type="float" office:value="1.196">
            <text:p>1,196</text:p>
          </table:table-cell>
          <table:table-cell table:number-columns-repeated="1013"/>
        </table:table-row>
        <table:table-row table:style-name="ro2">
          <table:table-cell office:value-type="string">
            <text:p>C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6">
            <text:p>6</text:p>
          </table:table-cell>
          <table:table-cell table:style-name="ce3" office:value-type="string">
            <text:p>WEAKENING</text:p>
          </table:table-cell>
          <table:table-cell office:value-type="float" office:value="313.34">
            <text:p>313,34</text:p>
          </table:table-cell>
          <table:table-cell office:value-type="float" office:value="13.094024">
            <text:p>13,094024</text:p>
          </table:table-cell>
          <table:table-cell office:value-type="float" office:value="0.30958">
            <text:p>0,30958</text:p>
          </table:table-cell>
          <table:table-cell office:value-type="percentage" office:value="0.21537">
            <text:p>21,54%</text:p>
          </table:table-cell>
          <table:table-cell office:value-type="percentage" office:value="0.1364">
            <text:p>13,64%</text:p>
          </table:table-cell>
          <table:table-cell office:value-type="float" office:value="0.522">
            <text:p>0,522</text:p>
          </table:table-cell>
          <table:table-cell table:number-columns-repeated="1013"/>
        </table:table-row>
        <table:table-row table:style-name="ro2">
          <table:table-cell office:value-type="string">
            <text:p>V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354.19">
            <text:p>354,19</text:p>
          </table:table-cell>
          <table:table-cell office:value-type="float" office:value="34.6905">
            <text:p>34,6905</text:p>
          </table:table-cell>
          <table:table-cell office:value-type="float" office:value="0.68807">
            <text:p>0,68807</text:p>
          </table:table-cell>
          <table:table-cell office:value-type="percentage" office:value="0.7007">
            <text:p>70,07%</text:p>
          </table:table-cell>
          <table:table-cell office:value-type="percentage" office:value="0.52068">
            <text:p>52,07%</text:p>
          </table:table-cell>
          <table:table-cell office:value-type="float" office:value="0.822">
            <text:p>0,822</text:p>
          </table:table-cell>
          <table:table-cell table:number-columns-repeated="1013"/>
        </table:table-row>
        <table:table-row table:style-name="ro2">
          <table:table-cell office:value-type="string">
            <text:p>APA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4.661">
            <text:p>24,661</text:p>
          </table:table-cell>
          <table:table-cell office:value-type="float" office:value="5.8997607">
            <text:p>5,8997607</text:p>
          </table:table-cell>
          <table:table-cell office:value-type="float" office:value="0.66895">
            <text:p>0,66895</text:p>
          </table:table-cell>
          <table:table-cell office:value-type="percentage" office:value="0.62191004">
            <text:p>62,19%</text:p>
          </table:table-cell>
          <table:table-cell office:value-type="percentage" office:value="0.27427998">
            <text:p>27,43%</text:p>
          </table:table-cell>
          <table:table-cell office:value-type="float" office:value="0.755">
            <text:p>0,755</text:p>
          </table:table-cell>
          <table:table-cell table:number-columns-repeated="1013"/>
        </table:table-row>
        <table:table-row table:style-name="ro2">
          <table:table-cell office:value-type="string">
            <text:p>TRV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91.615">
            <text:p>291,615</text:p>
          </table:table-cell>
          <table:table-cell office:value-type="float" office:value="11.480906">
            <text:p>11,480906</text:p>
          </table:table-cell>
          <table:table-cell office:value-type="float" office:value="0.29318">
            <text:p>0,29318</text:p>
          </table:table-cell>
          <table:table-cell office:value-type="percentage" office:value="0.17302">
            <text:p>17,30%</text:p>
          </table:table-cell>
          <table:table-cell office:value-type="percentage" office:value="0.19809">
            <text:p>19,81%</text:p>
          </table:table-cell>
          <table:table-cell office:value-type="float" office:value="0.541">
            <text:p>0,541</text:p>
          </table:table-cell>
          <table:table-cell table:number-columns-repeated="1013"/>
        </table:table-row>
        <table:table-row table:style-name="ro2">
          <table:table-cell office:value-type="string">
            <text:p>AJ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63.205">
            <text:p>263,205</text:p>
          </table:table-cell>
          <table:table-cell office:value-type="float" office:value="42.045525">
            <text:p>42,045525</text:p>
          </table:table-cell>
          <table:table-cell office:value-type="float" office:value="0.58979">
            <text:p>0,58979</text:p>
          </table:table-cell>
          <table:table-cell office:value-type="percentage" office:value="0.28488">
            <text:p>28,49%</text:p>
          </table:table-cell>
          <table:table-cell office:value-type="percentage" office:value="0.090670004">
            <text:p>9,07%</text:p>
          </table:table-cell>
          <table:table-cell office:value-type="float" office:value="0.688">
            <text:p>0,688</text:p>
          </table:table-cell>
          <table:table-cell table:number-columns-repeated="1013"/>
        </table:table-row>
        <table:table-row table:style-name="ro2">
          <table:table-cell office:value-type="string">
            <text:p>ATO</text:p>
          </table:table-cell>
          <table:table-cell office:value-type="string">
            <text:p>Utiliti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68.82">
            <text:p>168,82</text:p>
          </table:table-cell>
          <table:table-cell office:value-type="float" office:value="22.630028">
            <text:p>22,630028</text:p>
          </table:table-cell>
          <table:table-cell office:value-type="float" office:value="0.68616">
            <text:p>0,68616</text:p>
          </table:table-cell>
          <table:table-cell office:value-type="percentage" office:value="0.49381">
            <text:p>49,38%</text:p>
          </table:table-cell>
          <table:table-cell office:value-type="percentage" office:value="0.09323">
            <text:p>9,32%</text:p>
          </table:table-cell>
          <table:table-cell office:value-type="float" office:value="0.747">
            <text:p>0,747</text:p>
          </table:table-cell>
          <table:table-cell table:number-columns-repeated="1013"/>
        </table:table-row>
        <table:table-row table:style-name="ro2">
          <table:table-cell office:value-type="string">
            <text:p>UBE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2.3201">
            <text:p>82,3201</text:p>
          </table:table-cell>
          <table:table-cell office:value-type="float" office:value="10.594607">
            <text:p>10,594607</text:p>
          </table:table-cell>
          <table:table-cell office:value-type="float" office:value="0.45755">
            <text:p>0,45755</text:p>
          </table:table-cell>
          <table:table-cell office:value-type="percentage" office:value="0.10665">
            <text:p>10,67%</text:p>
          </table:table-cell>
          <table:table-cell office:value-type="percentage" office:value="0.72994006">
            <text:p>72,99%</text:p>
          </table:table-cell>
          <table:table-cell office:value-type="float" office:value="1.192">
            <text:p>1,192</text:p>
          </table:table-cell>
          <table:table-cell table:number-columns-repeated="1013"/>
        </table:table-row>
        <table:table-row table:style-name="ro2">
          <table:table-cell office:value-type="string">
            <text:p>ADSK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00.56">
            <text:p>300,56</text:p>
          </table:table-cell>
          <table:table-cell office:value-type="float" office:value="58.361164">
            <text:p>58,361164</text:p>
          </table:table-cell>
          <table:table-cell office:value-type="float" office:value="0.94504">
            <text:p>0,94504</text:p>
          </table:table-cell>
          <table:table-cell office:value-type="percentage" office:value="0.25726">
            <text:p>25,73%</text:p>
          </table:table-cell>
          <table:table-cell office:value-type="percentage" office:value="0.40333998">
            <text:p>40,33%</text:p>
          </table:table-cell>
          <table:table-cell office:value-type="float" office:value="1.475">
            <text:p>1,475</text:p>
          </table:table-cell>
          <table:table-cell table:number-columns-repeated="1013"/>
        </table:table-row>
        <table:table-row table:style-name="ro2">
          <table:table-cell office:value-type="string">
            <text:p>VMC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90.225">
            <text:p>290,225</text:p>
          </table:table-cell>
          <table:table-cell office:value-type="float" office:value="34.265053">
            <text:p>34,265053</text:p>
          </table:table-cell>
          <table:table-cell office:value-type="float" office:value="0.56296">
            <text:p>0,56296</text:p>
          </table:table-cell>
          <table:table-cell office:value-type="percentage" office:value="0.29588">
            <text:p>29,59%</text:p>
          </table:table-cell>
          <table:table-cell office:value-type="percentage" office:value="0.13520999">
            <text:p>13,52%</text:p>
          </table:table-cell>
          <table:table-cell office:value-type="float" office:value="1.064">
            <text:p>1,064</text:p>
          </table:table-cell>
          <table:table-cell table:number-columns-repeated="1013"/>
        </table:table-row>
        <table:table-row table:style-name="ro2">
          <table:table-cell office:value-type="string">
            <text:p>APH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36.3985">
            <text:p>136,3985</text:p>
          </table:table-cell>
          <table:table-cell office:value-type="float" office:value="45.466167">
            <text:p>45,466167</text:p>
          </table:table-cell>
          <table:table-cell office:value-type="float" office:value="0.6399">
            <text:p>0,6399</text:p>
          </table:table-cell>
          <table:table-cell office:value-type="percentage" office:value="0.28906">
            <text:p>28,91%</text:p>
          </table:table-cell>
          <table:table-cell office:value-type="percentage" office:value="0.34807998">
            <text:p>34,81%</text:p>
          </table:table-cell>
          <table:table-cell office:value-type="float" office:value="1.194">
            <text:p>1,194</text:p>
          </table:table-cell>
          <table:table-cell table:number-columns-repeated="1013"/>
        </table:table-row>
        <table:table-row table:style-name="ro2">
          <table:table-cell office:value-type="string">
            <text:p>VICI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8.345">
            <text:p>28,345</text:p>
          </table:table-cell>
          <table:table-cell office:value-type="float" office:value="10.777566">
            <text:p>10,777566</text:p>
          </table:table-cell>
          <table:table-cell office:value-type="float" office:value="0.62925">
            <text:p>0,62925</text:p>
          </table:table-cell>
          <table:table-cell office:value-type="percentage" office:value="0.92427003">
            <text:p>92,43%</text:p>
          </table:table-cell>
          <table:table-cell office:value-type="percentage" office:value="0.10357001">
            <text:p>10,36%</text:p>
          </table:table-cell>
          <table:table-cell office:value-type="float" office:value="0.714">
            <text:p>0,714</text:p>
          </table:table-cell>
          <table:table-cell table:number-columns-repeated="1013"/>
        </table:table-row>
        <table:table-row table:style-name="ro2">
          <table:table-cell office:value-type="string">
            <text:p>ZBH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0.5299">
            <text:p>90,5299</text:p>
          </table:table-cell>
          <table:table-cell office:value-type="float" office:value="22.463993">
            <text:p>22,463993</text:p>
          </table:table-cell>
          <table:table-cell office:value-type="float" office:value="0.64523">
            <text:p>0,64523</text:p>
          </table:table-cell>
          <table:table-cell office:value-type="percentage" office:value="0.32961">
            <text:p>32,96%</text:p>
          </table:table-cell>
          <table:table-cell office:value-type="percentage" office:value="0.06421">
            <text:p>6,42%</text:p>
          </table:table-cell>
          <table:table-cell office:value-type="float" office:value="0.612">
            <text:p>0,612</text:p>
          </table:table-cell>
          <table:table-cell table:number-columns-repeated="1013"/>
        </table:table-row>
        <table:table-row table:style-name="ro2">
          <table:table-cell office:value-type="string">
            <text:p>WAB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16.205">
            <text:p>216,205</text:p>
          </table:table-cell>
          <table:table-cell office:value-type="float" office:value="31.425144">
            <text:p>31,425144</text:p>
          </table:table-cell>
          <table:table-cell office:value-type="float" office:value="0.51131">
            <text:p>0,51131</text:p>
          </table:table-cell>
          <table:table-cell office:value-type="percentage" office:value="0.21558">
            <text:p>21,56%</text:p>
          </table:table-cell>
          <table:table-cell office:value-type="percentage" office:value="0.11147001">
            <text:p>11,15%</text:p>
          </table:table-cell>
          <table:table-cell office:value-type="float" office:value="0.994">
            <text:p>0,994</text:p>
          </table:table-cell>
          <table:table-cell table:number-columns-repeated="1013"/>
        </table:table-row>
        <table:table-row table:style-name="ro2">
          <table:table-cell office:value-type="string">
            <text:p>WRB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70.88">
            <text:p>70,88</text:p>
          </table:table-cell>
          <table:table-cell office:value-type="float" office:value="14.890755">
            <text:p>14,890755</text:p>
          </table:table-cell>
          <table:table-cell office:value-type="float" office:value="0.31481">
            <text:p>0,31481</text:p>
          </table:table-cell>
          <table:table-cell office:value-type="percentage" office:value="0.17996">
            <text:p>18,00%</text:p>
          </table:table-cell>
          <table:table-cell office:value-type="percentage" office:value="0.20887">
            <text:p>20,89%</text:p>
          </table:table-cell>
          <table:table-cell office:value-type="float" office:value="0.375">
            <text:p>0,375</text:p>
          </table:table-cell>
          <table:table-cell table:number-columns-repeated="1013"/>
        </table:table-row>
        <table:table-row table:style-name="ro2">
          <table:table-cell office:value-type="string">
            <text:p>BKR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45.9">
            <text:p>45,9</text:p>
          </table:table-cell>
          <table:table-cell office:value-type="float" office:value="15.827586">
            <text:p>15,827586</text:p>
          </table:table-cell>
          <table:table-cell office:value-type="float" office:value="0.33042">
            <text:p>0,33042</text:p>
          </table:table-cell>
          <table:table-cell office:value-type="percentage" office:value="0.16954">
            <text:p>16,95%</text:p>
          </table:table-cell>
          <table:table-cell office:value-type="percentage" office:value="0.1689">
            <text:p>16,89%</text:p>
          </table:table-cell>
          <table:table-cell office:value-type="float" office:value="0.892">
            <text:p>0,892</text:p>
          </table:table-cell>
          <table:table-cell table:number-columns-repeated="1013"/>
        </table:table-row>
        <table:table-row table:style-name="ro2">
          <table:table-cell office:value-type="string">
            <text:p>PKG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08.535">
            <text:p>208,535</text:p>
          </table:table-cell>
          <table:table-cell office:value-type="float" office:value="21.064142">
            <text:p>21,064142</text:p>
          </table:table-cell>
          <table:table-cell office:value-type="float" office:value="0.91618">
            <text:p>0,91618</text:p>
          </table:table-cell>
          <table:table-cell office:value-type="percentage" office:value="0.21166">
            <text:p>21,17%</text:p>
          </table:table-cell>
          <table:table-cell office:value-type="percentage" office:value="0.19811001">
            <text:p>19,81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PYPL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59.195">
            <text:p>59,195</text:p>
          </table:table-cell>
          <table:table-cell office:value-type="float" office:value="11.886546">
            <text:p>11,886546</text:p>
          </table:table-cell>
          <table:table-cell office:value-type="float" office:value="0.60239">
            <text:p>0,60239</text:p>
          </table:table-cell>
          <table:table-cell office:value-type="percentage" office:value="0.20142001">
            <text:p>20,14%</text:p>
          </table:table-cell>
          <table:table-cell office:value-type="percentage" office:value="0.24358">
            <text:p>24,36%</text:p>
          </table:table-cell>
          <table:table-cell office:value-type="float" office:value="1.439">
            <text:p>1,439</text:p>
          </table:table-cell>
          <table:table-cell table:number-columns-repeated="1013"/>
        </table:table-row>
        <table:table-row table:style-name="ro2">
          <table:table-cell office:value-type="string">
            <text:p>QCO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73.86">
            <text:p>173,86</text:p>
          </table:table-cell>
          <table:table-cell office:value-type="float" office:value="34.702595">
            <text:p>34,702595</text:p>
          </table:table-cell>
          <table:table-cell office:value-type="float" office:value="0.73767">
            <text:p>0,73767</text:p>
          </table:table-cell>
          <table:table-cell office:value-type="percentage" office:value="0.31605">
            <text:p>31,61%</text:p>
          </table:table-cell>
          <table:table-cell office:value-type="percentage" office:value="0.2334">
            <text:p>23,34%</text:p>
          </table:table-cell>
          <table:table-cell office:value-type="float" office:value="1.214">
            <text:p>1,214</text:p>
          </table:table-cell>
          <table:table-cell table:number-columns-repeated="1013"/>
        </table:table-row>
        <table:table-row table:style-name="ro2">
          <table:table-cell office:value-type="string">
            <text:p>PLD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28.7">
            <text:p>128,7</text:p>
          </table:table-cell>
          <table:table-cell office:value-type="float" office:value="37.41279">
            <text:p>37,41279</text:p>
          </table:table-cell>
          <table:table-cell office:value-type="float" office:value="0.62789">
            <text:p>0,62789</text:p>
          </table:table-cell>
          <table:table-cell office:value-type="percentage" office:value="0.709">
            <text:p>70,90%</text:p>
          </table:table-cell>
          <table:table-cell office:value-type="percentage" office:value="0.05963">
            <text:p>5,96%</text:p>
          </table:table-cell>
          <table:table-cell office:value-type="float" office:value="1.407">
            <text:p>1,407</text:p>
          </table:table-cell>
          <table:table-cell table:number-columns-repeated="1013"/>
        </table:table-row>
        <table:table-row table:style-name="ro2">
          <table:table-cell office:value-type="string">
            <text:p>PH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18.135">
            <text:p>118,135</text:p>
          </table:table-cell>
          <table:table-cell office:value-type="float" office:value="9.1153555">
            <text:p>9,1153555</text:p>
          </table:table-cell>
          <table:table-cell office:value-type="float" office:value="0.16939">
            <text:p>0,16939</text:p>
          </table:table-cell>
          <table:table-cell office:value-type="percentage" office:value="0.19886999">
            <text:p>19,89%</text:p>
          </table:table-cell>
          <table:table-cell office:value-type="percentage" office:value="0.21569">
            <text:p>21,57%</text:p>
          </table:table-cell>
          <table:table-cell office:value-type="float" office:value="1.314">
            <text:p>1,314</text:p>
          </table:table-cell>
          <table:table-cell table:number-columns-repeated="1013"/>
        </table:table-row>
        <table:table-row table:style-name="ro2">
          <table:table-cell office:value-type="string">
            <text:p>BS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95.8">
            <text:p>95,8</text:p>
          </table:table-cell>
          <table:table-cell office:value-type="float" office:value="51.229946">
            <text:p>51,229946</text:p>
          </table:table-cell>
          <table:table-cell office:value-type="float" office:value="0.50973">
            <text:p>0,50973</text:p>
          </table:table-cell>
          <table:table-cell office:value-type="percentage" office:value="0.26208">
            <text:p>26,21%</text:p>
          </table:table-cell>
          <table:table-cell office:value-type="percentage" office:value="0.12488">
            <text:p>12,49%</text:p>
          </table:table-cell>
          <table:table-cell office:value-type="float" office:value="0.674">
            <text:p>0,674</text:p>
          </table:table-cell>
          <table:table-cell table:number-columns-repeated="1013"/>
        </table:table-row>
        <table:table-row table:style-name="ro2">
          <table:table-cell office:value-type="string">
            <text:p>BRO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0.315">
            <text:p>80,315</text:p>
          </table:table-cell>
          <table:table-cell office:value-type="float" office:value="24.33788">
            <text:p>24,33788</text:p>
          </table:table-cell>
          <table:table-cell office:value-type="float" office:value="0.64746">
            <text:p>0,64746</text:p>
          </table:table-cell>
          <table:table-cell office:value-type="percentage" office:value="0.34673">
            <text:p>34,67%</text:p>
          </table:table-cell>
          <table:table-cell office:value-type="percentage" office:value="0.10695">
            <text:p>10,70%</text:p>
          </table:table-cell>
          <table:table-cell office:value-type="float" office:value="0.815">
            <text:p>0,815</text:p>
          </table:table-cell>
          <table:table-cell table:number-columns-repeated="1013"/>
        </table:table-row>
        <table:table-row table:style-name="ro2">
          <table:table-cell office:value-type="string">
            <text:p>CP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10.49">
            <text:p>110,49</text:p>
          </table:table-cell>
          <table:table-cell office:value-type="float" office:value="44.73279">
            <text:p>44,73279</text:p>
          </table:table-cell>
          <table:table-cell office:value-type="float" office:value="0.81136">
            <text:p>0,81136</text:p>
          </table:table-cell>
          <table:table-cell office:value-type="percentage" office:value="0.56562">
            <text:p>56,56%</text:p>
          </table:table-cell>
          <table:table-cell office:value-type="percentage" office:value="0.059310004">
            <text:p>5,93%</text:p>
          </table:table-cell>
          <table:table-cell office:value-type="float" office:value="0.825">
            <text:p>0,825</text:p>
          </table:table-cell>
          <table:table-cell table:number-columns-repeated="1013"/>
        </table:table-row>
        <table:table-row table:style-name="ro2">
          <table:table-cell office:value-type="string">
            <text:p>BF-B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6.245">
            <text:p>26,245</text:p>
          </table:table-cell>
          <table:table-cell office:value-type="float" office:value="15.347954">
            <text:p>15,347954</text:p>
          </table:table-cell>
          <table:table-cell office:value-type="float" office:value="0.6403">
            <text:p>0,6403</text:p>
          </table:table-cell>
          <table:table-cell office:value-type="percentage" office:value="0.30188">
            <text:p>30,19%</text:p>
          </table:table-cell>
          <table:table-cell office:value-type="percentage" office:value="0.20666">
            <text:p>20,67%</text:p>
          </table:table-cell>
          <table:table-cell office:value-type="float" office:value="0.403">
            <text:p>0,403</text:p>
          </table:table-cell>
          <table:table-cell table:number-columns-repeated="1013"/>
        </table:table-row>
        <table:table-row table:style-name="ro2">
          <table:table-cell office:value-type="string">
            <text:p>REG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69.615">
            <text:p>69,615</text:p>
          </table:table-cell>
          <table:table-cell office:value-type="float" office:value="31.933485">
            <text:p>31,933485</text:p>
          </table:table-cell>
          <table:table-cell office:value-type="float" office:value="0.73101">
            <text:p>0,73101</text:p>
          </table:table-cell>
          <table:table-cell office:value-type="percentage" office:value="0.63123">
            <text:p>63,12%</text:p>
          </table:table-cell>
          <table:table-cell office:value-type="percentage" office:value="0.0602">
            <text:p>6,02%</text:p>
          </table:table-cell>
          <table:table-cell office:value-type="float" office:value="0.94">
            <text:p>0,94</text:p>
          </table:table-cell>
          <table:table-cell table:number-columns-repeated="1013"/>
        </table:table-row>
        <table:table-row table:style-name="ro2">
          <table:table-cell office:value-type="string">
            <text:p>AVB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84.34">
            <text:p>184,34</text:p>
          </table:table-cell>
          <table:table-cell office:value-type="float" office:value="22.480488">
            <text:p>22,480488</text:p>
          </table:table-cell>
          <table:table-cell office:value-type="float" office:value="0.73165">
            <text:p>0,73165</text:p>
          </table:table-cell>
          <table:table-cell office:value-type="percentage" office:value="0.60965">
            <text:p>60,97%</text:p>
          </table:table-cell>
          <table:table-cell office:value-type="percentage" office:value="0.09754">
            <text:p>9,75%</text:p>
          </table:table-cell>
          <table:table-cell office:value-type="float" office:value="0.743">
            <text:p>0,743</text:p>
          </table:table-cell>
          <table:table-cell table:number-columns-repeated="1013"/>
        </table:table-row>
        <table:table-row table:style-name="ro2">
          <table:table-cell office:value-type="string">
            <text:p>SR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89.0064">
            <text:p>89,0064</text:p>
          </table:table-cell>
          <table:table-cell office:value-type="float" office:value="27.386585">
            <text:p>27,386585</text:p>
          </table:table-cell>
          <table:table-cell office:value-type="float" office:value="0.81287">
            <text:p>0,81287</text:p>
          </table:table-cell>
          <table:table-cell office:value-type="percentage" office:value="0.40427">
            <text:p>40,43%</text:p>
          </table:table-cell>
          <table:table-cell office:value-type="percentage" office:value="0.0677">
            <text:p>6,77%</text:p>
          </table:table-cell>
          <table:table-cell office:value-type="float" office:value="0.733">
            <text:p>0,733</text:p>
          </table:table-cell>
          <table:table-cell table:number-columns-repeated="1013"/>
        </table:table-row>
        <table:table-row table:style-name="ro2">
          <table:table-cell office:value-type="string">
            <text:p>NOW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54.25">
            <text:p>154,25</text:p>
          </table:table-cell>
          <table:table-cell office:value-type="float" office:value="93.48485">
            <text:p>93,48485</text:p>
          </table:table-cell>
          <table:table-cell office:value-type="float" office:value="0.21255">
            <text:p>0,21255</text:p>
          </table:table-cell>
          <table:table-cell office:value-type="percentage" office:value="0.19721001">
            <text:p>19,72%</text:p>
          </table:table-cell>
          <table:table-cell office:value-type="percentage" office:value="0.16813">
            <text:p>16,81%</text:p>
          </table:table-cell>
          <table:table-cell office:value-type="float" office:value="0.972">
            <text:p>0,972</text:p>
          </table:table-cell>
          <table:table-cell table:number-columns-repeated="1013"/>
        </table:table-row>
        <table:table-row table:style-name="ro2">
          <table:table-cell office:value-type="string">
            <text:p>TMO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582.01">
            <text:p>582,01</text:p>
          </table:table-cell>
          <table:table-cell office:value-type="float" office:value="33.60335">
            <text:p>33,60335</text:p>
          </table:table-cell>
          <table:table-cell office:value-type="float" office:value="0.6975">
            <text:p>0,6975</text:p>
          </table:table-cell>
          <table:table-cell office:value-type="percentage" office:value="0.24774">
            <text:p>24,77%</text:p>
          </table:table-cell>
          <table:table-cell office:value-type="percentage" office:value="0.13116999">
            <text:p>13,12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SYK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53.69">
            <text:p>353,69</text:p>
          </table:table-cell>
          <table:table-cell office:value-type="float" office:value="46.477005">
            <text:p>46,477005</text:p>
          </table:table-cell>
          <table:table-cell office:value-type="float" office:value="0.78646">
            <text:p>0,78646</text:p>
          </table:table-cell>
          <table:table-cell office:value-type="percentage" office:value="0.27037">
            <text:p>27,04%</text:p>
          </table:table-cell>
          <table:table-cell office:value-type="percentage" office:value="0.14036">
            <text:p>14,04%</text:p>
          </table:table-cell>
          <table:table-cell office:value-type="float" office:value="0.895">
            <text:p>0,895</text:p>
          </table:table-cell>
          <table:table-cell table:number-columns-repeated="1013"/>
        </table:table-row>
        <table:table-row table:style-name="ro2">
          <table:table-cell office:value-type="string">
            <text:p>ROL</text:p>
          </table:table-cell>
          <table:table-cell office:value-type="string">
            <text:p>Consumer Cyclical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0.525">
            <text:p>60,525</text:p>
          </table:table-cell>
          <table:table-cell office:value-type="float" office:value="56.56542">
            <text:p>56,56542</text:p>
          </table:table-cell>
          <table:table-cell office:value-type="float" office:value="0.59534">
            <text:p>0,59534</text:p>
          </table:table-cell>
          <table:table-cell office:value-type="percentage" office:value="0.22893">
            <text:p>22,89%</text:p>
          </table:table-cell>
          <table:table-cell office:value-type="percentage" office:value="0.36208">
            <text:p>36,21%</text:p>
          </table:table-cell>
          <table:table-cell office:value-type="float" office:value="0.785">
            <text:p>0,785</text:p>
          </table:table-cell>
          <table:table-cell table:number-columns-repeated="1013"/>
        </table:table-row>
        <table:table-row table:style-name="ro2">
          <table:table-cell office:value-type="string">
            <text:p>ROK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94.6475">
            <text:p>394,6475</text:p>
          </table:table-cell>
          <table:table-cell office:value-type="float" office:value="51.587906">
            <text:p>51,587906</text:p>
          </table:table-cell>
          <table:table-cell office:value-type="float" office:value="0.98275">
            <text:p>0,98275</text:p>
          </table:table-cell>
          <table:table-cell office:value-type="percentage" office:value="0.20809999">
            <text:p>20,81%</text:p>
          </table:table-cell>
          <table:table-cell office:value-type="percentage" office:value="0.20282">
            <text:p>20,28%</text:p>
          </table:table-cell>
          <table:table-cell office:value-type="float" office:value="1.499">
            <text:p>1,499</text:p>
          </table:table-cell>
          <table:table-cell table:number-columns-repeated="1013"/>
        </table:table-row>
        <table:table-row table:style-name="ro2">
          <table:table-cell office:value-type="string">
            <text:p>TX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75.63">
            <text:p>175,63</text:p>
          </table:table-cell>
          <table:table-cell office:value-type="float" office:value="32.04927">
            <text:p>32,04927</text:p>
          </table:table-cell>
          <table:table-cell office:value-type="float" office:value="0.84477">
            <text:p>0,84477</text:p>
          </table:table-cell>
          <table:table-cell office:value-type="percentage" office:value="0.45262">
            <text:p>45,26%</text:p>
          </table:table-cell>
          <table:table-cell office:value-type="percentage" office:value="0.29757">
            <text:p>29,76%</text:p>
          </table:table-cell>
          <table:table-cell office:value-type="float" office:value="0.989">
            <text:p>0,989</text:p>
          </table:table-cell>
          <table:table-cell table:number-columns-repeated="1013"/>
        </table:table-row>
        <table:table-row table:style-name="ro2">
          <table:table-cell office:value-type="string">
            <text:p>TE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30.93">
            <text:p>230,93</text:p>
          </table:table-cell>
          <table:table-cell office:value-type="float" office:value="37.427876">
            <text:p>37,427876</text:p>
          </table:table-cell>
          <table:table-cell office:value-type="float" office:value="0.50102">
            <text:p>0,50102</text:p>
          </table:table-cell>
          <table:table-cell office:value-type="percentage" office:value="0.24365999">
            <text:p>24,37%</text:p>
          </table:table-cell>
          <table:table-cell office:value-type="percentage" office:value="0.14618">
            <text:p>14,62%</text:p>
          </table:table-cell>
          <table:table-cell office:value-type="float" office:value="1.246">
            <text:p>1,246</text:p>
          </table:table-cell>
          <table:table-cell table:number-columns-repeated="1013"/>
        </table:table-row>
        <table:table-row table:style-name="ro2">
          <table:table-cell office:value-type="string">
            <text:p>CHD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84.4136">
            <text:p>84,4136</text:p>
          </table:table-cell>
          <table:table-cell office:value-type="float" office:value="26.628895">
            <text:p>26,628895</text:p>
          </table:table-cell>
          <table:table-cell office:value-type="float" office:value="0.56855">
            <text:p>0,56855</text:p>
          </table:table-cell>
          <table:table-cell office:value-type="percentage" office:value="0.21661">
            <text:p>21,66%</text:p>
          </table:table-cell>
          <table:table-cell office:value-type="percentage" office:value="0.18594">
            <text:p>18,59%</text:p>
          </table:table-cell>
          <table:table-cell office:value-type="float" office:value="0.454">
            <text:p>0,454</text:p>
          </table:table-cell>
          <table:table-cell table:number-columns-repeated="1013"/>
        </table:table-row>
        <table:table-row table:style-name="ro2">
          <table:table-cell office:value-type="string">
            <text:p>CTAS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90.795">
            <text:p>190,795</text:p>
          </table:table-cell>
          <table:table-cell office:value-type="float" office:value="41.29762">
            <text:p>41,29762</text:p>
          </table:table-cell>
          <table:table-cell office:value-type="float" office:value="0.72656">
            <text:p>0,72656</text:p>
          </table:table-cell>
          <table:table-cell office:value-type="percentage" office:value="0.26393998">
            <text:p>26,39%</text:p>
          </table:table-cell>
          <table:table-cell office:value-type="percentage" office:value="0.43396">
            <text:p>43,40%</text:p>
          </table:table-cell>
          <table:table-cell office:value-type="float" office:value="0.963">
            <text:p>0,963</text:p>
          </table:table-cell>
          <table:table-cell table:number-columns-repeated="1013"/>
        </table:table-row>
        <table:table-row table:style-name="ro2">
          <table:table-cell office:value-type="string">
            <text:p>CSCO</text:p>
          </table:table-cell>
          <table:table-cell office:value-type="string">
            <text:p>Technolo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77.465">
            <text:p>77,465</text:p>
          </table:table-cell>
          <table:table-cell office:value-type="float" office:value="29.909266">
            <text:p>29,909266</text:p>
          </table:table-cell>
          <table:table-cell office:value-type="float" office:value="0.63228">
            <text:p>0,63228</text:p>
          </table:table-cell>
          <table:table-cell office:value-type="percentage" office:value="0.2717">
            <text:p>27,17%</text:p>
          </table:table-cell>
          <table:table-cell office:value-type="percentage" office:value="0.22418">
            <text:p>22,42%</text:p>
          </table:table-cell>
          <table:table-cell office:value-type="float" office:value="0.864">
            <text:p>0,864</text:p>
          </table:table-cell>
          <table:table-cell table:number-columns-repeated="1013"/>
        </table:table-row>
        <table:table-row table:style-name="ro2">
          <table:table-cell office:value-type="string">
            <text:p>MDT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6.585">
            <text:p>96,585</text:p>
          </table:table-cell>
          <table:table-cell office:value-type="float" office:value="26.174795">
            <text:p>26,174795</text:p>
          </table:table-cell>
          <table:table-cell office:value-type="float" office:value="0.59563">
            <text:p>0,59563</text:p>
          </table:table-cell>
          <table:table-cell office:value-type="percentage" office:value="0.27542">
            <text:p>27,54%</text:p>
          </table:table-cell>
          <table:table-cell office:value-type="percentage" office:value="0.09822">
            <text:p>9,82%</text:p>
          </table:table-cell>
          <table:table-cell office:value-type="float" office:value="0.723">
            <text:p>0,723</text:p>
          </table:table-cell>
          <table:table-cell table:number-columns-repeated="1013"/>
        </table:table-row>
        <table:table-row table:style-name="ro2">
          <table:table-cell office:value-type="string">
            <text:p>MRK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06.325">
            <text:p>106,325</text:p>
          </table:table-cell>
          <table:table-cell office:value-type="float" office:value="14.064153">
            <text:p>14,064153</text:p>
          </table:table-cell>
          <table:table-cell office:value-type="float" office:value="0.79708">
            <text:p>0,79708</text:p>
          </table:table-cell>
          <table:table-cell office:value-type="percentage" office:value="0.49074">
            <text:p>49,07%</text:p>
          </table:table-cell>
          <table:table-cell office:value-type="percentage" office:value="0.39485002">
            <text:p>39,49%</text:p>
          </table:table-cell>
          <table:table-cell office:value-type="float" office:value="0.299">
            <text:p>0,299</text:p>
          </table:table-cell>
          <table:table-cell table:number-columns-repeated="1013"/>
        </table:table-row>
        <table:table-row table:style-name="ro2">
          <table:table-cell office:value-type="string">
            <text:p>MOS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4.3061">
            <text:p>24,3061</text:p>
          </table:table-cell>
          <table:table-cell office:value-type="float" office:value="6.2969174">
            <text:p>6,2969174</text:p>
          </table:table-cell>
          <table:table-cell office:value-type="float" office:value="0.37134">
            <text:p>0,37134</text:p>
          </table:table-cell>
          <table:table-cell office:value-type="percentage" office:value="0.19229001">
            <text:p>19,23%</text:p>
          </table:table-cell>
          <table:table-cell office:value-type="percentage" office:value="0.101169996">
            <text:p>10,12%</text:p>
          </table:table-cell>
          <table:table-cell office:value-type="float" office:value="0.948">
            <text:p>0,948</text:p>
          </table:table-cell>
          <table:table-cell table:number-columns-repeated="1013"/>
        </table:table-row>
        <table:table-row table:style-name="ro2">
          <table:table-cell office:value-type="string">
            <text:p>MAA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39.644">
            <text:p>139,644</text:p>
          </table:table-cell>
          <table:table-cell office:value-type="float" office:value="29.585594">
            <text:p>29,585594</text:p>
          </table:table-cell>
          <table:table-cell office:value-type="float" office:value="0.87122">
            <text:p>0,87122</text:p>
          </table:table-cell>
          <table:table-cell office:value-type="percentage" office:value="0.56196">
            <text:p>56,20%</text:p>
          </table:table-cell>
          <table:table-cell office:value-type="percentage" office:value="0.09408">
            <text:p>9,41%</text:p>
          </table:table-cell>
          <table:table-cell office:value-type="float" office:value="0.77">
            <text:p>0,77</text:p>
          </table:table-cell>
          <table:table-cell table:number-columns-repeated="1013"/>
        </table:table-row>
        <table:table-row table:style-name="ro2">
          <table:table-cell office:value-type="string">
            <text:p>MPW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28.315">
            <text:p>928,315</text:p>
          </table:table-cell>
          <table:table-cell office:value-type="float" office:value="23.821272">
            <text:p>23,821272</text:p>
          </table:table-cell>
          <table:table-cell office:value-type="float" office:value="0.528">
            <text:p>0,528</text:p>
          </table:table-cell>
          <table:table-cell office:value-type="percentage" office:value="0.27820998">
            <text:p>27,82%</text:p>
          </table:table-cell>
          <table:table-cell office:value-type="percentage" office:value="0.64029">
            <text:p>64,03%</text:p>
          </table:table-cell>
          <table:table-cell office:value-type="float" office:value="1.472">
            <text:p>1,472</text:p>
          </table:table-cell>
          <table:table-cell table:number-columns-repeated="1013"/>
        </table:table-row>
        <table:table-row table:style-name="ro2">
          <table:table-cell office:value-type="string">
            <text:p>NDAQ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98.415">
            <text:p>98,415</text:p>
          </table:table-cell>
          <table:table-cell office:value-type="float" office:value="35.148216">
            <text:p>35,148216</text:p>
          </table:table-cell>
          <table:table-cell office:value-type="float" office:value="0.79867">
            <text:p>0,79867</text:p>
          </table:table-cell>
          <table:table-cell office:value-type="percentage" office:value="0.36813998">
            <text:p>36,81%</text:p>
          </table:table-cell>
          <table:table-cell office:value-type="percentage" office:value="0.14054">
            <text:p>14,05%</text:p>
          </table:table-cell>
          <table:table-cell office:value-type="float" office:value="1.025">
            <text:p>1,025</text:p>
          </table:table-cell>
          <table:table-cell table:number-columns-repeated="1013"/>
        </table:table-row>
        <table:table-row table:style-name="ro2">
          <table:table-cell office:value-type="string">
            <text:p>NFLX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93.725">
            <text:p>93,725</text:p>
          </table:table-cell>
          <table:table-cell office:value-type="float" office:value="39.215477">
            <text:p>39,215477</text:p>
          </table:table-cell>
          <table:table-cell office:value-type="float" office:value="0.65822">
            <text:p>0,65822</text:p>
          </table:table-cell>
          <table:table-cell office:value-type="percentage" office:value="0.29899">
            <text:p>29,90%</text:p>
          </table:table-cell>
          <table:table-cell office:value-type="percentage" office:value="0.42861">
            <text:p>42,86%</text:p>
          </table:table-cell>
          <table:table-cell office:value-type="float" office:value="1.706">
            <text:p>1,706</text:p>
          </table:table-cell>
          <table:table-cell table:number-columns-repeated="1013"/>
        </table:table-row>
        <table:table-row table:style-name="ro2">
          <table:table-cell office:value-type="string">
            <text:p>MNST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77.7">
            <text:p>77,7</text:p>
          </table:table-cell>
          <table:table-cell office:value-type="float" office:value="44.147724">
            <text:p>44,147724</text:p>
          </table:table-cell>
          <table:table-cell office:value-type="float" office:value="0.779">
            <text:p>0,779</text:p>
          </table:table-cell>
          <table:table-cell office:value-type="percentage" office:value="0.31192">
            <text:p>31,19%</text:p>
          </table:table-cell>
          <table:table-cell office:value-type="percentage" office:value="0.25538">
            <text:p>25,54%</text:p>
          </table:table-cell>
          <table:table-cell office:value-type="float" office:value="0.477">
            <text:p>0,477</text:p>
          </table:table-cell>
          <table:table-cell table:number-columns-repeated="1013"/>
        </table:table-row>
        <table:table-row table:style-name="ro2">
          <table:table-cell office:value-type="string">
            <text:p>OXY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41.369">
            <text:p>41,369</text:p>
          </table:table-cell>
          <table:table-cell office:value-type="float" office:value="30.41838">
            <text:p>30,41838</text:p>
          </table:table-cell>
          <table:table-cell office:value-type="float" office:value="0.62221">
            <text:p>0,62221</text:p>
          </table:table-cell>
          <table:table-cell office:value-type="percentage" office:value="0.47716">
            <text:p>47,72%</text:p>
          </table:table-cell>
          <table:table-cell office:value-type="percentage" office:value="0.05955">
            <text:p>5,96%</text:p>
          </table:table-cell>
          <table:table-cell office:value-type="float" office:value="0.392">
            <text:p>0,392</text:p>
          </table:table-cell>
          <table:table-cell table:number-columns-repeated="1013"/>
        </table:table-row>
        <table:table-row table:style-name="ro2">
          <table:table-cell office:value-type="string">
            <text:p>NVR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327.31">
            <text:p>7327,31</text:p>
          </table:table-cell>
          <table:table-cell office:value-type="float" office:value="16.119566">
            <text:p>16,119566</text:p>
          </table:table-cell>
          <table:table-cell office:value-type="float" office:value="0.27023">
            <text:p>0,27023</text:p>
          </table:table-cell>
          <table:table-cell office:value-type="percentage" office:value="0.18104">
            <text:p>18,10%</text:p>
          </table:table-cell>
          <table:table-cell office:value-type="percentage" office:value="0.348">
            <text:p>34,80%</text:p>
          </table:table-cell>
          <table:table-cell office:value-type="float" office:value="1.005">
            <text:p>1,005</text:p>
          </table:table-cell>
          <table:table-cell table:number-columns-repeated="1013"/>
        </table:table-row>
        <table:table-row table:style-name="ro2">
          <table:table-cell office:value-type="string">
            <text:p>NDS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43.11">
            <text:p>243,11</text:p>
          </table:table-cell>
          <table:table-cell office:value-type="float" office:value="28.567566">
            <text:p>28,567566</text:p>
          </table:table-cell>
          <table:table-cell office:value-type="float" office:value="0.68747">
            <text:p>0,68747</text:p>
          </table:table-cell>
          <table:table-cell office:value-type="percentage" office:value="0.31666002">
            <text:p>31,67%</text:p>
          </table:table-cell>
          <table:table-cell office:value-type="percentage" office:value="0.16215">
            <text:p>16,22%</text:p>
          </table:table-cell>
          <table:table-cell office:value-type="float" office:value="1.017">
            <text:p>1,017</text:p>
          </table:table-cell>
          <table:table-cell table:number-columns-repeated="1013"/>
        </table:table-row>
        <table:table-row table:style-name="ro2">
          <table:table-cell office:value-type="string">
            <text:p>NWS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0.02">
            <text:p>30,02</text:p>
          </table:table-cell>
          <table:table-cell office:value-type="float" office:value="36.168674">
            <text:p>36,168674</text:p>
          </table:table-cell>
          <table:table-cell office:value-type="float" office:value="0.31439">
            <text:p>0,31439</text:p>
          </table:table-cell>
          <table:table-cell office:value-type="percentage" office:value="0.13506">
            <text:p>13,51%</text:p>
          </table:table-cell>
          <table:table-cell office:value-type="percentage" office:value="0.070250005">
            <text:p>7,03%</text:p>
          </table:table-cell>
          <table:table-cell office:value-type="float" office:value="0.973">
            <text:p>0,973</text:p>
          </table:table-cell>
          <table:table-cell table:number-columns-repeated="1013"/>
        </table:table-row>
        <table:table-row table:style-name="ro2">
          <table:table-cell office:value-type="string">
            <text:p>NWS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6.405">
            <text:p>26,405</text:p>
          </table:table-cell>
          <table:table-cell office:value-type="float" office:value="31.813255">
            <text:p>31,813255</text:p>
          </table:table-cell>
          <table:table-cell office:value-type="float" office:value="0.31439">
            <text:p>0,31439</text:p>
          </table:table-cell>
          <table:table-cell office:value-type="percentage" office:value="0.13506">
            <text:p>13,51%</text:p>
          </table:table-cell>
          <table:table-cell office:value-type="percentage" office:value="0.070250005">
            <text:p>7,03%</text:p>
          </table:table-cell>
          <table:table-cell office:value-type="float" office:value="0.973">
            <text:p>0,973</text:p>
          </table:table-cell>
          <table:table-cell table:number-columns-repeated="1013"/>
        </table:table-row>
        <table:table-row table:style-name="ro2">
          <table:table-cell office:value-type="string">
            <text:p>PG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43.9904">
            <text:p>143,9904</text:p>
          </table:table-cell>
          <table:table-cell office:value-type="float" office:value="21.020496">
            <text:p>21,020496</text:p>
          </table:table-cell>
          <table:table-cell office:value-type="float" office:value="0.67125">
            <text:p>0,67125</text:p>
          </table:table-cell>
          <table:table-cell office:value-type="percentage" office:value="0.29108">
            <text:p>29,11%</text:p>
          </table:table-cell>
          <table:table-cell office:value-type="percentage" office:value="0.31902">
            <text:p>31,90%</text:p>
          </table:table-cell>
          <table:table-cell office:value-type="float" office:value="0.382">
            <text:p>0,382</text:p>
          </table:table-cell>
          <table:table-cell table:number-columns-repeated="1013"/>
        </table:table-row>
        <table:table-row table:style-name="ro2">
          <table:table-cell office:value-type="string">
            <text:p>PF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9.1868">
            <text:p>89,1868</text:p>
          </table:table-cell>
          <table:table-cell office:value-type="float" office:value="13.077243">
            <text:p>13,077243</text:p>
          </table:table-cell>
          <table:table-cell office:value-type="float" office:value="0.34137">
            <text:p>0,34137</text:p>
          </table:table-cell>
          <table:table-cell office:value-type="percentage" office:value="0.13768">
            <text:p>13,77%</text:p>
          </table:table-cell>
          <table:table-cell office:value-type="percentage" office:value="0.13767">
            <text:p>13,77%</text:p>
          </table:table-cell>
          <table:table-cell office:value-type="float" office:value="0.894">
            <text:p>0,894</text:p>
          </table:table-cell>
          <table:table-cell table:number-columns-repeated="1013"/>
        </table:table-row>
        <table:table-row table:style-name="ro2">
          <table:table-cell office:value-type="string">
            <text:p>PGR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28.755">
            <text:p>228,755</text:p>
          </table:table-cell>
          <table:table-cell office:value-type="float" office:value="12.562055">
            <text:p>12,562055</text:p>
          </table:table-cell>
          <table:table-cell office:value-type="float" office:value="0.19455">
            <text:p>0,19455</text:p>
          </table:table-cell>
          <table:table-cell office:value-type="percentage" office:value="0.16548">
            <text:p>16,55%</text:p>
          </table:table-cell>
          <table:table-cell office:value-type="percentage" office:value="0.34223998">
            <text:p>34,22%</text:p>
          </table:table-cell>
          <table:table-cell office:value-type="float" office:value="0.365">
            <text:p>0,365</text:p>
          </table:table-cell>
          <table:table-cell table:number-columns-repeated="1013"/>
        </table:table-row>
        <table:table-row table:style-name="ro2">
          <table:table-cell office:value-type="string">
            <text:p>PFE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5.025">
            <text:p>25,025</text:p>
          </table:table-cell>
          <table:table-cell office:value-type="float" office:value="14.549418">
            <text:p>14,549418</text:p>
          </table:table-cell>
          <table:table-cell office:value-type="float" office:value="0.66531">
            <text:p>0,66531</text:p>
          </table:table-cell>
          <table:table-cell office:value-type="percentage" office:value="0.38957">
            <text:p>38,96%</text:p>
          </table:table-cell>
          <table:table-cell office:value-type="percentage" office:value="0.105979994">
            <text:p>10,60%</text:p>
          </table:table-cell>
          <table:table-cell office:value-type="float" office:value="0.42">
            <text:p>0,42</text:p>
          </table:table-cell>
          <table:table-cell table:number-columns-repeated="1013"/>
        </table:table-row>
        <table:table-row table:style-name="ro2">
          <table:table-cell office:value-type="string">
            <text:p>PH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89.07">
            <text:p>889,07</text:p>
          </table:table-cell>
          <table:table-cell office:value-type="float" office:value="31.695902">
            <text:p>31,695902</text:p>
          </table:table-cell>
          <table:table-cell office:value-type="float" office:value="0.74953">
            <text:p>0,74953</text:p>
          </table:table-cell>
          <table:table-cell office:value-type="percentage" office:value="0.25996">
            <text:p>26,00%</text:p>
          </table:table-cell>
          <table:table-cell office:value-type="percentage" office:value="0.27294">
            <text:p>27,29%</text:p>
          </table:table-cell>
          <table:table-cell office:value-type="float" office:value="1.246">
            <text:p>1,246</text:p>
          </table:table-cell>
          <table:table-cell table:number-columns-repeated="1013"/>
        </table:table-row>
        <table:table-row table:style-name="ro2">
          <table:table-cell office:value-type="string">
            <text:p>ICE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63.71">
            <text:p>163,71</text:p>
          </table:table-cell>
          <table:table-cell office:value-type="float" office:value="29.819675">
            <text:p>29,819675</text:p>
          </table:table-cell>
          <table:table-cell office:value-type="float" office:value="0.67954">
            <text:p>0,67954</text:p>
          </table:table-cell>
          <table:table-cell office:value-type="percentage" office:value="0.62267">
            <text:p>62,27%</text:p>
          </table:table-cell>
          <table:table-cell office:value-type="percentage" office:value="0.114930004">
            <text:p>11,49%</text:p>
          </table:table-cell>
          <table:table-cell office:value-type="float" office:value="1.052">
            <text:p>1,052</text:p>
          </table:table-cell>
          <table:table-cell table:number-columns-repeated="1013"/>
        </table:table-row>
        <table:table-row table:style-name="ro2">
          <table:table-cell office:value-type="string">
            <text:p>PODD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86.59">
            <text:p>286,59</text:p>
          </table:table-cell>
          <table:table-cell office:value-type="float" office:value="83.79824">
            <text:p>83,79824</text:p>
          </table:table-cell>
          <table:table-cell office:value-type="float" office:value="0.77711">
            <text:p>0,77711</text:p>
          </table:table-cell>
          <table:table-cell office:value-type="percentage" office:value="0.20259">
            <text:p>20,26%</text:p>
          </table:table-cell>
          <table:table-cell office:value-type="percentage" office:value="0.19679001">
            <text:p>19,68%</text:p>
          </table:table-cell>
          <table:table-cell office:value-type="float" office:value="1.375">
            <text:p>1,375</text:p>
          </table:table-cell>
          <table:table-cell table:number-columns-repeated="1013"/>
        </table:table-row>
        <table:table-row table:style-name="ro2">
          <table:table-cell office:value-type="string">
            <text:p>INVH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27.905">
            <text:p>27,905</text:p>
          </table:table-cell>
          <table:table-cell office:value-type="float" office:value="29.373686">
            <text:p>29,373686</text:p>
          </table:table-cell>
          <table:table-cell office:value-type="float" office:value="0.85691">
            <text:p>0,85691</text:p>
          </table:table-cell>
          <table:table-cell office:value-type="percentage" office:value="0.54978">
            <text:p>54,98%</text:p>
          </table:table-cell>
          <table:table-cell office:value-type="percentage" office:value="0.06">
            <text:p>6,00%</text:p>
          </table:table-cell>
          <table:table-cell office:value-type="float" office:value="0.834">
            <text:p>0,834</text:p>
          </table:table-cell>
          <table:table-cell table:number-columns-repeated="1013"/>
        </table:table-row>
        <table:table-row table:style-name="ro2">
          <table:table-cell office:value-type="string">
            <text:p>CE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356.4">
            <text:p>356,4</text:p>
          </table:table-cell>
          <table:table-cell office:value-type="float" office:value="40.778034">
            <text:p>40,778034</text:p>
          </table:table-cell>
          <table:table-cell office:value-type="float" office:value="0.6151">
            <text:p>0,6151</text:p>
          </table:table-cell>
          <table:table-cell office:value-type="percentage" office:value="0.23944001">
            <text:p>23,94%</text:p>
          </table:table-cell>
          <table:table-cell office:value-type="percentage" office:value="0.19839">
            <text:p>19,84%</text:p>
          </table:table-cell>
          <table:table-cell office:value-type="float" office:value="1.138">
            <text:p>1,138</text:p>
          </table:table-cell>
          <table:table-cell table:number-columns-repeated="1013"/>
        </table:table-row>
        <table:table-row table:style-name="ro2">
          <table:table-cell office:value-type="string">
            <text:p>GLW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88.93">
            <text:p>88,93</text:p>
          </table:table-cell>
          <table:table-cell office:value-type="float" office:value="57.006413">
            <text:p>57,006413</text:p>
          </table:table-cell>
          <table:table-cell office:value-type="float" office:value="0.7651">
            <text:p>0,7651</text:p>
          </table:table-cell>
          <table:table-cell office:value-type="percentage" office:value="0.22742">
            <text:p>22,74%</text:p>
          </table:table-cell>
          <table:table-cell office:value-type="percentage" office:value="0.12739">
            <text:p>12,74%</text:p>
          </table:table-cell>
          <table:table-cell office:value-type="float" office:value="1.109">
            <text:p>1,109</text:p>
          </table:table-cell>
          <table:table-cell table:number-columns-repeated="1013"/>
        </table:table-row>
        <table:table-row table:style-name="ro2">
          <table:table-cell office:value-type="string">
            <text:p>JNJ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07.19">
            <text:p>207,19</text:p>
          </table:table-cell>
          <table:table-cell office:value-type="float" office:value="19.999035">
            <text:p>19,999035</text:p>
          </table:table-cell>
          <table:table-cell office:value-type="float" office:value="0.57766">
            <text:p>0,57766</text:p>
          </table:table-cell>
          <table:table-cell office:value-type="percentage" office:value="0.34642">
            <text:p>34,64%</text:p>
          </table:table-cell>
          <table:table-cell office:value-type="percentage" office:value="0.33619">
            <text:p>33,62%</text:p>
          </table:table-cell>
          <table:table-cell office:value-type="float" office:value="0.349">
            <text:p>0,349</text:p>
          </table:table-cell>
          <table:table-cell table:number-columns-repeated="1013"/>
        </table:table-row>
        <table:table-row table:style-name="ro2">
          <table:table-cell office:value-type="string">
            <text:p>KVUE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7.31">
            <text:p>17,31</text:p>
          </table:table-cell>
          <table:table-cell office:value-type="float" office:value="23.08">
            <text:p>23,08</text:p>
          </table:table-cell>
          <table:table-cell office:value-type="float" office:value="0.85659">
            <text:p>0,85659</text:p>
          </table:table-cell>
          <table:table-cell office:value-type="percentage" office:value="0.23597">
            <text:p>23,60%</text:p>
          </table:table-cell>
          <table:table-cell office:value-type="percentage" office:value="0.13469">
            <text:p>13,47%</text:p>
          </table:table-cell>
          <table:table-cell office:value-type="float" office:value="0.558">
            <text:p>0,558</text:p>
          </table:table-cell>
          <table:table-cell table:number-columns-repeated="1013"/>
        </table:table-row>
        <table:table-row table:style-name="ro2">
          <table:table-cell office:value-type="string">
            <text:p>LIN</text:p>
          </table:table-cell>
          <table:table-cell office:value-type="string">
            <text:p>Basic Mate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428.175">
            <text:p>428,175</text:p>
          </table:table-cell>
          <table:table-cell office:value-type="float" office:value="28.678833">
            <text:p>28,678833</text:p>
          </table:table-cell>
          <table:table-cell office:value-type="float" office:value="0.64673">
            <text:p>0,64673</text:p>
          </table:table-cell>
          <table:table-cell office:value-type="percentage" office:value="0.39249">
            <text:p>39,25%</text:p>
          </table:table-cell>
          <table:table-cell office:value-type="percentage" office:value="0.17979999">
            <text:p>17,98%</text:p>
          </table:table-cell>
          <table:table-cell office:value-type="float" office:value="0.858">
            <text:p>0,858</text:p>
          </table:table-cell>
          <table:table-cell table:number-columns-repeated="1013"/>
        </table:table-row>
        <table:table-row table:style-name="ro2">
          <table:table-cell office:value-type="string">
            <text:p>KDP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8.185">
            <text:p>28,185</text:p>
          </table:table-cell>
          <table:table-cell office:value-type="float" office:value="24.297415">
            <text:p>24,297415</text:p>
          </table:table-cell>
          <table:table-cell office:value-type="float" office:value="0.73567">
            <text:p>0,73567</text:p>
          </table:table-cell>
          <table:table-cell office:value-type="percentage" office:value="0.2658">
            <text:p>26,58%</text:p>
          </table:table-cell>
          <table:table-cell office:value-type="percentage" office:value="0.06291">
            <text:p>6,29%</text:p>
          </table:table-cell>
          <table:table-cell office:value-type="float" office:value="0.359">
            <text:p>0,359</text:p>
          </table:table-cell>
          <table:table-cell table:number-columns-repeated="1013"/>
        </table:table-row>
        <table:table-row table:style-name="ro2">
          <table:table-cell office:value-type="string">
            <text:p>MLM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34.08">
            <text:p>634,08</text:p>
          </table:table-cell>
          <table:table-cell office:value-type="float" office:value="32.617283">
            <text:p>32,617283</text:p>
          </table:table-cell>
          <table:table-cell office:value-type="float" office:value="0.60618">
            <text:p>0,60618</text:p>
          </table:table-cell>
          <table:table-cell office:value-type="percentage" office:value="0.33695">
            <text:p>33,70%</text:p>
          </table:table-cell>
          <table:table-cell office:value-type="percentage" office:value="0.12523">
            <text:p>12,52%</text:p>
          </table:table-cell>
          <table:table-cell office:value-type="float" office:value="1.16">
            <text:p>1,16</text:p>
          </table:table-cell>
          <table:table-cell table:number-columns-repeated="1013"/>
        </table:table-row>
        <table:table-row table:style-name="ro2">
          <table:table-cell office:value-type="string">
            <text:p>KIM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20.365">
            <text:p>20,365</text:p>
          </table:table-cell>
          <table:table-cell office:value-type="float" office:value="24.536144">
            <text:p>24,536144</text:p>
          </table:table-cell>
          <table:table-cell office:value-type="float" office:value="0.78195">
            <text:p>0,78195</text:p>
          </table:table-cell>
          <table:table-cell office:value-type="percentage" office:value="0.61215">
            <text:p>61,22%</text:p>
          </table:table-cell>
          <table:table-cell office:value-type="percentage" office:value="0.056700002">
            <text:p>5,67%</text:p>
          </table:table-cell>
          <table:table-cell office:value-type="float" office:value="1.064">
            <text:p>1,064</text:p>
          </table:table-cell>
          <table:table-cell table:number-columns-repeated="1013"/>
        </table:table-row>
        <table:table-row table:style-name="ro2">
          <table:table-cell office:value-type="string">
            <text:p>HOLX</text:p>
          </table:table-cell>
          <table:table-cell office:value-type="string">
            <text:p>Healthcar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4.495">
            <text:p>74,495</text:p>
          </table:table-cell>
          <table:table-cell office:value-type="float" office:value="29.917671">
            <text:p>29,917671</text:p>
          </table:table-cell>
          <table:table-cell office:value-type="float" office:value="0.52037">
            <text:p>0,52037</text:p>
          </table:table-cell>
          <table:table-cell office:value-type="percentage" office:value="0.32950002">
            <text:p>32,95%</text:p>
          </table:table-cell>
          <table:table-cell office:value-type="percentage" office:value="0.11116">
            <text:p>11,12%</text:p>
          </table:table-cell>
          <table:table-cell office:value-type="float" office:value="0.704">
            <text:p>0,704</text:p>
          </table:table-cell>
          <table:table-cell table:number-columns-repeated="1013"/>
        </table:table-row>
        <table:table-row table:style-name="ro2">
          <table:table-cell office:value-type="string">
            <text:p>HS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8.305">
            <text:p>18,305</text:p>
          </table:table-cell>
          <table:table-cell office:value-type="float" office:value="17.26887">
            <text:p>17,26887</text:p>
          </table:table-cell>
          <table:table-cell office:value-type="float" office:value="0.82827">
            <text:p>0,82827</text:p>
          </table:table-cell>
          <table:table-cell office:value-type="percentage" office:value="0.26941">
            <text:p>26,94%</text:p>
          </table:table-cell>
          <table:table-cell office:value-type="percentage" office:value="0.109239995">
            <text:p>10,92%</text:p>
          </table:table-cell>
          <table:table-cell office:value-type="float" office:value="1.199">
            <text:p>1,199</text:p>
          </table:table-cell>
          <table:table-cell table:number-columns-repeated="1013"/>
        </table:table-row>
        <table:table-row table:style-name="ro2">
          <table:table-cell office:value-type="string">
            <text:p>HW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07.81">
            <text:p>207,81</text:p>
          </table:table-cell>
          <table:table-cell office:value-type="float" office:value="58.373596">
            <text:p>58,373596</text:p>
          </table:table-cell>
          <table:table-cell office:value-type="float" office:value="0.65176">
            <text:p>0,65176</text:p>
          </table:table-cell>
          <table:table-cell office:value-type="percentage" office:value="0.28149998">
            <text:p>28,15%</text:p>
          </table:table-cell>
          <table:table-cell office:value-type="percentage" office:value="0.30064">
            <text:p>30,06%</text:p>
          </table:table-cell>
          <table:table-cell office:value-type="float" office:value="1.322">
            <text:p>1,322</text:p>
          </table:table-cell>
          <table:table-cell table:number-columns-repeated="1013"/>
        </table:table-row>
        <table:table-row table:style-name="ro2">
          <table:table-cell office:value-type="string">
            <text:p>HUBB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449.585">
            <text:p>449,585</text:p>
          </table:table-cell>
          <table:table-cell office:value-type="float" office:value="28.13423">
            <text:p>28,13423</text:p>
          </table:table-cell>
          <table:table-cell office:value-type="float" office:value="0.5821">
            <text:p>0,5821</text:p>
          </table:table-cell>
          <table:table-cell office:value-type="percentage" office:value="0.23749">
            <text:p>23,75%</text:p>
          </table:table-cell>
          <table:table-cell office:value-type="percentage" office:value="0.24991">
            <text:p>24,99%</text:p>
          </table:table-cell>
          <table:table-cell office:value-type="float" office:value="1.004">
            <text:p>1,004</text:p>
          </table:table-cell>
          <table:table-cell table:number-columns-repeated="1013"/>
        </table:table-row>
        <table:table-row table:style-name="ro2">
          <table:table-cell office:value-type="string">
            <text:p>DXCM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67.2701">
            <text:p>67,2701</text:p>
          </table:table-cell>
          <table:table-cell office:value-type="float" office:value="37.37228">
            <text:p>37,37228</text:p>
          </table:table-cell>
          <table:table-cell office:value-type="float" office:value="0.94479">
            <text:p>0,94479</text:p>
          </table:table-cell>
          <table:table-cell office:value-type="percentage" office:value="0.22633">
            <text:p>22,63%</text:p>
          </table:table-cell>
          <table:table-cell office:value-type="percentage" office:value="0.30635">
            <text:p>30,64%</text:p>
          </table:table-cell>
          <table:table-cell office:value-type="float" office:value="1.515">
            <text:p>1,515</text:p>
          </table:table-cell>
          <table:table-cell table:number-columns-repeated="1013"/>
        </table:table-row>
        <table:table-row table:style-name="ro2">
          <table:table-cell office:value-type="string">
            <text:p>DVN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6.785">
            <text:p>36,785</text:p>
          </table:table-cell>
          <table:table-cell office:value-type="float" office:value="8.675708">
            <text:p>8,675708</text:p>
          </table:table-cell>
          <table:table-cell office:value-type="float" office:value="0.56274">
            <text:p>0,56274</text:p>
          </table:table-cell>
          <table:table-cell office:value-type="percentage" office:value="0.46333">
            <text:p>46,33%</text:p>
          </table:table-cell>
          <table:table-cell office:value-type="percentage" office:value="0.18586999">
            <text:p>18,59%</text:p>
          </table:table-cell>
          <table:table-cell office:value-type="float" office:value="0.673">
            <text:p>0,673</text:p>
          </table:table-cell>
          <table:table-cell table:number-columns-repeated="1013"/>
        </table:table-row>
        <table:table-row table:style-name="ro2">
          <table:table-cell office:value-type="string">
            <text:p>IDXX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683.34">
            <text:p>683,34</text:p>
          </table:table-cell>
          <table:table-cell office:value-type="float" office:value="54.276413">
            <text:p>54,276413</text:p>
          </table:table-cell>
          <table:table-cell office:value-type="float" office:value="0.7129">
            <text:p>0,7129</text:p>
          </table:table-cell>
          <table:table-cell office:value-type="percentage" office:value="0.34489">
            <text:p>34,49%</text:p>
          </table:table-cell>
          <table:table-cell office:value-type="percentage" office:value="0.64633006">
            <text:p>64,63%</text:p>
          </table:table-cell>
          <table:table-cell office:value-type="float" office:value="1.668">
            <text:p>1,668</text:p>
          </table:table-cell>
          <table:table-cell table:number-columns-repeated="1013"/>
        </table:table-row>
        <table:table-row table:style-name="ro2">
          <table:table-cell office:value-type="string">
            <text:p>INC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98.81">
            <text:p>98,81</text:p>
          </table:table-cell>
          <table:table-cell office:value-type="float" office:value="16.747458">
            <text:p>16,747458</text:p>
          </table:table-cell>
          <table:table-cell office:value-type="float" office:value="0.887">
            <text:p>0,887</text:p>
          </table:table-cell>
          <table:table-cell office:value-type="percentage" office:value="0.27514">
            <text:p>27,51%</text:p>
          </table:table-cell>
          <table:table-cell office:value-type="percentage" office:value="0.30389">
            <text:p>30,39%</text:p>
          </table:table-cell>
          <table:table-cell office:value-type="float" office:value="0.815">
            <text:p>0,815</text:p>
          </table:table-cell>
          <table:table-cell table:number-columns-repeated="1013"/>
        </table:table-row>
        <table:table-row table:style-name="ro2">
          <table:table-cell office:value-type="string">
            <text:p>ET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20.7789">
            <text:p>320,7789</text:p>
          </table:table-cell>
          <table:table-cell office:value-type="float" office:value="32.07789">
            <text:p>32,07789</text:p>
          </table:table-cell>
          <table:table-cell office:value-type="float" office:value="0.59661">
            <text:p>0,59661</text:p>
          </table:table-cell>
          <table:table-cell office:value-type="percentage" office:value="0.22964">
            <text:p>22,96%</text:p>
          </table:table-cell>
          <table:table-cell office:value-type="percentage" office:value="0.20653">
            <text:p>20,65%</text:p>
          </table:table-cell>
          <table:table-cell office:value-type="float" office:value="1.168">
            <text:p>1,168</text:p>
          </table:table-cell>
          <table:table-cell table:number-columns-repeated="1013"/>
        </table:table-row>
        <table:table-row table:style-name="ro2">
          <table:table-cell office:value-type="string">
            <text:p>FTV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56.06">
            <text:p>56,06</text:p>
          </table:table-cell>
          <table:table-cell office:value-type="float" office:value="22.070868">
            <text:p>22,070868</text:p>
          </table:table-cell>
          <table:table-cell office:value-type="float" office:value="0.52244">
            <text:p>0,52244</text:p>
          </table:table-cell>
          <table:table-cell office:value-type="percentage" office:value="0.2685">
            <text:p>26,85%</text:p>
          </table:table-cell>
          <table:table-cell office:value-type="percentage" office:value="0.103649996">
            <text:p>10,36%</text:p>
          </table:table-cell>
          <table:table-cell office:value-type="float" office:value="1.043">
            <text:p>1,043</text:p>
          </table:table-cell>
          <table:table-cell table:number-columns-repeated="1013"/>
        </table:table-row>
        <table:table-row table:style-name="ro2">
          <table:table-cell office:value-type="string">
            <text:p>FOXA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73.78">
            <text:p>73,78</text:p>
          </table:table-cell>
          <table:table-cell office:value-type="float" office:value="16.579775">
            <text:p>16,579775</text:p>
          </table:table-cell>
          <table:table-cell office:value-type="float" office:value="0.60136">
            <text:p>0,60136</text:p>
          </table:table-cell>
          <table:table-cell office:value-type="percentage" office:value="0.21621999">
            <text:p>21,62%</text:p>
          </table:table-cell>
          <table:table-cell office:value-type="percentage" office:value="0.17272">
            <text:p>17,27%</text:p>
          </table:table-cell>
          <table:table-cell office:value-type="float" office:value="0.512">
            <text:p>0,512</text:p>
          </table:table-cell>
          <table:table-cell table:number-columns-repeated="1013"/>
        </table:table-row>
        <table:table-row table:style-name="ro2">
          <table:table-cell office:value-type="string">
            <text:p>HIG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38.555">
            <text:p>138,555</text:p>
          </table:table-cell>
          <table:table-cell office:value-type="float" office:value="11.338379">
            <text:p>11,338379</text:p>
          </table:table-cell>
          <table:table-cell office:value-type="float" office:value="0.23696">
            <text:p>0,23696</text:p>
          </table:table-cell>
          <table:table-cell office:value-type="percentage" office:value="0.17434">
            <text:p>17,43%</text:p>
          </table:table-cell>
          <table:table-cell office:value-type="percentage" office:value="0.20069">
            <text:p>20,07%</text:p>
          </table:table-cell>
          <table:table-cell office:value-type="float" office:value="0.629">
            <text:p>0,629</text:p>
          </table:table-cell>
          <table:table-cell table:number-columns-repeated="1013"/>
        </table:table-row>
        <table:table-row table:style-name="ro2">
          <table:table-cell office:value-type="string">
            <text:p>FOX</text:p>
          </table:table-cell>
          <table:table-cell office:value-type="string">
            <text:p>Communication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65.53">
            <text:p>65,53</text:p>
          </table:table-cell>
          <table:table-cell office:value-type="float" office:value="14.725843">
            <text:p>14,725843</text:p>
          </table:table-cell>
          <table:table-cell office:value-type="float" office:value="0.60136">
            <text:p>0,60136</text:p>
          </table:table-cell>
          <table:table-cell office:value-type="percentage" office:value="0.21621999">
            <text:p>21,62%</text:p>
          </table:table-cell>
          <table:table-cell office:value-type="percentage" office:value="0.17272">
            <text:p>17,27%</text:p>
          </table:table-cell>
          <table:table-cell office:value-type="float" office:value="0.512">
            <text:p>0,512</text:p>
          </table:table-cell>
          <table:table-cell table:number-columns-repeated="1013"/>
        </table:table-row>
        <table:table-row table:style-name="ro2">
          <table:table-cell office:value-type="string">
            <text:p>G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41.75">
            <text:p>141,75</text:p>
          </table:table-cell>
          <table:table-cell office:value-type="float" office:value="10.286648">
            <text:p>10,286648</text:p>
          </table:table-cell>
          <table:table-cell office:value-type="float" office:value="0.55217">
            <text:p>0,55217</text:p>
          </table:table-cell>
          <table:table-cell office:value-type="percentage" office:value="0.27290002">
            <text:p>27,29%</text:p>
          </table:table-cell>
          <table:table-cell office:value-type="percentage" office:value="0.22277">
            <text:p>22,28%</text:p>
          </table:table-cell>
          <table:table-cell office:value-type="float" office:value="0.479">
            <text:p>0,479</text:p>
          </table:table-cell>
          <table:table-cell table:number-columns-repeated="1013"/>
        </table:table-row>
        <table:table-row table:style-name="ro2">
          <table:table-cell office:value-type="string">
            <text:p>GPN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79.46">
            <text:p>79,46</text:p>
          </table:table-cell>
          <table:table-cell office:value-type="float" office:value="12.057663">
            <text:p>12,057663</text:p>
          </table:table-cell>
          <table:table-cell office:value-type="float" office:value="0.69198">
            <text:p>0,69198</text:p>
          </table:table-cell>
          <table:table-cell office:value-type="percentage" office:value="0.43515">
            <text:p>43,52%</text:p>
          </table:table-cell>
          <table:table-cell office:value-type="percentage" office:value="0.07233">
            <text:p>7,23%</text:p>
          </table:table-cell>
          <table:table-cell office:value-type="float" office:value="0.824">
            <text:p>0,824</text:p>
          </table:table-cell>
          <table:table-cell table:number-columns-repeated="1013"/>
        </table:table-row>
        <table:table-row table:style-name="ro2">
          <table:table-cell office:value-type="string">
            <text:p>GD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39.915">
            <text:p>339,915</text:p>
          </table:table-cell>
          <table:table-cell office:value-type="float" office:value="22.043776">
            <text:p>22,043776</text:p>
          </table:table-cell>
          <table:table-cell office:value-type="float" office:value="0.40419">
            <text:p>0,40419</text:p>
          </table:table-cell>
          <table:table-cell office:value-type="percentage" office:value="0.12114">
            <text:p>12,11%</text:p>
          </table:table-cell>
          <table:table-cell office:value-type="percentage" office:value="0.17782">
            <text:p>17,78%</text:p>
          </table:table-cell>
          <table:table-cell office:value-type="float" office:value="0.405">
            <text:p>0,405</text:p>
          </table:table-cell>
          <table:table-cell table:number-columns-repeated="1013"/>
        </table:table-row>
        <table:table-row table:style-name="ro2">
          <table:table-cell office:value-type="string">
            <text:p>EX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31.189">
            <text:p>131,189</text:p>
          </table:table-cell>
          <table:table-cell office:value-type="float" office:value="29.34877">
            <text:p>29,34877</text:p>
          </table:table-cell>
          <table:table-cell office:value-type="float" office:value="0.94252">
            <text:p>0,94252</text:p>
          </table:table-cell>
          <table:table-cell office:value-type="percentage" office:value="0.66054">
            <text:p>66,05%</text:p>
          </table:table-cell>
          <table:table-cell office:value-type="percentage" office:value="0.06786">
            <text:p>6,79%</text:p>
          </table:table-cell>
          <table:table-cell office:value-type="float" office:value="1.269">
            <text:p>1,269</text:p>
          </table:table-cell>
          <table:table-cell table:number-columns-repeated="1013"/>
        </table:table-row>
        <table:table-row table:style-name="ro2">
          <table:table-cell office:value-type="string">
            <text:p>XOM</text:p>
          </table:table-cell>
          <table:table-cell office:value-type="string">
            <text:p>Energy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120.965">
            <text:p>120,965</text:p>
          </table:table-cell>
          <table:table-cell office:value-type="float" office:value="17.58212">
            <text:p>17,58212</text:p>
          </table:table-cell>
          <table:table-cell office:value-type="float" office:value="0.15672">
            <text:p>0,15672</text:p>
          </table:table-cell>
          <table:table-cell office:value-type="percentage" office:value="0.1891">
            <text:p>18,91%</text:p>
          </table:table-cell>
          <table:table-cell office:value-type="percentage" office:value="0.11424">
            <text:p>11,42%</text:p>
          </table:table-cell>
          <table:table-cell office:value-type="float" office:value="0.379">
            <text:p>0,379</text:p>
          </table:table-cell>
          <table:table-cell table:number-columns-repeated="1013"/>
        </table:table-row>
        <table:table-row table:style-name="ro2">
          <table:table-cell office:value-type="string">
            <text:p>FDS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91.23">
            <text:p>291,23</text:p>
          </table:table-cell>
          <table:table-cell office:value-type="float" office:value="18.514305">
            <text:p>18,514305</text:p>
          </table:table-cell>
          <table:table-cell office:value-type="float" office:value="0.71961">
            <text:p>0,71961</text:p>
          </table:table-cell>
          <table:table-cell office:value-type="percentage" office:value="0.38766">
            <text:p>38,77%</text:p>
          </table:table-cell>
          <table:table-cell office:value-type="percentage" office:value="0.28831">
            <text:p>28,83%</text:p>
          </table:table-cell>
          <table:table-cell office:value-type="float" office:value="0.744">
            <text:p>0,744</text:p>
          </table:table-cell>
          <table:table-cell table:number-columns-repeated="1013"/>
        </table:table-row>
        <table:table-row table:style-name="ro2">
          <table:table-cell office:value-type="string">
            <text:p>DLR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IMPROVING</text:p>
          </table:table-cell>
          <table:table-cell office:value-type="float" office:value="155.74">
            <text:p>155,74</text:p>
          </table:table-cell>
          <table:table-cell office:value-type="float" office:value="40.347153">
            <text:p>40,347153</text:p>
          </table:table-cell>
          <table:table-cell office:value-type="float" office:value="0.79248">
            <text:p>0,79248</text:p>
          </table:table-cell>
          <table:table-cell office:value-type="percentage" office:value="0.45591">
            <text:p>45,59%</text:p>
          </table:table-cell>
          <table:table-cell office:value-type="percentage" office:value="0.05825">
            <text:p>5,83%</text:p>
          </table:table-cell>
          <table:table-cell office:value-type="float" office:value="1.123">
            <text:p>1,123</text:p>
          </table:table-cell>
          <table:table-cell table:number-columns-repeated="1013"/>
        </table:table-row>
        <table:table-row table:style-name="ro2">
          <table:table-cell office:value-type="string">
            <text:p>DHI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45.43">
            <text:p>145,43</text:p>
          </table:table-cell>
          <table:table-cell office:value-type="float" office:value="12.569576">
            <text:p>12,569576</text:p>
          </table:table-cell>
          <table:table-cell office:value-type="float" office:value="0.24514">
            <text:p>0,24514</text:p>
          </table:table-cell>
          <table:table-cell office:value-type="percentage" office:value="0.13934">
            <text:p>13,93%</text:p>
          </table:table-cell>
          <table:table-cell office:value-type="percentage" office:value="0.14321">
            <text:p>14,32%</text:p>
          </table:table-cell>
          <table:table-cell office:value-type="float" office:value="1.38">
            <text:p>1,38</text:p>
          </table:table-cell>
          <table:table-cell table:number-columns-repeated="1013"/>
        </table:table-row>
        <table:table-row table:style-name="ro2">
          <table:table-cell office:value-type="string">
            <text:p>EQR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63.36">
            <text:p>63,36</text:p>
          </table:table-cell>
          <table:table-cell office:value-type="float" office:value="20.842106">
            <text:p>20,842106</text:p>
          </table:table-cell>
          <table:table-cell office:value-type="float" office:value="0.76237">
            <text:p>0,76237</text:p>
          </table:table-cell>
          <table:table-cell office:value-type="percentage" office:value="0.60988">
            <text:p>60,99%</text:p>
          </table:table-cell>
          <table:table-cell office:value-type="percentage" office:value="0.10444">
            <text:p>10,44%</text:p>
          </table:table-cell>
          <table:table-cell office:value-type="float" office:value="0.759">
            <text:p>0,759</text:p>
          </table:table-cell>
          <table:table-cell table:number-columns-repeated="1013"/>
        </table:table-row>
        <table:table-row table:style-name="ro2">
          <table:table-cell office:value-type="string">
            <text:p>EM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135.27">
            <text:p>135,27</text:p>
          </table:table-cell>
          <table:table-cell office:value-type="float" office:value="33.565758">
            <text:p>33,565758</text:p>
          </table:table-cell>
          <table:table-cell office:value-type="float" office:value="0.67785">
            <text:p>0,67785</text:p>
          </table:table-cell>
          <table:table-cell office:value-type="percentage" office:value="0.27975">
            <text:p>27,98%</text:p>
          </table:table-cell>
          <table:table-cell office:value-type="percentage" office:value="0.09363">
            <text:p>9,36%</text:p>
          </table:table-cell>
          <table:table-cell office:value-type="float" office:value="1.254">
            <text:p>1,254</text:p>
          </table:table-cell>
          <table:table-cell table:number-columns-repeated="1013"/>
        </table:table-row>
        <table:table-row table:style-name="ro2">
          <table:table-cell office:value-type="string">
            <text:p>EFX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221.395">
            <text:p>221,395</text:p>
          </table:table-cell>
          <table:table-cell office:value-type="float" office:value="41.85161">
            <text:p>41,85161</text:p>
          </table:table-cell>
          <table:table-cell office:value-type="float" office:value="0.94824">
            <text:p>0,94824</text:p>
          </table:table-cell>
          <table:table-cell office:value-type="percentage" office:value="0.31239">
            <text:p>31,24%</text:p>
          </table:table-cell>
          <table:table-cell office:value-type="percentage" office:value="0.13066">
            <text:p>13,07%</text:p>
          </table:table-cell>
          <table:table-cell office:value-type="float" office:value="1.586">
            <text:p>1,586</text:p>
          </table:table-cell>
          <table:table-cell table:number-columns-repeated="1013"/>
        </table:table-row>
        <table:table-row table:style-name="ro2">
          <table:table-cell office:value-type="string">
            <text:p>WTW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EADING</text:p>
          </table:table-cell>
          <table:table-cell office:value-type="float" office:value="333.47">
            <text:p>333,47</text:p>
          </table:table-cell>
          <table:table-cell office:value-type="float" office:value="15.970786">
            <text:p>15,970786</text:p>
          </table:table-cell>
          <table:table-cell office:value-type="float" office:value="0.75685">
            <text:p>0,75685</text:p>
          </table:table-cell>
          <table:table-cell office:value-type="percentage" office:value="0.26838">
            <text:p>26,84%</text:p>
          </table:table-cell>
          <table:table-cell office:value-type="percentage" office:value="0.27633">
            <text:p>27,63%</text:p>
          </table:table-cell>
          <table:table-cell office:value-type="float" office:value="0.635">
            <text:p>0,635</text:p>
          </table:table-cell>
          <table:table-cell table:number-columns-repeated="1013"/>
        </table:table-row>
        <table:table-row table:style-name="ro2">
          <table:table-cell office:value-type="string">
            <text:p>WSM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82.68">
            <text:p>182,68</text:p>
          </table:table-cell>
          <table:table-cell office:value-type="float" office:value="20.118942">
            <text:p>20,118942</text:p>
          </table:table-cell>
          <table:table-cell office:value-type="float" office:value="0.7088">
            <text:p>0,7088</text:p>
          </table:table-cell>
          <table:table-cell office:value-type="percentage" office:value="0.21464">
            <text:p>21,46%</text:p>
          </table:table-cell>
          <table:table-cell office:value-type="percentage" office:value="0.56918997">
            <text:p>56,92%</text:p>
          </table:table-cell>
          <table:table-cell office:value-type="float" office:value="1.548">
            <text:p>1,548</text:p>
          </table:table-cell>
          <table:table-cell table:number-columns-repeated="1013"/>
        </table:table-row>
        <table:table-row table:style-name="ro2">
          <table:table-cell office:value-type="string">
            <text:p>WAT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381.17">
            <text:p>381,17</text:p>
          </table:table-cell>
          <table:table-cell office:value-type="float" office:value="34.969727">
            <text:p>34,969727</text:p>
          </table:table-cell>
          <table:table-cell office:value-type="float" office:value="0.66042">
            <text:p>0,66042</text:p>
          </table:table-cell>
          <table:table-cell office:value-type="percentage" office:value="0.34366">
            <text:p>34,37%</text:p>
          </table:table-cell>
          <table:table-cell office:value-type="percentage" office:value="0.32987">
            <text:p>32,99%</text:p>
          </table:table-cell>
          <table:table-cell office:value-type="float" office:value="1.163">
            <text:p>1,163</text:p>
          </table:table-cell>
          <table:table-cell table:number-columns-repeated="1013"/>
        </table:table-row>
        <table:table-row table:style-name="ro2">
          <table:table-cell office:value-type="string">
            <text:p>AL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08.52">
            <text:p>208,52</text:p>
          </table:table-cell>
          <table:table-cell office:value-type="float" office:value="6.761349">
            <text:p>6,761349</text:p>
          </table:table-cell>
          <table:table-cell office:value-type="float" office:value="0.2943">
            <text:p>0,2943</text:p>
          </table:table-cell>
          <table:table-cell office:value-type="percentage" office:value="0.15057">
            <text:p>15,06%</text:p>
          </table:table-cell>
          <table:table-cell office:value-type="percentage" office:value="0.34469002">
            <text:p>34,47%</text:p>
          </table:table-cell>
          <table:table-cell office:value-type="float" office:value="0.249">
            <text:p>0,249</text:p>
          </table:table-cell>
          <table:table-cell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37.15">
            <text:p>137,15</text:p>
          </table:table-cell>
          <table:table-cell office:value-type="float" office:value="30.010939">
            <text:p>30,010939</text:p>
          </table:table-cell>
          <table:table-cell office:value-type="float" office:value="0.52559">
            <text:p>0,52559</text:p>
          </table:table-cell>
          <table:table-cell office:value-type="percentage" office:value="0.28152">
            <text:p>28,15%</text:p>
          </table:table-cell>
          <table:table-cell office:value-type="percentage" office:value="0.20618999">
            <text:p>20,62%</text:p>
          </table:table-cell>
          <table:table-cell office:value-type="float" office:value="1.274">
            <text:p>1,274</text:p>
          </table:table-cell>
          <table:table-cell table:number-columns-repeated="1013"/>
        </table:table-row>
        <table:table-row table:style-name="ro2">
          <table:table-cell office:value-type="string">
            <text:p>AFL</text:p>
          </table:table-cell>
          <table:table-cell office:value-type="string">
            <text:p>Financial Services</text:p>
          </table:table-cell>
          <table:table-cell table:style-name="ce2" office:value-type="string">
            <text:p>SI (Difensivo)</text:p>
          </table:table-cell>
          <table:table-cell office:value-type="float" office:value="5.5">
            <text:p>5,5</text:p>
          </table:table-cell>
          <table:table-cell table:style-name="ce3" office:value-type="string">
            <text:p>LAGGING</text:p>
          </table:table-cell>
          <table:table-cell office:value-type="float" office:value="110.385">
            <text:p>110,385</text:p>
          </table:table-cell>
          <table:table-cell office:value-type="float" office:value="14.505257">
            <text:p>14,505257</text:p>
          </table:table-cell>
          <table:table-cell office:value-type="float" office:value="0.50003">
            <text:p>0,50003</text:p>
          </table:table-cell>
          <table:table-cell office:value-type="percentage" office:value="0.30269">
            <text:p>30,27%</text:p>
          </table:table-cell>
          <table:table-cell office:value-type="percentage" office:value="0.1558">
            <text:p>15,58%</text:p>
          </table:table-cell>
          <table:table-cell office:value-type="float" office:value="0.658">
            <text:p>0,658</text:p>
          </table:table-cell>
          <table:table-cell table:number-columns-repeated="1013"/>
        </table:table-row>
        <table:table-row table:style-name="ro2">
          <table:table-cell office:value-type="string">
            <text:p>ADBE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354">
            <text:p>354</text:p>
          </table:table-cell>
          <table:table-cell office:value-type="float" office:value="21.197603">
            <text:p>21,197603</text:p>
          </table:table-cell>
          <table:table-cell office:value-type="float" office:value="0.57197">
            <text:p>0,57197</text:p>
          </table:table-cell>
          <table:table-cell office:value-type="percentage" office:value="0.40183997">
            <text:p>40,18%</text:p>
          </table:table-cell>
          <table:table-cell office:value-type="percentage" office:value="0.55426">
            <text:p>55,43%</text:p>
          </table:table-cell>
          <table:table-cell office:value-type="float" office:value="1.54">
            <text:p>1,54</text:p>
          </table:table-cell>
          <table:table-cell table:number-columns-repeated="1013"/>
        </table:table-row>
        <table:table-row table:style-name="ro2">
          <table:table-cell office:value-type="string">
            <text:p>AC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.5">
            <text:p>5,5</text:p>
          </table:table-cell>
          <table:table-cell table:style-name="ce3" office:value-type="string">
            <text:p>WEAKENING</text:p>
          </table:table-cell>
          <table:table-cell office:value-type="float" office:value="270.215">
            <text:p>270,215</text:p>
          </table:table-cell>
          <table:table-cell office:value-type="float" office:value="22.331818">
            <text:p>22,331818</text:p>
          </table:table-cell>
          <table:table-cell office:value-type="float" office:value="0.25694">
            <text:p>0,25694</text:p>
          </table:table-cell>
          <table:table-cell office:value-type="percentage" office:value="0.17615">
            <text:p>17,62%</text:p>
          </table:table-cell>
          <table:table-cell office:value-type="percentage" office:value="0.25016">
            <text:p>25,02%</text:p>
          </table:table-cell>
          <table:table-cell office:value-type="float" office:value="1.261">
            <text:p>1,261</text:p>
          </table:table-cell>
          <table:table-cell table:number-columns-repeated="1013"/>
        </table:table-row>
        <table:table-row table:style-name="ro2">
          <table:table-cell office:value-type="string">
            <text:p>ZT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6.6443">
            <text:p>126,6443</text:p>
          </table:table-cell>
          <table:table-cell office:value-type="float" office:value="21.284758">
            <text:p>21,284758</text:p>
          </table:table-cell>
          <table:table-cell office:value-type="float" office:value="1.3505">
            <text:p>1,3505</text:p>
          </table:table-cell>
          <table:table-cell office:value-type="percentage" office:value="0.42471">
            <text:p>42,47%</text:p>
          </table:table-cell>
          <table:table-cell office:value-type="percentage" office:value="0.49868">
            <text:p>49,87%</text:p>
          </table:table-cell>
          <table:table-cell office:value-type="float" office:value="0.971">
            <text:p>0,9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M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61.191">
            <text:p>161,191</text:p>
          </table:table-cell>
          <table:table-cell office:value-type="float" office:value="25.708292">
            <text:p>25,708292</text:p>
          </table:table-cell>
          <table:table-cell office:value-type="float" office:value="2.81904">
            <text:p>2,81904</text:p>
          </table:table-cell>
          <table:table-cell office:value-type="percentage" office:value="0.24818">
            <text:p>24,82%</text:p>
          </table:table-cell>
          <table:table-cell office:value-type="percentage" office:value="0.72920996">
            <text:p>72,92%</text:p>
          </table:table-cell>
          <table:table-cell office:value-type="float" office:value="1.148">
            <text:p>1,1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4.434">
            <text:p>14,434</text:p>
          </table:table-cell>
          <table:table-cell office:value-type="float" office:value="9.496053">
            <text:p>9,496053</text:p>
          </table:table-cell>
          <table:table-cell office:value-type="float" office:value="3.02896">
            <text:p>3,02896</text:p>
          </table:table-cell>
          <table:table-cell office:value-type="percentage" office:value="0.26509002">
            <text:p>26,51%</text:p>
          </table:table-cell>
          <table:table-cell office:value-type="percentage" office:value="0.05106">
            <text:p>5,11%</text:p>
          </table:table-cell>
          <table:table-cell office:value-type="float" office:value="1.001">
            <text:p>1,0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QIX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764.19">
            <text:p>764,19</text:p>
          </table:table-cell>
          <table:table-cell office:value-type="float" office:value="70.36741">
            <text:p>70,36741</text:p>
          </table:table-cell>
          <table:table-cell office:value-type="float" office:value="1.47969">
            <text:p>1,47969</text:p>
          </table:table-cell>
          <table:table-cell office:value-type="percentage" office:value="0.42970002">
            <text:p>42,97%</text:p>
          </table:table-cell>
          <table:table-cell office:value-type="percentage" office:value="0.077">
            <text:p>7,70%</text:p>
          </table:table-cell>
          <table:table-cell office:value-type="float" office:value="1.037">
            <text:p>1,0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ZBRA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45.34">
            <text:p>245,34</text:p>
          </table:table-cell>
          <table:table-cell office:value-type="float" office:value="24.706947">
            <text:p>24,706947</text:p>
          </table:table-cell>
          <table:table-cell office:value-type="float" office:value="0.62984">
            <text:p>0,62984</text:p>
          </table:table-cell>
          <table:table-cell office:value-type="percentage" office:value="0.18535">
            <text:p>18,54%</text:p>
          </table:table-cell>
          <table:table-cell office:value-type="percentage" office:value="0.14286">
            <text:p>14,29%</text:p>
          </table:table-cell>
          <table:table-cell office:value-type="float" office:value="1.675">
            <text:p>1,675</text:p>
          </table:table-cell>
          <table:table-cell table:number-columns-repeated="1013"/>
        </table:table-row>
        <table:table-row table:style-name="ro2">
          <table:table-cell office:value-type="string">
            <text:p>AKA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8.295">
            <text:p>88,295</text:p>
          </table:table-cell>
          <table:table-cell office:value-type="float" office:value="25.892962">
            <text:p>25,892962</text:p>
          </table:table-cell>
          <table:table-cell office:value-type="float" office:value="1.10548">
            <text:p>1,10548</text:p>
          </table:table-cell>
          <table:table-cell office:value-type="percentage" office:value="0.28398">
            <text:p>28,40%</text:p>
          </table:table-cell>
          <table:table-cell office:value-type="percentage" office:value="0.10642">
            <text:p>10,64%</text:p>
          </table:table-cell>
          <table:table-cell office:value-type="float" office:value="0.682">
            <text:p>0,6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HS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25.83">
            <text:p>225,83</text:p>
          </table:table-cell>
          <table:table-cell office:value-type="float" office:value="10.748691">
            <text:p>10,748691</text:p>
          </table:table-cell>
          <table:table-cell office:value-type="float" office:value="0.70037">
            <text:p>0,70037</text:p>
          </table:table-cell>
          <table:table-cell office:value-type="percentage" office:value="0.15034">
            <text:p>15,03%</text:p>
          </table:table-cell>
          <table:table-cell office:value-type="percentage" office:value="0.20028">
            <text:p>20,03%</text:p>
          </table:table-cell>
          <table:table-cell office:value-type="float" office:value="1.274">
            <text:p>1,274</text:p>
          </table:table-cell>
          <table:table-cell table:number-columns-repeated="1013"/>
        </table:table-row>
        <table:table-row table:style-name="ro2">
          <table:table-cell office:value-type="string">
            <text:p>UR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18.4343">
            <text:p>818,4343</text:p>
          </table:table-cell>
          <table:table-cell office:value-type="float" office:value="21.071945">
            <text:p>21,071945</text:p>
          </table:table-cell>
          <table:table-cell office:value-type="float" office:value="1.69022">
            <text:p>1,69022</text:p>
          </table:table-cell>
          <table:table-cell office:value-type="percentage" office:value="0.28193">
            <text:p>28,19%</text:p>
          </table:table-cell>
          <table:table-cell office:value-type="percentage" office:value="0.28781">
            <text:p>28,78%</text:p>
          </table:table-cell>
          <table:table-cell office:value-type="float" office:value="1.678">
            <text:p>1,67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NP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33.7892">
            <text:p>233,7892</text:p>
          </table:table-cell>
          <table:table-cell office:value-type="float" office:value="19.863142">
            <text:p>19,863142</text:p>
          </table:table-cell>
          <table:table-cell office:value-type="float" office:value="1.89829">
            <text:p>1,89829</text:p>
          </table:table-cell>
          <table:table-cell office:value-type="percentage" office:value="0.50803">
            <text:p>50,80%</text:p>
          </table:table-cell>
          <table:table-cell office:value-type="percentage" office:value="0.41619">
            <text:p>41,62%</text:p>
          </table:table-cell>
          <table:table-cell office:value-type="float" office:value="0.995">
            <text:p>0,9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LTA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608.33">
            <text:p>608,33</text:p>
          </table:table-cell>
          <table:table-cell office:value-type="float" office:value="23.34344">
            <text:p>23,34344</text:p>
          </table:table-cell>
          <table:table-cell office:value-type="float" office:value="0.97784">
            <text:p>0,97784</text:p>
          </table:table-cell>
          <table:table-cell office:value-type="percentage" office:value="0.15531999">
            <text:p>15,53%</text:p>
          </table:table-cell>
          <table:table-cell office:value-type="percentage" office:value="0.47967">
            <text:p>47,97%</text:p>
          </table:table-cell>
          <table:table-cell office:value-type="float" office:value="0.866">
            <text:p>0,866</text:p>
          </table:table-cell>
          <table:table-cell table:number-columns-repeated="1013"/>
        </table:table-row>
        <table:table-row table:style-name="ro2">
          <table:table-cell office:value-type="string">
            <text:p>EXC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3.785">
            <text:p>43,785</text:p>
          </table:table-cell>
          <table:table-cell office:value-type="float" office:value="15.693548">
            <text:p>15,693548</text:p>
          </table:table-cell>
          <table:table-cell office:value-type="float" office:value="1.77601">
            <text:p>1,77601</text:p>
          </table:table-cell>
          <table:table-cell office:value-type="percentage" office:value="0.33026">
            <text:p>33,03%</text:p>
          </table:table-cell>
          <table:table-cell office:value-type="percentage" office:value="0.10308">
            <text:p>10,31%</text:p>
          </table:table-cell>
          <table:table-cell office:value-type="float" office:value="0.55">
            <text:p>0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TR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93.44">
            <text:p>93,44</text:p>
          </table:table-cell>
          <table:table-cell office:value-type="float" office:value="23.01478">
            <text:p>23,01478</text:p>
          </table:table-cell>
          <table:table-cell office:value-type="float" office:value="1.79362">
            <text:p>1,79362</text:p>
          </table:table-cell>
          <table:table-cell office:value-type="percentage" office:value="0.44498003">
            <text:p>44,50%</text:p>
          </table:table-cell>
          <table:table-cell office:value-type="percentage" office:value="0.11188">
            <text:p>11,19%</text:p>
          </table:table-cell>
          <table:table-cell office:value-type="float" office:value="0.616">
            <text:p>0,6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7.81">
            <text:p>67,81</text:p>
          </table:table-cell>
          <table:table-cell office:value-type="float" office:value="18.732044">
            <text:p>18,732044</text:p>
          </table:table-cell>
          <table:table-cell office:value-type="float" office:value="1.84357">
            <text:p>1,84357</text:p>
          </table:table-cell>
          <table:table-cell office:value-type="percentage" office:value="0.34879002">
            <text:p>34,88%</text:p>
          </table:table-cell>
          <table:table-cell office:value-type="percentage" office:value="0.0861">
            <text:p>8,61%</text:p>
          </table:table-cell>
          <table:table-cell office:value-type="float" office:value="0.767">
            <text:p>0,7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VR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3.11">
            <text:p>73,11</text:p>
          </table:table-cell>
          <table:table-cell office:value-type="float" office:value="20.030136">
            <text:p>20,030136</text:p>
          </table:table-cell>
          <table:table-cell office:value-type="float" office:value="1.4245">
            <text:p>1,4245</text:p>
          </table:table-cell>
          <table:table-cell office:value-type="percentage" office:value="0.46089">
            <text:p>46,09%</text:p>
          </table:table-cell>
          <table:table-cell office:value-type="percentage" office:value="0.08454">
            <text:p>8,45%</text:p>
          </table:table-cell>
          <table:table-cell office:value-type="float" office:value="0.634">
            <text:p>0,63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S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63.555">
            <text:p>263,555</text:p>
          </table:table-cell>
          <table:table-cell office:value-type="float" office:value="20.042206">
            <text:p>20,042206</text:p>
          </table:table-cell>
          <table:table-cell office:value-type="float" office:value="1.15144">
            <text:p>1,15144</text:p>
          </table:table-cell>
          <table:table-cell office:value-type="percentage" office:value="0.64371">
            <text:p>64,37%</text:p>
          </table:table-cell>
          <table:table-cell office:value-type="percentage" office:value="0.15987">
            <text:p>15,99%</text:p>
          </table:table-cell>
          <table:table-cell office:value-type="float" office:value="0.728">
            <text:p>0,72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RIE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87.88">
            <text:p>287,88</text:p>
          </table:table-cell>
          <table:table-cell office:value-type="float" office:value="23.234867">
            <text:p>23,234867</text:p>
          </table:table-cell>
          <table:table-cell office:value-type="float" office:value="2.353">
            <text:p>2,353</text:p>
          </table:table-cell>
          <table:table-cell office:value-type="percentage" office:value="0.20159">
            <text:p>20,16%</text:p>
          </table:table-cell>
          <table:table-cell office:value-type="percentage" office:value="0.30444">
            <text:p>30,44%</text:p>
          </table:table-cell>
          <table:table-cell office:value-type="float" office:value="0.386">
            <text:p>0,3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DP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59.8">
            <text:p>259,8</text:p>
          </table:table-cell>
          <table:table-cell office:value-type="float" office:value="25.671936">
            <text:p>25,671936</text:p>
          </table:table-cell>
          <table:table-cell office:value-type="float" office:value="1.54917">
            <text:p>1,54917</text:p>
          </table:table-cell>
          <table:table-cell office:value-type="percentage" office:value="0.29149">
            <text:p>29,15%</text:p>
          </table:table-cell>
          <table:table-cell office:value-type="percentage" office:value="0.70572996">
            <text:p>70,57%</text:p>
          </table:table-cell>
          <table:table-cell office:value-type="float" office:value="0.86">
            <text:p>0,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IX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0.36">
            <text:p>60,36</text:p>
          </table:table-cell>
          <table:table-cell office:value-type="float" office:value="7.910878">
            <text:p>7,910878</text:p>
          </table:table-cell>
          <table:table-cell office:value-type="float" office:value="2.0402">
            <text:p>2,0402</text:p>
          </table:table-cell>
          <table:table-cell office:value-type="percentage" office:value="0.4017">
            <text:p>40,17%</text:p>
          </table:table-cell>
          <table:table-cell office:value-type="percentage" office:value="0.15765001">
            <text:p>15,77%</text:p>
          </table:table-cell>
          <table:table-cell office:value-type="float" office:value="0.831">
            <text:p>0,8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W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6.32">
            <text:p>86,32</text:p>
          </table:table-cell>
          <table:table-cell office:value-type="float" office:value="37.85965">
            <text:p>37,85965</text:p>
          </table:table-cell>
          <table:table-cell office:value-type="float" office:value="6.862">
            <text:p>6,862</text:p>
          </table:table-cell>
          <table:table-cell office:value-type="percentage" office:value="0.30395">
            <text:p>30,40%</text:p>
          </table:table-cell>
          <table:table-cell office:value-type="percentage" office:value="0.13492">
            <text:p>13,49%</text:p>
          </table:table-cell>
          <table:table-cell office:value-type="float" office:value="0.967">
            <text:p>0,9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SL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64.77">
            <text:p>264,77</text:p>
          </table:table-cell>
          <table:table-cell office:value-type="float" office:value="20.304447">
            <text:p>20,304447</text:p>
          </table:table-cell>
          <table:table-cell office:value-type="float" office:value="9.893">
            <text:p>9,893</text:p>
          </table:table-cell>
          <table:table-cell office:value-type="percentage" office:value="0.39970002">
            <text:p>39,97%</text:p>
          </table:table-cell>
          <table:table-cell office:value-type="percentage" office:value="0.16864">
            <text:p>16,86%</text:p>
          </table:table-cell>
          <table:table-cell office:value-type="float" office:value="1.589">
            <text:p>1,5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CX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1.8254">
            <text:p>51,8254</text:p>
          </table:table-cell>
          <table:table-cell office:value-type="float" office:value="36.24154">
            <text:p>36,24154</text:p>
          </table:table-cell>
          <table:table-cell office:value-type="float" office:value="0.30589">
            <text:p>0,30589</text:p>
          </table:table-cell>
          <table:table-cell office:value-type="percentage" office:value="0.36773998">
            <text:p>36,77%</text:p>
          </table:table-cell>
          <table:table-cell office:value-type="percentage" office:value="0.14538999">
            <text:p>14,54%</text:p>
          </table:table-cell>
          <table:table-cell office:value-type="float" office:value="1.484">
            <text:p>1,484</text:p>
          </table:table-cell>
          <table:table-cell table:number-columns-repeated="1013"/>
        </table:table-row>
        <table:table-row table:style-name="ro2">
          <table:table-cell office:value-type="string">
            <text:p>FTN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49">
            <text:p>80,49</text:p>
          </table:table-cell>
          <table:table-cell office:value-type="float" office:value="33.123455">
            <text:p>33,123455</text:p>
          </table:table-cell>
          <table:table-cell office:value-type="float" office:value="1.48116">
            <text:p>1,48116</text:p>
          </table:table-cell>
          <table:table-cell office:value-type="percentage" office:value="0.33117">
            <text:p>33,12%</text:p>
          </table:table-cell>
          <table:table-cell office:value-type="percentage" office:value="2.28043">
            <text:p>228,04%</text:p>
          </table:table-cell>
          <table:table-cell office:value-type="float" office:value="1.101">
            <text:p>1,1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4.815">
            <text:p>24,815</text:p>
          </table:table-cell>
          <table:table-cell office:value-type="float" office:value="8.083062">
            <text:p>8,083062</text:p>
          </table:table-cell>
          <table:table-cell office:value-type="float" office:value="1.24412">
            <text:p>1,24412</text:p>
          </table:table-cell>
          <table:table-cell office:value-type="percentage" office:value="0.35614">
            <text:p>35,61%</text:p>
          </table:table-cell>
          <table:table-cell office:value-type="percentage" office:value="0.19139999">
            <text:p>19,14%</text:p>
          </table:table-cell>
          <table:table-cell office:value-type="float" office:value="0.593">
            <text:p>0,5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AP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73.07">
            <text:p>273,07</text:p>
          </table:table-cell>
          <table:table-cell office:value-type="float" office:value="36.555557">
            <text:p>36,555557</text:p>
          </table:table-cell>
          <table:table-cell office:value-type="float" office:value="1.52411">
            <text:p>1,52411</text:p>
          </table:table-cell>
          <table:table-cell office:value-type="percentage" office:value="0.34782">
            <text:p>34,78%</text:p>
          </table:table-cell>
          <table:table-cell office:value-type="percentage" office:value="1.7142199">
            <text:p>171,42%</text:p>
          </table:table-cell>
          <table:table-cell office:value-type="float" office:value="1.107">
            <text:p>1,1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NE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33.1">
            <text:p>133,1</text:p>
          </table:table-cell>
          <table:table-cell office:value-type="float" office:value="50.608364">
            <text:p>50,608364</text:p>
          </table:table-cell>
          <table:table-cell office:value-type="float" office:value="9.99">
            <text:p>9,99</text:p>
          </table:table-cell>
          <table:table-cell office:value-type="percentage" office:value="0.43453997">
            <text:p>43,45%</text:p>
          </table:table-cell>
          <table:table-cell office:value-type="percentage" office:value="0.31736">
            <text:p>31,74%</text:p>
          </table:table-cell>
          <table:table-cell office:value-type="float" office:value="1.411">
            <text:p>1,4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92.58">
            <text:p>392,58</text:p>
          </table:table-cell>
          <table:table-cell office:value-type="float" office:value="29.990831">
            <text:p>29,990831</text:p>
          </table:table-cell>
          <table:table-cell office:value-type="float" office:value="0.55305">
            <text:p>0,55305</text:p>
          </table:table-cell>
          <table:table-cell office:value-type="percentage" office:value="0.19984">
            <text:p>19,98%</text:p>
          </table:table-cell>
          <table:table-cell office:value-type="percentage" office:value="0.3721">
            <text:p>37,21%</text:p>
          </table:table-cell>
          <table:table-cell office:value-type="float" office:value="1.194">
            <text:p>1,194</text:p>
          </table:table-cell>
          <table:table-cell table:number-columns-repeated="1013"/>
        </table:table-row>
        <table:table-row table:style-name="ro2">
          <table:table-cell office:value-type="string">
            <text:p>AON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57.0801">
            <text:p>357,0801</text:p>
          </table:table-cell>
          <table:table-cell office:value-type="float" office:value="28.589281">
            <text:p>28,589281</text:p>
          </table:table-cell>
          <table:table-cell office:value-type="float" office:value="2.1488">
            <text:p>2,1488</text:p>
          </table:table-cell>
          <table:table-cell office:value-type="percentage" office:value="0.319">
            <text:p>31,90%</text:p>
          </table:table-cell>
          <table:table-cell office:value-type="percentage" office:value="0.3769">
            <text:p>37,69%</text:p>
          </table:table-cell>
          <table:table-cell office:value-type="float" office:value="0.833">
            <text:p>0,8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UK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17.64">
            <text:p>117,64</text:p>
          </table:table-cell>
          <table:table-cell office:value-type="float" office:value="18.525984">
            <text:p>18,525984</text:p>
          </table:table-cell>
          <table:table-cell office:value-type="float" office:value="1.70344">
            <text:p>1,70344</text:p>
          </table:table-cell>
          <table:table-cell office:value-type="percentage" office:value="0.51069">
            <text:p>51,07%</text:p>
          </table:table-cell>
          <table:table-cell office:value-type="percentage" office:value="0.09905">
            <text:p>9,91%</text:p>
          </table:table-cell>
          <table:table-cell office:value-type="float" office:value="0.477">
            <text:p>0,4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PL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93.47">
            <text:p>293,47</text:p>
          </table:table-cell>
          <table:table-cell office:value-type="float" office:value="42.593616">
            <text:p>42,593616</text:p>
          </table:table-cell>
          <table:table-cell office:value-type="float" office:value="1.292">
            <text:p>1,292</text:p>
          </table:table-cell>
          <table:table-cell office:value-type="percentage" office:value="0.83241">
            <text:p>83,24%</text:p>
          </table:table-cell>
          <table:table-cell office:value-type="percentage" office:value="0.3937">
            <text:p>39,37%</text:p>
          </table:table-cell>
          <table:table-cell office:value-type="float" office:value="0.964">
            <text:p>0,96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BAY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86.7">
            <text:p>86,7</text:p>
          </table:table-cell>
          <table:table-cell office:value-type="float" office:value="19.223946">
            <text:p>19,223946</text:p>
          </table:table-cell>
          <table:table-cell office:value-type="float" office:value="1.51155">
            <text:p>1,51155</text:p>
          </table:table-cell>
          <table:table-cell office:value-type="percentage" office:value="0.25565">
            <text:p>25,57%</text:p>
          </table:table-cell>
          <table:table-cell office:value-type="percentage" office:value="0.42430001">
            <text:p>42,43%</text:p>
          </table:table-cell>
          <table:table-cell office:value-type="float" office:value="1.341">
            <text:p>1,3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7.535">
            <text:p>27,535</text:p>
          </table:table-cell>
          <table:table-cell office:value-type="float" office:value="30.258242">
            <text:p>30,258242</text:p>
          </table:table-cell>
          <table:table-cell office:value-type="float" office:value="3.5698">
            <text:p>3,5698</text:p>
          </table:table-cell>
          <table:table-cell office:value-type="percentage" office:value="0.43460998">
            <text:p>43,46%</text:p>
          </table:table-cell>
          <table:table-cell office:value-type="percentage" office:value="0.25027">
            <text:p>25,03%</text:p>
          </table:table-cell>
          <table:table-cell office:value-type="float" office:value="1.112">
            <text:p>1,11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FIV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60.09">
            <text:p>260,09</text:p>
          </table:table-cell>
          <table:table-cell office:value-type="float" office:value="22.041525">
            <text:p>22,041525</text:p>
          </table:table-cell>
          <table:table-cell office:value-type="float" office:value="7.288">
            <text:p>7,288</text:p>
          </table:table-cell>
          <table:table-cell office:value-type="percentage" office:value="0.28621">
            <text:p>28,62%</text:p>
          </table:table-cell>
          <table:table-cell office:value-type="percentage" office:value="0.20602">
            <text:p>20,60%</text:p>
          </table:table-cell>
          <table:table-cell office:value-type="float" office:value="0.993">
            <text:p>0,9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R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2">
            <text:p>102</text:p>
          </table:table-cell>
          <table:table-cell office:value-type="float" office:value="25.888325">
            <text:p>25,888325</text:p>
          </table:table-cell>
          <table:table-cell office:value-type="float" office:value="1.3876">
            <text:p>1,3876</text:p>
          </table:table-cell>
          <table:table-cell office:value-type="percentage" office:value="0.63508">
            <text:p>63,51%</text:p>
          </table:table-cell>
          <table:table-cell office:value-type="percentage" office:value="0.10516">
            <text:p>10,52%</text:p>
          </table:table-cell>
          <table:table-cell office:value-type="float" office:value="1.017">
            <text:p>1,0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59.13">
            <text:p>59,13</text:p>
          </table:table-cell>
          <table:table-cell office:value-type="float" office:value="19.32353">
            <text:p>19,32353</text:p>
          </table:table-cell>
          <table:table-cell office:value-type="float" office:value="1.54315">
            <text:p>1,54315</text:p>
          </table:table-cell>
          <table:table-cell office:value-type="percentage" office:value="0.48473">
            <text:p>48,47%</text:p>
          </table:table-cell>
          <table:table-cell office:value-type="percentage" office:value="0.09204">
            <text:p>9,20%</text:p>
          </table:table-cell>
          <table:table-cell office:value-type="float" office:value="0.68">
            <text:p>0,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T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9.94">
            <text:p>129,94</text:p>
          </table:table-cell>
          <table:table-cell office:value-type="float" office:value="19.452097">
            <text:p>19,452097</text:p>
          </table:table-cell>
          <table:table-cell office:value-type="float" office:value="2.07975">
            <text:p>2,07975</text:p>
          </table:table-cell>
          <table:table-cell office:value-type="percentage" office:value="0.24248">
            <text:p>24,25%</text:p>
          </table:table-cell>
          <table:table-cell office:value-type="percentage" office:value="0.11658">
            <text:p>11,66%</text:p>
          </table:table-cell>
          <table:table-cell office:value-type="float" office:value="0.467">
            <text:p>0,4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4.975">
            <text:p>44,975</text:p>
          </table:table-cell>
          <table:table-cell office:value-type="float" office:value="19.554348">
            <text:p>19,554348</text:p>
          </table:table-cell>
          <table:table-cell office:value-type="float" office:value="1.93669">
            <text:p>1,93669</text:p>
          </table:table-cell>
          <table:table-cell office:value-type="percentage" office:value="0.31751">
            <text:p>31,75%</text:p>
          </table:table-cell>
          <table:table-cell office:value-type="percentage" office:value="0.11192001">
            <text:p>11,19%</text:p>
          </table:table-cell>
          <table:table-cell office:value-type="float" office:value="0.648">
            <text:p>0,6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12.205">
            <text:p>312,205</text:p>
          </table:table-cell>
          <table:table-cell office:value-type="float" office:value="41.738636">
            <text:p>41,738636</text:p>
          </table:table-cell>
          <table:table-cell office:value-type="float" office:value="1.15246">
            <text:p>1,15246</text:p>
          </table:table-cell>
          <table:table-cell office:value-type="percentage" office:value="0.25629">
            <text:p>25,63%</text:p>
          </table:table-cell>
          <table:table-cell office:value-type="percentage" office:value="0.42131">
            <text:p>42,13%</text:p>
          </table:table-cell>
          <table:table-cell office:value-type="float" office:value="1.405">
            <text:p>1,4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T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54.73">
            <text:p>254,73</text:p>
          </table:table-cell>
          <table:table-cell office:value-type="float" office:value="22.247162">
            <text:p>22,247162</text:p>
          </table:table-cell>
          <table:table-cell office:value-type="float" office:value="5.12089">
            <text:p>5,12089</text:p>
          </table:table-cell>
          <table:table-cell office:value-type="percentage" office:value="0.2034">
            <text:p>20,34%</text:p>
          </table:table-cell>
          <table:table-cell office:value-type="percentage" office:value="1.0925701">
            <text:p>109,26%</text:p>
          </table:table-cell>
          <table:table-cell office:value-type="float" office:value="1.081">
            <text:p>1,0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3.8">
            <text:p>63,8</text:p>
          </table:table-cell>
          <table:table-cell office:value-type="float" office:value="9.860897">
            <text:p>9,860897</text:p>
          </table:table-cell>
          <table:table-cell office:value-type="float" office:value="1.20581">
            <text:p>1,20581</text:p>
          </table:table-cell>
          <table:table-cell office:value-type="percentage" office:value="0.4345">
            <text:p>43,45%</text:p>
          </table:table-cell>
          <table:table-cell office:value-type="percentage" office:value="0.1354">
            <text:p>13,54%</text:p>
          </table:table-cell>
          <table:table-cell office:value-type="float" office:value="0.794">
            <text:p>0,7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CL</text:p>
          </table:table-cell>
          <table:table-cell office:value-type="string">
            <text:p>Basic Mate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64.3416">
            <text:p>264,3416</text:p>
          </table:table-cell>
          <table:table-cell office:value-type="float" office:value="37.980118">
            <text:p>37,980118</text:p>
          </table:table-cell>
          <table:table-cell office:value-type="float" office:value="1.03915">
            <text:p>1,03915</text:p>
          </table:table-cell>
          <table:table-cell office:value-type="percentage" office:value="0.23971">
            <text:p>23,97%</text:p>
          </table:table-cell>
          <table:table-cell office:value-type="percentage" office:value="0.21869">
            <text:p>21,87%</text:p>
          </table:table-cell>
          <table:table-cell office:value-type="float" office:value="0.982">
            <text:p>0,9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RM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04.8">
            <text:p>204,8</text:p>
          </table:table-cell>
          <table:table-cell office:value-type="float" office:value="25.283949">
            <text:p>25,283949</text:p>
          </table:table-cell>
          <table:table-cell office:value-type="float" office:value="2.342">
            <text:p>2,342</text:p>
          </table:table-cell>
          <table:table-cell office:value-type="percentage" office:value="0.28331">
            <text:p>28,33%</text:p>
          </table:table-cell>
          <table:table-cell office:value-type="percentage" office:value="0.19655001">
            <text:p>19,66%</text:p>
          </table:table-cell>
          <table:table-cell office:value-type="float" office:value="1.014">
            <text:p>1,0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O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7.575">
            <text:p>87,575</text:p>
          </table:table-cell>
          <table:table-cell office:value-type="float" office:value="21.784824">
            <text:p>21,784824</text:p>
          </table:table-cell>
          <table:table-cell office:value-type="float" office:value="1.92679">
            <text:p>1,92679</text:p>
          </table:table-cell>
          <table:table-cell office:value-type="percentage" office:value="0.47774">
            <text:p>47,77%</text:p>
          </table:table-cell>
          <table:table-cell office:value-type="percentage" office:value="0.11429">
            <text:p>11,43%</text:p>
          </table:table-cell>
          <table:table-cell office:value-type="float" office:value="0.444">
            <text:p>0,4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PG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7.19">
            <text:p>187,19</text:p>
          </table:table-cell>
          <table:table-cell office:value-type="float" office:value="27.247454">
            <text:p>27,247454</text:p>
          </table:table-cell>
          <table:table-cell office:value-type="float" office:value="8.84863">
            <text:p>8,84863</text:p>
          </table:table-cell>
          <table:table-cell office:value-type="percentage" office:value="0.73919">
            <text:p>73,92%</text:p>
          </table:table-cell>
          <table:table-cell office:value-type="percentage" office:value="0.82455003">
            <text:p>82,46%</text:p>
          </table:table-cell>
          <table:table-cell office:value-type="float" office:value="1.394">
            <text:p>1,3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SY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3.05">
            <text:p>183,05</text:p>
          </table:table-cell>
          <table:table-cell office:value-type="float" office:value="27.361734">
            <text:p>27,361734</text:p>
          </table:table-cell>
          <table:table-cell office:value-type="float" office:value="1.25764">
            <text:p>1,25764</text:p>
          </table:table-cell>
          <table:table-cell office:value-type="percentage" office:value="0.21329">
            <text:p>21,33%</text:p>
          </table:table-cell>
          <table:table-cell office:value-type="percentage" office:value="0.31013">
            <text:p>31,01%</text:p>
          </table:table-cell>
          <table:table-cell office:value-type="float" office:value="0.177">
            <text:p>0,1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DD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6.93">
            <text:p>126,93</text:p>
          </table:table-cell>
          <table:table-cell office:value-type="float" office:value="21.92228">
            <text:p>21,92228</text:p>
          </table:table-cell>
          <table:table-cell office:value-type="float" office:value="42.17211">
            <text:p>42,17211</text:p>
          </table:table-cell>
          <table:table-cell office:value-type="percentage" office:value="0.2502">
            <text:p>25,02%</text:p>
          </table:table-cell>
          <table:table-cell office:value-type="percentage" office:value="3.69454">
            <text:p>369,45%</text:p>
          </table:table-cell>
          <table:table-cell office:value-type="float" office:value="0.947">
            <text:p>0,9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ON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97.2869">
            <text:p>197,2869</text:p>
          </table:table-cell>
          <table:table-cell office:value-type="float" office:value="20.810856">
            <text:p>20,810856</text:p>
          </table:table-cell>
          <table:table-cell office:value-type="float" office:value="2.15247">
            <text:p>2,15247</text:p>
          </table:table-cell>
          <table:table-cell office:value-type="percentage" office:value="0.24042">
            <text:p>24,04%</text:p>
          </table:table-cell>
          <table:table-cell office:value-type="percentage" office:value="0.34616002">
            <text:p>34,62%</text:p>
          </table:table-cell>
          <table:table-cell office:value-type="float" office:value="0.949">
            <text:p>0,9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NPS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477.325">
            <text:p>477,325</text:p>
          </table:table-cell>
          <table:table-cell office:value-type="float" office:value="59.295033">
            <text:p>59,295033</text:p>
          </table:table-cell>
          <table:table-cell office:value-type="float" office:value="0.50459">
            <text:p>0,50459</text:p>
          </table:table-cell>
          <table:table-cell office:value-type="percentage" office:value="0.18827999">
            <text:p>18,83%</text:p>
          </table:table-cell>
          <table:table-cell office:value-type="percentage" office:value="0.0716">
            <text:p>7,16%</text:p>
          </table:table-cell>
          <table:table-cell office:value-type="float" office:value="1.154">
            <text:p>1,154</text:p>
          </table:table-cell>
          <table:table-cell table:number-columns-repeated="1013"/>
        </table:table-row>
        <table:table-row table:style-name="ro2">
          <table:table-cell office:value-type="string">
            <text:p>TMUS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04.035">
            <text:p>204,035</text:p>
          </table:table-cell>
          <table:table-cell office:value-type="float" office:value="19.656551">
            <text:p>19,656551</text:p>
          </table:table-cell>
          <table:table-cell office:value-type="float" office:value="2.00622">
            <text:p>2,00622</text:p>
          </table:table-cell>
          <table:table-cell office:value-type="percentage" office:value="0.37931">
            <text:p>37,93%</text:p>
          </table:table-cell>
          <table:table-cell office:value-type="percentage" office:value="0.19034">
            <text:p>19,03%</text:p>
          </table:table-cell>
          <table:table-cell office:value-type="float" office:value="0.436">
            <text:p>0,4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OW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3.74">
            <text:p>103,74</text:p>
          </table:table-cell>
          <table:table-cell office:value-type="float" office:value="11.312977">
            <text:p>11,312977</text:p>
          </table:table-cell>
          <table:table-cell office:value-type="float" office:value="4.09">
            <text:p>4,09</text:p>
          </table:table-cell>
          <table:table-cell office:value-type="percentage" office:value="0.38909">
            <text:p>38,91%</text:p>
          </table:table-cell>
          <table:table-cell office:value-type="percentage" office:value="0.1867">
            <text:p>18,67%</text:p>
          </table:table-cell>
          <table:table-cell office:value-type="float" office:value="1.538">
            <text:p>1,5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GP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5.27">
            <text:p>185,27</text:p>
          </table:table-cell>
          <table:table-cell office:value-type="float" office:value="25.0027">
            <text:p>25,0027</text:p>
          </table:table-cell>
          <table:table-cell office:value-type="float" office:value="6.15121">
            <text:p>6,15121</text:p>
          </table:table-cell>
          <table:table-cell office:value-type="percentage" office:value="0.26632">
            <text:p>26,63%</text:p>
          </table:table-cell>
          <table:table-cell office:value-type="percentage" office:value="0.4985">
            <text:p>49,85%</text:p>
          </table:table-cell>
          <table:table-cell office:value-type="float" office:value="0.891">
            <text:p>0,89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E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96.71">
            <text:p>196,71</text:p>
          </table:table-cell>
          <table:table-cell office:value-type="float" office:value="71.79197">
            <text:p>71,79197</text:p>
          </table:table-cell>
          <table:table-cell office:value-type="float" office:value="9.89">
            <text:p>9,89</text:p>
          </table:table-cell>
          <table:table-cell office:value-type="percentage" office:value="0.22343999">
            <text:p>22,34%</text:p>
          </table:table-cell>
          <table:table-cell office:value-type="percentage" office:value="0.15767999">
            <text:p>15,77%</text:p>
          </table:table-cell>
          <table:table-cell office:value-type="float" office:value="1.848">
            <text:p>1,84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22.51">
            <text:p>222,51</text:p>
          </table:table-cell>
          <table:table-cell office:value-type="float" office:value="34.985847">
            <text:p>34,985847</text:p>
          </table:table-cell>
          <table:table-cell office:value-type="float" office:value="2.45399">
            <text:p>2,45399</text:p>
          </table:table-cell>
          <table:table-cell office:value-type="percentage" office:value="0.29362">
            <text:p>29,36%</text:p>
          </table:table-cell>
          <table:table-cell office:value-type="percentage" office:value="0.29328">
            <text:p>29,33%</text:p>
          </table:table-cell>
          <table:table-cell office:value-type="float" office:value="0.586">
            <text:p>0,5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NT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65.55">
            <text:p>65,55</text:p>
          </table:table-cell>
          <table:table-cell office:value-type="float" office:value="20.613209">
            <text:p>20,613209</text:p>
          </table:table-cell>
          <table:table-cell office:value-type="float" office:value="1.63145">
            <text:p>1,63145</text:p>
          </table:table-cell>
          <table:table-cell office:value-type="percentage" office:value="0.43636">
            <text:p>43,64%</text:p>
          </table:table-cell>
          <table:table-cell office:value-type="percentage" office:value="0.11461">
            <text:p>11,46%</text:p>
          </table:table-cell>
          <table:table-cell office:value-type="float" office:value="0.654">
            <text:p>0,6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ELL</text:p>
          </table:table-cell>
          <table:table-cell office:value-type="string">
            <text:p>Real Estate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88.34">
            <text:p>188,34</text:p>
          </table:table-cell>
          <table:table-cell office:value-type="float" office:value="130.79166">
            <text:p>130,79166</text:p>
          </table:table-cell>
          <table:table-cell office:value-type="float" office:value="0.46211">
            <text:p>0,46211</text:p>
          </table:table-cell>
          <table:table-cell office:value-type="percentage" office:value="0.3787">
            <text:p>37,87%</text:p>
          </table:table-cell>
          <table:table-cell office:value-type="percentage" office:value="0.0275">
            <text:p>2,75%</text:p>
          </table:table-cell>
          <table:table-cell office:value-type="float" office:value="0.84">
            <text:p>0,84</text:p>
          </table:table-cell>
          <table:table-cell table:number-columns-repeated="1013"/>
        </table:table-row>
        <table:table-row table:style-name="ro2">
          <table:table-cell office:value-type="string">
            <text:p>WEC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6.056">
            <text:p>106,056</text:p>
          </table:table-cell>
          <table:table-cell office:value-type="float" office:value="20.086363">
            <text:p>20,086363</text:p>
          </table:table-cell>
          <table:table-cell office:value-type="float" office:value="1.51448">
            <text:p>1,51448</text:p>
          </table:table-cell>
          <table:table-cell office:value-type="percentage" office:value="0.39508">
            <text:p>39,51%</text:p>
          </table:table-cell>
          <table:table-cell office:value-type="percentage" office:value="0.12807">
            <text:p>12,81%</text:p>
          </table:table-cell>
          <table:table-cell office:value-type="float" office:value="0.556">
            <text:p>0,5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B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0.075">
            <text:p>60,075</text:p>
          </table:table-cell>
          <table:table-cell office:value-type="float" office:value="31.126944">
            <text:p>31,126944</text:p>
          </table:table-cell>
          <table:table-cell office:value-type="float" office:value="1.88338">
            <text:p>1,88338</text:p>
          </table:table-cell>
          <table:table-cell office:value-type="percentage" office:value="0.54352003">
            <text:p>54,35%</text:p>
          </table:table-cell>
          <table:table-cell office:value-type="percentage" office:value="0.16902">
            <text:p>16,90%</text:p>
          </table:table-cell>
          <table:table-cell office:value-type="float" office:value="0.637">
            <text:p>0,6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XEL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4.2099">
            <text:p>74,2099</text:p>
          </table:table-cell>
          <table:table-cell office:value-type="float" office:value="22.62497">
            <text:p>22,62497</text:p>
          </table:table-cell>
          <table:table-cell office:value-type="float" office:value="1.67891">
            <text:p>1,67891</text:p>
          </table:table-cell>
          <table:table-cell office:value-type="percentage" office:value="0.40013">
            <text:p>40,01%</text:p>
          </table:table-cell>
          <table:table-cell office:value-type="percentage" office:value="0.09449001">
            <text:p>9,45%</text:p>
          </table:table-cell>
          <table:table-cell office:value-type="float" office:value="0.453">
            <text:p>0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ST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76.37">
            <text:p>276,37</text:p>
          </table:table-cell>
          <table:table-cell office:value-type="float" office:value="40.943703">
            <text:p>40,943703</text:p>
          </table:table-cell>
          <table:table-cell office:value-type="float" office:value="9.93">
            <text:p>9,93</text:p>
          </table:table-cell>
          <table:table-cell office:value-type="percentage" office:value="0.26555002">
            <text:p>26,56%</text:p>
          </table:table-cell>
          <table:table-cell office:value-type="percentage" office:value="0.16945">
            <text:p>16,95%</text:p>
          </table:table-cell>
          <table:table-cell office:value-type="float" office:value="1.166">
            <text:p>1,1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D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76.6">
            <text:p>176,6</text:p>
          </table:table-cell>
          <table:table-cell office:value-type="float" office:value="24.873241">
            <text:p>24,873241</text:p>
          </table:table-cell>
          <table:table-cell office:value-type="float" office:value="9.99">
            <text:p>9,99</text:p>
          </table:table-cell>
          <table:table-cell office:value-type="percentage" office:value="0.28995">
            <text:p>29,00%</text:p>
          </table:table-cell>
          <table:table-cell office:value-type="percentage" office:value="0.29707">
            <text:p>29,71%</text:p>
          </table:table-cell>
          <table:table-cell office:value-type="float" office:value="1.886">
            <text:p>1,8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LTO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1.41">
            <text:p>101,41</text:p>
          </table:table-cell>
          <table:table-cell office:value-type="float" office:value="27.783562">
            <text:p>27,783562</text:p>
          </table:table-cell>
          <table:table-cell office:value-type="float" office:value="1.00772">
            <text:p>1,00772</text:p>
          </table:table-cell>
          <table:table-cell office:value-type="percentage" office:value="0.24725">
            <text:p>24,73%</text:p>
          </table:table-cell>
          <table:table-cell office:value-type="percentage" office:value="0.37978">
            <text:p>37,98%</text:p>
          </table:table-cell>
          <table:table-cell office:value-type="float" office:value="1.107">
            <text:p>1,1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RSK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24.31">
            <text:p>224,31</text:p>
          </table:table-cell>
          <table:table-cell office:value-type="float" office:value="34.562405">
            <text:p>34,562405</text:p>
          </table:table-cell>
          <table:table-cell office:value-type="float" office:value="12.95046">
            <text:p>12,95046</text:p>
          </table:table-cell>
          <table:table-cell office:value-type="percentage" office:value="0.49173">
            <text:p>49,17%</text:p>
          </table:table-cell>
          <table:table-cell office:value-type="percentage" office:value="2.68133">
            <text:p>268,13%</text:p>
          </table:table-cell>
          <table:table-cell office:value-type="float" office:value="0.814">
            <text:p>0,8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ILD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23.6">
            <text:p>123,6</text:p>
          </table:table-cell>
          <table:table-cell office:value-type="float" office:value="19.133127">
            <text:p>19,133127</text:p>
          </table:table-cell>
          <table:table-cell office:value-type="float" office:value="1.16243">
            <text:p>1,16243</text:p>
          </table:table-cell>
          <table:table-cell office:value-type="percentage" office:value="0.48599">
            <text:p>48,60%</text:p>
          </table:table-cell>
          <table:table-cell office:value-type="percentage" office:value="0.40706003">
            <text:p>40,71%</text:p>
          </table:table-cell>
          <table:table-cell office:value-type="float" office:value="0.331">
            <text:p>0,3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VT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97.25">
            <text:p>97,25</text:p>
          </table:table-cell>
          <table:table-cell office:value-type="float" office:value="50.128864">
            <text:p>50,128864</text:p>
          </table:table-cell>
          <table:table-cell office:value-type="float" office:value="0.45676">
            <text:p>0,45676</text:p>
          </table:table-cell>
          <table:table-cell office:value-type="percentage" office:value="0.29303">
            <text:p>29,30%</text:p>
          </table:table-cell>
          <table:table-cell office:value-type="percentage" office:value="0.0304">
            <text:p>3,04%</text:p>
          </table:table-cell>
          <table:table-cell office:value-type="float" office:value="1.061">
            <text:p>1,061</text:p>
          </table:table-cell>
          <table:table-cell table:number-columns-repeated="1013"/>
        </table:table-row>
        <table:table-row table:style-name="ro2">
          <table:table-cell office:value-type="string">
            <text:p>CSX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6.625">
            <text:p>36,625</text:p>
          </table:table-cell>
          <table:table-cell office:value-type="float" office:value="23.782469">
            <text:p>23,782469</text:p>
          </table:table-cell>
          <table:table-cell office:value-type="float" office:value="1.55283">
            <text:p>1,55283</text:p>
          </table:table-cell>
          <table:table-cell office:value-type="percentage" office:value="0.46293">
            <text:p>46,29%</text:p>
          </table:table-cell>
          <table:table-cell office:value-type="percentage" office:value="0.22589001">
            <text:p>22,59%</text:p>
          </table:table-cell>
          <table:table-cell office:value-type="float" office:value="1.299">
            <text:p>1,29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ECH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8.95">
            <text:p>58,95</text:p>
          </table:table-cell>
          <table:table-cell office:value-type="float" office:value="120.30612">
            <text:p>120,30612</text:p>
          </table:table-cell>
          <table:table-cell office:value-type="float" office:value="0.20067">
            <text:p>0,20067</text:p>
          </table:table-cell>
          <table:table-cell office:value-type="percentage" office:value="0.26734">
            <text:p>26,73%</text:p>
          </table:table-cell>
          <table:table-cell office:value-type="percentage" office:value="0.038">
            <text:p>3,80%</text:p>
          </table:table-cell>
          <table:table-cell office:value-type="float" office:value="1.463">
            <text:p>1,463</text:p>
          </table:table-cell>
          <table:table-cell table:number-columns-repeated="1013"/>
        </table:table-row>
        <table:table-row table:style-name="ro2">
          <table:table-cell office:value-type="string">
            <text:p>XYZ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65.73">
            <text:p>65,73</text:p>
          </table:table-cell>
          <table:table-cell office:value-type="float" office:value="13.225353">
            <text:p>13,225353</text:p>
          </table:table-cell>
          <table:table-cell office:value-type="float" office:value="0.36049">
            <text:p>0,36049</text:p>
          </table:table-cell>
          <table:table-cell office:value-type="percentage" office:value="0.06964">
            <text:p>6,96%</text:p>
          </table:table-cell>
          <table:table-cell office:value-type="percentage" office:value="0.14692001">
            <text:p>14,69%</text:p>
          </table:table-cell>
          <table:table-cell office:value-type="float" office:value="2.658">
            <text:p>2,658</text:p>
          </table:table-cell>
          <table:table-cell table:number-columns-repeated="1013"/>
        </table:table-row>
        <table:table-row table:style-name="ro2">
          <table:table-cell office:value-type="string">
            <text:p>RC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82.4964">
            <text:p>282,4964</text:p>
          </table:table-cell>
          <table:table-cell office:value-type="float" office:value="18.99774">
            <text:p>18,99774</text:p>
          </table:table-cell>
          <table:table-cell office:value-type="float" office:value="2.03878">
            <text:p>2,03878</text:p>
          </table:table-cell>
          <table:table-cell office:value-type="percentage" office:value="0.36033002">
            <text:p>36,03%</text:p>
          </table:table-cell>
          <table:table-cell office:value-type="percentage" office:value="0.46677">
            <text:p>46,68%</text:p>
          </table:table-cell>
          <table:table-cell office:value-type="float" office:value="1.914">
            <text:p>1,9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E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772.03">
            <text:p>772,03</text:p>
          </table:table-cell>
          <table:table-cell office:value-type="float" office:value="18.48731">
            <text:p>18,48731</text:p>
          </table:table-cell>
          <table:table-cell office:value-type="float" office:value="8.739">
            <text:p>8,739</text:p>
          </table:table-cell>
          <table:table-cell office:value-type="percentage" office:value="0.30517">
            <text:p>30,52%</text:p>
          </table:table-cell>
          <table:table-cell office:value-type="percentage" office:value="0.15188">
            <text:p>15,19%</text:p>
          </table:table-cell>
          <table:table-cell office:value-type="float" office:value="0.368">
            <text:p>0,3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SG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14.785">
            <text:p>214,785</text:p>
          </table:table-cell>
          <table:table-cell office:value-type="float" office:value="31.867212">
            <text:p>31,867212</text:p>
          </table:table-cell>
          <table:table-cell office:value-type="float" office:value="1.13763">
            <text:p>1,13763</text:p>
          </table:table-cell>
          <table:table-cell office:value-type="percentage" office:value="0.31269">
            <text:p>31,27%</text:p>
          </table:table-cell>
          <table:table-cell office:value-type="percentage" office:value="0.18249">
            <text:p>18,25%</text:p>
          </table:table-cell>
          <table:table-cell office:value-type="float" office:value="0.55">
            <text:p>0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OST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1.295">
            <text:p>181,295</text:p>
          </table:table-cell>
          <table:table-cell office:value-type="float" office:value="28.327343">
            <text:p>28,327343</text:p>
          </table:table-cell>
          <table:table-cell office:value-type="float" office:value="0.88181">
            <text:p>0,88181</text:p>
          </table:table-cell>
          <table:table-cell office:value-type="percentage" office:value="0.14146">
            <text:p>14,15%</text:p>
          </table:table-cell>
          <table:table-cell office:value-type="percentage" office:value="0.37425">
            <text:p>37,43%</text:p>
          </table:table-cell>
          <table:table-cell office:value-type="float" office:value="1.038">
            <text:p>1,038</text:p>
          </table:table-cell>
          <table:table-cell table:number-columns-repeated="1013"/>
        </table:table-row>
        <table:table-row table:style-name="ro2">
          <table:table-cell office:value-type="string">
            <text:p>IBM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303.64">
            <text:p>303,64</text:p>
          </table:table-cell>
          <table:table-cell office:value-type="float" office:value="36.23389">
            <text:p>36,23389</text:p>
          </table:table-cell>
          <table:table-cell office:value-type="float" office:value="2.37831">
            <text:p>2,37831</text:p>
          </table:table-cell>
          <table:table-cell office:value-type="percentage" office:value="0.22999">
            <text:p>23,00%</text:p>
          </table:table-cell>
          <table:table-cell office:value-type="percentage" office:value="0.30156">
            <text:p>30,16%</text:p>
          </table:table-cell>
          <table:table-cell office:value-type="float" office:value="0.689">
            <text:p>0,6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D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99.995">
            <text:p>99,995</text:p>
          </table:table-cell>
          <table:table-cell office:value-type="float" office:value="17.481644">
            <text:p>17,481644</text:p>
          </table:table-cell>
          <table:table-cell office:value-type="float" office:value="1.10373">
            <text:p>1,10373</text:p>
          </table:table-cell>
          <table:table-cell office:value-type="percentage" office:value="0.35846">
            <text:p>35,85%</text:p>
          </table:table-cell>
          <table:table-cell office:value-type="percentage" office:value="0.08839">
            <text:p>8,84%</text:p>
          </table:table-cell>
          <table:table-cell office:value-type="float" office:value="0.362">
            <text:p>0,3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TZ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39.715">
            <text:p>139,715</text:p>
          </table:table-cell>
          <table:table-cell office:value-type="float" office:value="20.336971">
            <text:p>20,336971</text:p>
          </table:table-cell>
          <table:table-cell office:value-type="float" office:value="1.35429">
            <text:p>1,35429</text:p>
          </table:table-cell>
          <table:table-cell office:value-type="percentage" office:value="0.37640998">
            <text:p>37,64%</text:p>
          </table:table-cell>
          <table:table-cell office:value-type="percentage" office:value="0.15912">
            <text:p>15,91%</text:p>
          </table:table-cell>
          <table:table-cell office:value-type="float" office:value="0.459">
            <text:p>0,4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R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9.545">
            <text:p>39,545</text:p>
          </table:table-cell>
          <table:table-cell office:value-type="float" office:value="24.260735">
            <text:p>24,260735</text:p>
          </table:table-cell>
          <table:table-cell office:value-type="float" office:value="1.039">
            <text:p>1,039</text:p>
          </table:table-cell>
          <table:table-cell office:value-type="percentage" office:value="0.42539">
            <text:p>42,54%</text:p>
          </table:table-cell>
          <table:table-cell office:value-type="percentage" office:value="0.18124">
            <text:p>18,12%</text:p>
          </table:table-cell>
          <table:table-cell office:value-type="float" office:value="1.119">
            <text:p>1,1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CSA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0.0899">
            <text:p>30,0899</text:p>
          </table:table-cell>
          <table:table-cell office:value-type="float" office:value="4.998322">
            <text:p>4,998322</text:p>
          </table:table-cell>
          <table:table-cell office:value-type="float" office:value="1.01462">
            <text:p>1,01462</text:p>
          </table:table-cell>
          <table:table-cell office:value-type="percentage" office:value="0.30844">
            <text:p>30,84%</text:p>
          </table:table-cell>
          <table:table-cell office:value-type="percentage" office:value="0.24186">
            <text:p>24,19%</text:p>
          </table:table-cell>
          <table:table-cell office:value-type="float" office:value="0.829">
            <text:p>0,8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PL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5.3">
            <text:p>35,3</text:p>
          </table:table-cell>
          <table:table-cell office:value-type="float" office:value="24.013605">
            <text:p>24,013605</text:p>
          </table:table-cell>
          <table:table-cell office:value-type="float" office:value="1.32089">
            <text:p>1,32089</text:p>
          </table:table-cell>
          <table:table-cell office:value-type="percentage" office:value="0.38089">
            <text:p>38,09%</text:p>
          </table:table-cell>
          <table:table-cell office:value-type="percentage" office:value="0.076620005">
            <text:p>7,66%</text:p>
          </table:table-cell>
          <table:table-cell office:value-type="float" office:value="0.703">
            <text:p>0,7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E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85">
            <text:p>80,85</text:p>
          </table:table-cell>
          <table:table-cell office:value-type="float" office:value="19.435097">
            <text:p>19,435097</text:p>
          </table:table-cell>
          <table:table-cell office:value-type="float" office:value="1.38209">
            <text:p>1,38209</text:p>
          </table:table-cell>
          <table:table-cell office:value-type="percentage" office:value="0.37839">
            <text:p>37,84%</text:p>
          </table:table-cell>
          <table:table-cell office:value-type="percentage" office:value="0.12579">
            <text:p>12,58%</text:p>
          </table:table-cell>
          <table:table-cell office:value-type="float" office:value="0.604">
            <text:p>0,6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M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4.035">
            <text:p>54,035</text:p>
          </table:table-cell>
          <table:table-cell office:value-type="float" office:value="18.193602">
            <text:p>18,193602</text:p>
          </table:table-cell>
          <table:table-cell office:value-type="float" office:value="2.74414">
            <text:p>2,74414</text:p>
          </table:table-cell>
          <table:table-cell office:value-type="percentage" office:value="0.40007">
            <text:p>40,01%</text:p>
          </table:table-cell>
          <table:table-cell office:value-type="percentage" office:value="0.33777002">
            <text:p>33,78%</text:p>
          </table:table-cell>
          <table:table-cell office:value-type="float" office:value="0.302">
            <text:p>0,30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A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60.22">
            <text:p>260,22</text:p>
          </table:table-cell>
          <table:table-cell office:value-type="float" office:value="27.049896">
            <text:p>27,049896</text:p>
          </table:table-cell>
          <table:table-cell office:value-type="float" office:value="1.06758">
            <text:p>1,06758</text:p>
          </table:table-cell>
          <table:table-cell office:value-type="percentage" office:value="0.70475996">
            <text:p>70,48%</text:p>
          </table:table-cell>
          <table:table-cell office:value-type="percentage" office:value="0.19933">
            <text:p>19,93%</text:p>
          </table:table-cell>
          <table:table-cell office:value-type="float" office:value="0.986">
            <text:p>0,9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VGO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50.4101">
            <text:p>350,4101</text:p>
          </table:table-cell>
          <table:table-cell office:value-type="float" office:value="73.15451">
            <text:p>73,15451</text:p>
          </table:table-cell>
          <table:table-cell office:value-type="float" office:value="1.66032">
            <text:p>1,66032</text:p>
          </table:table-cell>
          <table:table-cell office:value-type="percentage" office:value="0.54789">
            <text:p>54,79%</text:p>
          </table:table-cell>
          <table:table-cell office:value-type="percentage" office:value="0.31048">
            <text:p>31,05%</text:p>
          </table:table-cell>
          <table:table-cell office:value-type="float" office:value="1.204">
            <text:p>1,2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25.99">
            <text:p>225,99</text:p>
          </table:table-cell>
          <table:table-cell office:value-type="float" office:value="28.898977">
            <text:p>28,898977</text:p>
          </table:table-cell>
          <table:table-cell office:value-type="float" office:value="1.32063">
            <text:p>1,32063</text:p>
          </table:table-cell>
          <table:table-cell office:value-type="percentage" office:value="0.24714">
            <text:p>24,71%</text:p>
          </table:table-cell>
          <table:table-cell office:value-type="percentage" office:value="0.38215">
            <text:p>38,22%</text:p>
          </table:table-cell>
          <table:table-cell office:value-type="float" office:value="0.994">
            <text:p>0,9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GX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75.87">
            <text:p>175,87</text:p>
          </table:table-cell>
          <table:table-cell office:value-type="float" office:value="20.666273">
            <text:p>20,666273</text:p>
          </table:table-cell>
          <table:table-cell office:value-type="float" office:value="0.86524">
            <text:p>0,86524</text:p>
          </table:table-cell>
          <table:table-cell office:value-type="percentage" office:value="0.19733">
            <text:p>19,73%</text:p>
          </table:table-cell>
          <table:table-cell office:value-type="percentage" office:value="0.14353">
            <text:p>14,35%</text:p>
          </table:table-cell>
          <table:table-cell office:value-type="float" office:value="0.616">
            <text:p>0,616</text:p>
          </table:table-cell>
          <table:table-cell table:number-columns-repeated="1013"/>
        </table:table-row>
        <table:table-row table:style-name="ro2">
          <table:table-cell office:value-type="string">
            <text:p>RJ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62.88">
            <text:p>162,88</text:p>
          </table:table-cell>
          <table:table-cell office:value-type="float" office:value="15.813592">
            <text:p>15,813592</text:p>
          </table:table-cell>
          <table:table-cell office:value-type="float" office:value="0.48456">
            <text:p>0,48456</text:p>
          </table:table-cell>
          <table:table-cell office:value-type="percentage" office:value="0">
            <text:p>0,00%</text:p>
          </table:table-cell>
          <table:table-cell office:value-type="percentage" office:value="0.17666">
            <text:p>17,67%</text:p>
          </table:table-cell>
          <table:table-cell office:value-type="float" office:value="1.008">
            <text:p>1,008</text:p>
          </table:table-cell>
          <table:table-cell table:number-columns-repeated="1013"/>
        </table:table-row>
        <table:table-row table:style-name="ro2">
          <table:table-cell office:value-type="string">
            <text:p>KMI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7.525">
            <text:p>27,525</text:p>
          </table:table-cell>
          <table:table-cell office:value-type="float" office:value="22.561474">
            <text:p>22,561474</text:p>
          </table:table-cell>
          <table:table-cell office:value-type="float" office:value="1.02138">
            <text:p>1,02138</text:p>
          </table:table-cell>
          <table:table-cell office:value-type="percentage" office:value="0.41794997">
            <text:p>41,79%</text:p>
          </table:table-cell>
          <table:table-cell office:value-type="percentage" office:value="0.08884">
            <text:p>8,88%</text:p>
          </table:table-cell>
          <table:table-cell office:value-type="float" office:value="0.667">
            <text:p>0,6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CA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11.275">
            <text:p>111,275</text:p>
          </table:table-cell>
          <table:table-cell office:value-type="float" office:value="21.818628">
            <text:p>21,818628</text:p>
          </table:table-cell>
          <table:table-cell office:value-type="float" office:value="0.82453">
            <text:p>0,82453</text:p>
          </table:table-cell>
          <table:table-cell office:value-type="percentage" office:value="0.12946999">
            <text:p>12,95%</text:p>
          </table:table-cell>
          <table:table-cell office:value-type="percentage" office:value="0.14151">
            <text:p>14,15%</text:p>
          </table:table-cell>
          <table:table-cell office:value-type="float" office:value="1.017">
            <text:p>1,017</text:p>
          </table:table-cell>
          <table:table-cell table:number-columns-repeated="1013"/>
        </table:table-row>
        <table:table-row table:style-name="ro2">
          <table:table-cell office:value-type="string">
            <text:p>ITW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50.63">
            <text:p>250,63</text:p>
          </table:table-cell>
          <table:table-cell office:value-type="float" office:value="24.285854">
            <text:p>24,285854</text:p>
          </table:table-cell>
          <table:table-cell office:value-type="float" office:value="2.78654">
            <text:p>2,78654</text:p>
          </table:table-cell>
          <table:table-cell office:value-type="percentage" office:value="0.28917998">
            <text:p>28,92%</text:p>
          </table:table-cell>
          <table:table-cell office:value-type="percentage" office:value="0.91683">
            <text:p>91,68%</text:p>
          </table:table-cell>
          <table:table-cell office:value-type="float" office:value="1.151">
            <text:p>1,1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NW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89.245">
            <text:p>89,245</text:p>
          </table:table-cell>
          <table:table-cell office:value-type="float" office:value="18.401031">
            <text:p>18,401031</text:p>
          </table:table-cell>
          <table:table-cell office:value-type="float" office:value="1.97565">
            <text:p>1,97565</text:p>
          </table:table-cell>
          <table:table-cell office:value-type="percentage" office:value="0.38232">
            <text:p>38,23%</text:p>
          </table:table-cell>
          <table:table-cell office:value-type="percentage" office:value="0.087749995">
            <text:p>8,77%</text:p>
          </table:table-cell>
          <table:table-cell office:value-type="float" office:value="0.532">
            <text:p>0,5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CG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.0701">
            <text:p>16,0701</text:p>
          </table:table-cell>
          <table:table-cell office:value-type="float" office:value="13.504286">
            <text:p>13,504286</text:p>
          </table:table-cell>
          <table:table-cell office:value-type="float" office:value="1.8552">
            <text:p>1,8552</text:p>
          </table:table-cell>
          <table:table-cell office:value-type="percentage" office:value="0.3866">
            <text:p>38,66%</text:p>
          </table:table-cell>
          <table:table-cell office:value-type="percentage" office:value="0.0876">
            <text:p>8,76%</text:p>
          </table:table-cell>
          <table:table-cell office:value-type="float" office:value="0.371">
            <text:p>0,3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AY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0.68">
            <text:p>160,68</text:p>
          </table:table-cell>
          <table:table-cell office:value-type="float" office:value="19.960247">
            <text:p>19,960247</text:p>
          </table:table-cell>
          <table:table-cell office:value-type="float" office:value="4.943">
            <text:p>4,943</text:p>
          </table:table-cell>
          <table:table-cell office:value-type="percentage" office:value="0.26208">
            <text:p>26,21%</text:p>
          </table:table-cell>
          <table:table-cell office:value-type="percentage" office:value="0.28557">
            <text:p>28,56%</text:p>
          </table:table-cell>
          <table:table-cell office:value-type="float" office:value="0.842">
            <text:p>0,84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AYX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13.37">
            <text:p>113,37</text:p>
          </table:table-cell>
          <table:table-cell office:value-type="float" office:value="25.64932">
            <text:p>25,64932</text:p>
          </table:table-cell>
          <table:table-cell office:value-type="float" office:value="1.29814">
            <text:p>1,29814</text:p>
          </table:table-cell>
          <table:table-cell office:value-type="percentage" office:value="0.47522">
            <text:p>47,52%</text:p>
          </table:table-cell>
          <table:table-cell office:value-type="percentage" office:value="0.40884998">
            <text:p>40,88%</text:p>
          </table:table-cell>
          <table:table-cell office:value-type="float" office:value="0.898">
            <text:p>0,8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LTR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82.6515">
            <text:p>182,6515</text:p>
          </table:table-cell>
          <table:table-cell office:value-type="float" office:value="415.11707">
            <text:p>415,11707</text:p>
          </table:table-cell>
          <table:table-cell office:value-type="float" office:value="3.52">
            <text:p>3,52</text:p>
          </table:table-cell>
          <table:table-cell office:value-type="percentage" office:value="0.22478001">
            <text:p>22,48%</text:p>
          </table:table-cell>
          <table:table-cell office:value-type="percentage" office:value="0.19504">
            <text:p>19,50%</text:p>
          </table:table-cell>
          <table:table-cell office:value-type="float" office:value="1.495">
            <text:p>1,4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RCL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97.82">
            <text:p>197,82</text:p>
          </table:table-cell>
          <table:table-cell office:value-type="float" office:value="37.25424">
            <text:p>37,25424</text:p>
          </table:table-cell>
          <table:table-cell office:value-type="float" office:value="4.32511">
            <text:p>4,32511</text:p>
          </table:table-cell>
          <table:table-cell office:value-type="percentage" office:value="0.43048">
            <text:p>43,05%</text:p>
          </table:table-cell>
          <table:table-cell office:value-type="percentage" office:value="0.69026">
            <text:p>69,03%</text:p>
          </table:table-cell>
          <table:table-cell office:value-type="float" office:value="1.659">
            <text:p>1,6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HTR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210.41">
            <text:p>210,41</text:p>
          </table:table-cell>
          <table:table-cell office:value-type="float" office:value="5.834997">
            <text:p>5,834997</text:p>
          </table:table-cell>
          <table:table-cell office:value-type="float" office:value="4.97907">
            <text:p>4,97907</text:p>
          </table:table-cell>
          <table:table-cell office:value-type="percentage" office:value="0.40098998">
            <text:p>40,10%</text:p>
          </table:table-cell>
          <table:table-cell office:value-type="percentage" office:value="0.31327">
            <text:p>31,33%</text:p>
          </table:table-cell>
          <table:table-cell office:value-type="float" office:value="1.065">
            <text:p>1,06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80.74">
            <text:p>80,74</text:p>
          </table:table-cell>
          <table:table-cell office:value-type="float" office:value="59.807404">
            <text:p>59,807404</text:p>
          </table:table-cell>
          <table:table-cell office:value-type="float" office:value="0.4762">
            <text:p>0,4762</text:p>
          </table:table-cell>
          <table:table-cell office:value-type="percentage" office:value="0.26426">
            <text:p>26,43%</text:p>
          </table:table-cell>
          <table:table-cell office:value-type="percentage" office:value="0.05382">
            <text:p>5,38%</text:p>
          </table:table-cell>
          <table:table-cell office:value-type="float" office:value="1.326">
            <text:p>1,326</text:p>
          </table:table-cell>
          <table:table-cell table:number-columns-repeated="1013"/>
        </table:table-row>
        <table:table-row table:style-name="ro2">
          <table:table-cell office:value-type="string">
            <text:p>INTU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671.55">
            <text:p>671,55</text:p>
          </table:table-cell>
          <table:table-cell office:value-type="float" office:value="46.122936">
            <text:p>46,122936</text:p>
          </table:table-cell>
          <table:table-cell office:value-type="float" office:value="9.99">
            <text:p>9,99</text:p>
          </table:table-cell>
          <table:table-cell office:value-type="percentage" office:value="0.30083">
            <text:p>30,08%</text:p>
          </table:table-cell>
          <table:table-cell office:value-type="percentage" office:value="0.21987">
            <text:p>21,99%</text:p>
          </table:table-cell>
          <table:table-cell office:value-type="float" office:value="1.267">
            <text:p>1,2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SRG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73.61">
            <text:p>573,61</text:p>
          </table:table-cell>
          <table:table-cell office:value-type="float" office:value="76.07559">
            <text:p>76,07559</text:p>
          </table:table-cell>
          <table:table-cell office:value-type="float" office:value="9.99">
            <text:p>9,99</text:p>
          </table:table-cell>
          <table:table-cell office:value-type="percentage" office:value="0.35496">
            <text:p>35,50%</text:p>
          </table:table-cell>
          <table:table-cell office:value-type="percentage" office:value="0.16902">
            <text:p>16,90%</text:p>
          </table:table-cell>
          <table:table-cell office:value-type="float" office:value="1.686">
            <text:p>1,6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L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9.38">
            <text:p>79,38</text:p>
          </table:table-cell>
          <table:table-cell office:value-type="float" office:value="22.235294">
            <text:p>22,235294</text:p>
          </table:table-cell>
          <table:table-cell office:value-type="float" office:value="6.80048">
            <text:p>6,80048</text:p>
          </table:table-cell>
          <table:table-cell office:value-type="percentage" office:value="0.23944001">
            <text:p>23,94%</text:p>
          </table:table-cell>
          <table:table-cell office:value-type="percentage" office:value="2.93635">
            <text:p>293,64%</text:p>
          </table:table-cell>
          <table:table-cell office:value-type="float" office:value="0.295">
            <text:p>0,2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KC</text:p>
          </table:table-cell>
          <table:table-cell office:value-type="string">
            <text:p>Consumer Defensive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8.61">
            <text:p>68,61</text:p>
          </table:table-cell>
          <table:table-cell office:value-type="float" office:value="23.822916">
            <text:p>23,822916</text:p>
          </table:table-cell>
          <table:table-cell office:value-type="float" office:value="0.75356">
            <text:p>0,75356</text:p>
          </table:table-cell>
          <table:table-cell office:value-type="percentage" office:value="0.1904">
            <text:p>19,04%</text:p>
          </table:table-cell>
          <table:table-cell office:value-type="percentage" office:value="0.1385">
            <text:p>13,85%</text:p>
          </table:table-cell>
          <table:table-cell office:value-type="float" office:value="0.621">
            <text:p>0,621</text:p>
          </table:table-cell>
          <table:table-cell table:number-columns-repeated="1013"/>
        </table:table-row>
        <table:table-row table:style-name="ro2">
          <table:table-cell office:value-type="string">
            <text:p>CINF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64.77">
            <text:p>164,77</text:p>
          </table:table-cell>
          <table:table-cell office:value-type="float" office:value="12.250558">
            <text:p>12,250558</text:p>
          </table:table-cell>
          <table:table-cell office:value-type="float" office:value="5.732">
            <text:p>5,732</text:p>
          </table:table-cell>
          <table:table-cell office:value-type="percentage" office:value="0.23290001">
            <text:p>23,29%</text:p>
          </table:table-cell>
          <table:table-cell office:value-type="percentage" office:value="0.14529">
            <text:p>14,53%</text:p>
          </table:table-cell>
          <table:table-cell office:value-type="float" office:value="0.695">
            <text:p>0,6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N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4.26">
            <text:p>54,26</text:p>
          </table:table-cell>
          <table:table-cell office:value-type="float" office:value="74.328766">
            <text:p>74,328766</text:p>
          </table:table-cell>
          <table:table-cell office:value-type="float" office:value="0.45833">
            <text:p>0,45833</text:p>
          </table:table-cell>
          <table:table-cell office:value-type="percentage" office:value="0.30132">
            <text:p>30,13%</text:p>
          </table:table-cell>
          <table:table-cell office:value-type="percentage" office:value="0.03891">
            <text:p>3,89%</text:p>
          </table:table-cell>
          <table:table-cell office:value-type="float" office:value="1.571">
            <text:p>1,571</text:p>
          </table:table-cell>
          <table:table-cell table:number-columns-repeated="1013"/>
        </table:table-row>
        <table:table-row table:style-name="ro2">
          <table:table-cell office:value-type="string">
            <text:p>ODFL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60.285">
            <text:p>160,285</text:p>
          </table:table-cell>
          <table:table-cell office:value-type="float" office:value="32.315525">
            <text:p>32,315525</text:p>
          </table:table-cell>
          <table:table-cell office:value-type="float" office:value="1.994">
            <text:p>1,994</text:p>
          </table:table-cell>
          <table:table-cell office:value-type="percentage" office:value="0.3142">
            <text:p>31,42%</text:p>
          </table:table-cell>
          <table:table-cell office:value-type="percentage" office:value="0.25059">
            <text:p>25,06%</text:p>
          </table:table-cell>
          <table:table-cell office:value-type="float" office:value="1.274">
            <text:p>1,27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XP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220.66">
            <text:p>220,66</text:p>
          </table:table-cell>
          <table:table-cell office:value-type="float" office:value="27.275648">
            <text:p>27,275648</text:p>
          </table:table-cell>
          <table:table-cell office:value-type="float" office:value="1.1734">
            <text:p>1,1734</text:p>
          </table:table-cell>
          <table:table-cell office:value-type="percentage" office:value="0.33176">
            <text:p>33,18%</text:p>
          </table:table-cell>
          <table:table-cell office:value-type="percentage" office:value="0.20872">
            <text:p>20,87%</text:p>
          </table:table-cell>
          <table:table-cell office:value-type="float" office:value="1.469">
            <text:p>1,4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KE</text:p>
          </table:table-cell>
          <table:table-cell office:value-type="string">
            <text:p>Ener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73.77">
            <text:p>73,77</text:p>
          </table:table-cell>
          <table:table-cell office:value-type="float" office:value="13.560661">
            <text:p>13,560661</text:p>
          </table:table-cell>
          <table:table-cell office:value-type="float" office:value="1.52218">
            <text:p>1,52218</text:p>
          </table:table-cell>
          <table:table-cell office:value-type="percentage" office:value="0.23372">
            <text:p>23,37%</text:p>
          </table:table-cell>
          <table:table-cell office:value-type="percentage" office:value="0.17847">
            <text:p>17,85%</text:p>
          </table:table-cell>
          <table:table-cell office:value-type="float" office:value="0.927">
            <text:p>0,9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NP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8.57">
            <text:p>38,57</text:p>
          </table:table-cell>
          <table:table-cell office:value-type="float" office:value="24.411392">
            <text:p>24,411392</text:p>
          </table:table-cell>
          <table:table-cell office:value-type="float" office:value="2.02111">
            <text:p>2,02111</text:p>
          </table:table-cell>
          <table:table-cell office:value-type="percentage" office:value="0.37655997">
            <text:p>37,66%</text:p>
          </table:table-cell>
          <table:table-cell office:value-type="percentage" office:value="0.09606">
            <text:p>9,61%</text:p>
          </table:table-cell>
          <table:table-cell office:value-type="float" office:value="0.558">
            <text:p>0,55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CL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30.98">
            <text:p>30,98</text:p>
          </table:table-cell>
          <table:table-cell office:value-type="float" office:value="15.336634">
            <text:p>15,336634</text:p>
          </table:table-cell>
          <table:table-cell office:value-type="float" office:value="2.27882">
            <text:p>2,27882</text:p>
          </table:table-cell>
          <table:table-cell office:value-type="percentage" office:value="0.27177">
            <text:p>27,18%</text:p>
          </table:table-cell>
          <table:table-cell office:value-type="percentage" office:value="0.25632998">
            <text:p>25,63%</text:p>
          </table:table-cell>
          <table:table-cell office:value-type="float" office:value="2.536">
            <text:p>2,5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RR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3.465">
            <text:p>53,465</text:p>
          </table:table-cell>
          <table:table-cell office:value-type="float" office:value="33.415623">
            <text:p>33,415623</text:p>
          </table:table-cell>
          <table:table-cell office:value-type="float" office:value="0.83159">
            <text:p>0,83159</text:p>
          </table:table-cell>
          <table:table-cell office:value-type="percentage" office:value="0.16547">
            <text:p>16,55%</text:p>
          </table:table-cell>
          <table:table-cell office:value-type="percentage" office:value="0.0998">
            <text:p>9,98%</text:p>
          </table:table-cell>
          <table:table-cell office:value-type="float" office:value="1.298">
            <text:p>1,298</text:p>
          </table:table-cell>
          <table:table-cell table:number-columns-repeated="1013"/>
        </table:table-row>
        <table:table-row table:style-name="ro2">
          <table:table-cell office:value-type="string">
            <text:p>CAT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577.58">
            <text:p>577,58</text:p>
          </table:table-cell>
          <table:table-cell office:value-type="float" office:value="29.710905">
            <text:p>29,710905</text:p>
          </table:table-cell>
          <table:table-cell office:value-type="float" office:value="2.01046">
            <text:p>2,01046</text:p>
          </table:table-cell>
          <table:table-cell office:value-type="percentage" office:value="0.21583">
            <text:p>21,58%</text:p>
          </table:table-cell>
          <table:table-cell office:value-type="percentage" office:value="0.46283">
            <text:p>46,28%</text:p>
          </table:table-cell>
          <table:table-cell office:value-type="float" office:value="1.563">
            <text:p>1,5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VS</text:p>
          </table:table-cell>
          <table:table-cell office:value-type="string">
            <text:p>Consumer Cyclical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65.22">
            <text:p>65,22</text:p>
          </table:table-cell>
          <table:table-cell office:value-type="float" office:value="29.378378">
            <text:p>29,378378</text:p>
          </table:table-cell>
          <table:table-cell office:value-type="float" office:value="8.47509">
            <text:p>8,47509</text:p>
          </table:table-cell>
          <table:table-cell office:value-type="percentage" office:value="0.34695">
            <text:p>34,70%</text:p>
          </table:table-cell>
          <table:table-cell office:value-type="percentage" office:value="0.65651">
            <text:p>65,65%</text:p>
          </table:table-cell>
          <table:table-cell office:value-type="float" office:value="0.967">
            <text:p>0,9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HX</text:p>
          </table:table-cell>
          <table:table-cell office:value-type="string">
            <text:p>Industrials</text:p>
          </table:table-cell>
          <table:table-cell table:style-name="ce2" office:value-type="string">
            <text:p>SI (Difensivo)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296.12">
            <text:p>296,12</text:p>
          </table:table-cell>
          <table:table-cell office:value-type="float" office:value="31.875134">
            <text:p>31,875134</text:p>
          </table:table-cell>
          <table:table-cell office:value-type="float" office:value="0.60629">
            <text:p>0,60629</text:p>
          </table:table-cell>
          <table:table-cell office:value-type="percentage" office:value="0.18753">
            <text:p>18,75%</text:p>
          </table:table-cell>
          <table:table-cell office:value-type="percentage" office:value="0.091309994">
            <text:p>9,13%</text:p>
          </table:table-cell>
          <table:table-cell office:value-type="float" office:value="0.656">
            <text:p>0,656</text:p>
          </table:table-cell>
          <table:table-cell table:number-columns-repeated="1013"/>
        </table:table-row>
        <table:table-row table:style-name="ro2">
          <table:table-cell office:value-type="string">
            <text:p>KLAC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250.625">
            <text:p>1250,625</text:p>
          </table:table-cell>
          <table:table-cell office:value-type="float" office:value="39.21684">
            <text:p>39,21684</text:p>
          </table:table-cell>
          <table:table-cell office:value-type="float" office:value="1.22127">
            <text:p>1,22127</text:p>
          </table:table-cell>
          <table:table-cell office:value-type="percentage" office:value="0.44926998">
            <text:p>44,93%</text:p>
          </table:table-cell>
          <table:table-cell office:value-type="percentage" office:value="0.99167997">
            <text:p>99,17%</text:p>
          </table:table-cell>
          <table:table-cell office:value-type="float" office:value="1.437">
            <text:p>1,4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I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94.7028">
            <text:p>494,7028</text:p>
          </table:table-cell>
          <table:table-cell office:value-type="float" office:value="20.882345">
            <text:p>20,882345</text:p>
          </table:table-cell>
          <table:table-cell office:value-type="float" office:value="1.28035">
            <text:p>1,28035</text:p>
          </table:table-cell>
          <table:table-cell office:value-type="percentage" office:value="0.21714">
            <text:p>21,71%</text:p>
          </table:table-cell>
          <table:table-cell office:value-type="percentage" office:value="0.92253995">
            <text:p>92,25%</text:p>
          </table:table-cell>
          <table:table-cell office:value-type="float" office:value="1.16">
            <text:p>1,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LY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78.61">
            <text:p>1078,61</text:p>
          </table:table-cell>
          <table:table-cell office:value-type="float" office:value="52.89897">
            <text:p>52,89897</text:p>
          </table:table-cell>
          <table:table-cell office:value-type="float" office:value="1.78516">
            <text:p>1,78516</text:p>
          </table:table-cell>
          <table:table-cell office:value-type="percentage" office:value="0.48349">
            <text:p>48,35%</text:p>
          </table:table-cell>
          <table:table-cell office:value-type="percentage" office:value="0.9647">
            <text:p>96,47%</text:p>
          </table:table-cell>
          <table:table-cell office:value-type="float" office:value="0.369">
            <text:p>0,3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A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05.6">
            <text:p>305,6</text:p>
          </table:table-cell>
          <table:table-cell office:value-type="float" office:value="20.774982">
            <text:p>20,774982</text:p>
          </table:table-cell>
          <table:table-cell office:value-type="float" office:value="2.01153">
            <text:p>2,01153</text:p>
          </table:table-cell>
          <table:table-cell office:value-type="percentage" office:value="0.52279">
            <text:p>52,28%</text:p>
          </table:table-cell>
          <table:table-cell office:value-type="percentage" office:value="0.29097">
            <text:p>29,10%</text:p>
          </table:table-cell>
          <table:table-cell office:value-type="float" office:value="0.847">
            <text:p>0,8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KHY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85.1">
            <text:p>185,1</text:p>
          </table:table-cell>
          <table:table-cell office:value-type="float" office:value="28.130701">
            <text:p>28,130701</text:p>
          </table:table-cell>
          <table:table-cell office:value-type="float" office:value="3.17">
            <text:p>3,17</text:p>
          </table:table-cell>
          <table:table-cell office:value-type="percentage" office:value="0.27239">
            <text:p>27,24%</text:p>
          </table:table-cell>
          <table:table-cell office:value-type="percentage" office:value="0.2345">
            <text:p>23,45%</text:p>
          </table:table-cell>
          <table:table-cell office:value-type="float" office:value="0.733">
            <text:p>0,7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CI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21.16">
            <text:p>121,16</text:p>
          </table:table-cell>
          <table:table-cell office:value-type="float" office:value="46.06844">
            <text:p>46,06844</text:p>
          </table:table-cell>
          <table:table-cell office:value-type="float" office:value="0.86383">
            <text:p>0,86383</text:p>
          </table:table-cell>
          <table:table-cell office:value-type="percentage" office:value="0.16261">
            <text:p>16,26%</text:p>
          </table:table-cell>
          <table:table-cell office:value-type="percentage" office:value="0.11374">
            <text:p>11,37%</text:p>
          </table:table-cell>
          <table:table-cell office:value-type="float" office:value="1.417">
            <text:p>1,417</text:p>
          </table:table-cell>
          <table:table-cell table:number-columns-repeated="1013"/>
        </table:table-row>
        <table:table-row table:style-name="ro2">
          <table:table-cell office:value-type="string">
            <text:p>ALLE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61.0001">
            <text:p>161,0001</text:p>
          </table:table-cell>
          <table:table-cell office:value-type="float" office:value="21.786213">
            <text:p>21,786213</text:p>
          </table:table-cell>
          <table:table-cell office:value-type="float" office:value="1.16084">
            <text:p>1,16084</text:p>
          </table:table-cell>
          <table:table-cell office:value-type="percentage" office:value="0.24163">
            <text:p>24,16%</text:p>
          </table:table-cell>
          <table:table-cell office:value-type="percentage" office:value="0.36411">
            <text:p>36,41%</text:p>
          </table:table-cell>
          <table:table-cell office:value-type="float" office:value="1.043">
            <text:p>1,04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L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57.85">
            <text:p>157,85</text:p>
          </table:table-cell>
          <table:table-cell office:value-type="float" office:value="30.591087">
            <text:p>30,591087</text:p>
          </table:table-cell>
          <table:table-cell office:value-type="float" office:value="3.064">
            <text:p>3,064</text:p>
          </table:table-cell>
          <table:table-cell office:value-type="percentage" office:value="0.20361">
            <text:p>20,36%</text:p>
          </table:table-cell>
          <table:table-cell office:value-type="percentage" office:value="0.095769994">
            <text:p>9,58%</text:p>
          </table:table-cell>
          <table:table-cell office:value-type="float" office:value="1.859">
            <text:p>1,8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I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381.7">
            <text:p>381,7</text:p>
          </table:table-cell>
          <table:table-cell office:value-type="float" office:value="30.658636">
            <text:p>30,658636</text:p>
          </table:table-cell>
          <table:table-cell office:value-type="float" office:value="4.23891">
            <text:p>4,23891</text:p>
          </table:table-cell>
          <table:table-cell office:value-type="percentage" office:value="0.29568002">
            <text:p>29,57%</text:p>
          </table:table-cell>
          <table:table-cell office:value-type="percentage" office:value="1.1517">
            <text:p>115,17%</text:p>
          </table:table-cell>
          <table:table-cell office:value-type="float" office:value="0.997">
            <text:p>0,99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VDA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87.97">
            <text:p>187,97</text:p>
          </table:table-cell>
          <table:table-cell office:value-type="float" office:value="46.412342">
            <text:p>46,412342</text:p>
          </table:table-cell>
          <table:table-cell office:value-type="float" office:value="9.102">
            <text:p>9,102</text:p>
          </table:table-cell>
          <table:table-cell office:value-type="percentage" office:value="0.60220003">
            <text:p>60,22%</text:p>
          </table:table-cell>
          <table:table-cell office:value-type="percentage" office:value="1.07359">
            <text:p>107,36%</text:p>
          </table:table-cell>
          <table:table-cell office:value-type="float" office:value="2.284">
            <text:p>2,2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SC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291.151">
            <text:p>291,151</text:p>
          </table:table-cell>
          <table:table-cell office:value-type="float" office:value="22.208315">
            <text:p>22,208315</text:p>
          </table:table-cell>
          <table:table-cell office:value-type="float" office:value="1.16353">
            <text:p>1,16353</text:p>
          </table:table-cell>
          <table:table-cell office:value-type="percentage" office:value="0.46427">
            <text:p>46,43%</text:p>
          </table:table-cell>
          <table:table-cell office:value-type="percentage" office:value="0.2048">
            <text:p>20,48%</text:p>
          </table:table-cell>
          <table:table-cell office:value-type="float" office:value="1.318">
            <text:p>1,31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TAP</text:p>
          </table:table-cell>
          <table:table-cell office:value-type="string">
            <text:p>Technology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08.74">
            <text:p>108,74</text:p>
          </table:table-cell>
          <table:table-cell office:value-type="float" office:value="18.944252">
            <text:p>18,944252</text:p>
          </table:table-cell>
          <table:table-cell office:value-type="float" office:value="2.77789">
            <text:p>2,77789</text:p>
          </table:table-cell>
          <table:table-cell office:value-type="percentage" office:value="0.25659">
            <text:p>25,66%</text:p>
          </table:table-cell>
          <table:table-cell office:value-type="percentage" office:value="1.25346">
            <text:p>125,35%</text:p>
          </table:table-cell>
          <table:table-cell office:value-type="float" office:value="1.414">
            <text:p>1,4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E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80.51">
            <text:p>80,51</text:p>
          </table:table-cell>
          <table:table-cell office:value-type="float" office:value="25.55873">
            <text:p>25,55873</text:p>
          </table:table-cell>
          <table:table-cell office:value-type="float" office:value="1.44161">
            <text:p>1,44161</text:p>
          </table:table-cell>
          <table:table-cell office:value-type="percentage" office:value="0.54949003">
            <text:p>54,95%</text:p>
          </table:table-cell>
          <table:table-cell office:value-type="percentage" office:value="0.08236">
            <text:p>8,24%</text:p>
          </table:table-cell>
          <table:table-cell office:value-type="float" office:value="0.733">
            <text:p>0,7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I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42.03">
            <text:p>42,03</text:p>
          </table:table-cell>
          <table:table-cell office:value-type="float" office:value="22.121052">
            <text:p>22,121052</text:p>
          </table:table-cell>
          <table:table-cell office:value-type="float" office:value="1.40579">
            <text:p>1,40579</text:p>
          </table:table-cell>
          <table:table-cell office:value-type="percentage" office:value="0.43550998">
            <text:p>43,55%</text:p>
          </table:table-cell>
          <table:table-cell office:value-type="percentage" office:value="0.09073">
            <text:p>9,07%</text:p>
          </table:table-cell>
          <table:table-cell office:value-type="float" office:value="0.626">
            <text:p>0,62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O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0.085">
            <text:p>70,085</text:p>
          </table:table-cell>
          <table:table-cell office:value-type="float" office:value="23.206953">
            <text:p>23,206953</text:p>
          </table:table-cell>
          <table:table-cell office:value-type="float" office:value="1.44771">
            <text:p>1,44771</text:p>
          </table:table-cell>
          <table:table-cell office:value-type="percentage" office:value="0.34213">
            <text:p>34,21%</text:p>
          </table:table-cell>
          <table:table-cell office:value-type="percentage" office:value="0.42442">
            <text:p>42,44%</text:p>
          </table:table-cell>
          <table:table-cell office:value-type="float" office:value="0.393">
            <text:p>0,3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S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70.47">
            <text:p>70,47</text:p>
          </table:table-cell>
          <table:table-cell office:value-type="float" office:value="20.308357">
            <text:p>20,308357</text:p>
          </table:table-cell>
          <table:table-cell office:value-type="float" office:value="1.91676">
            <text:p>1,91676</text:p>
          </table:table-cell>
          <table:table-cell office:value-type="percentage" office:value="0.3607">
            <text:p>36,07%</text:p>
          </table:table-cell>
          <table:table-cell office:value-type="percentage" office:value="0.11233">
            <text:p>11,23%</text:p>
          </table:table-cell>
          <table:table-cell office:value-type="float" office:value="0.471">
            <text:p>0,4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GN</text:p>
          </table:table-cell>
          <table:table-cell office:value-type="string">
            <text:p>Healthcar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327.8">
            <text:p>327,8</text:p>
          </table:table-cell>
          <table:table-cell office:value-type="float" office:value="25.371515">
            <text:p>25,371515</text:p>
          </table:table-cell>
          <table:table-cell office:value-type="float" office:value="5.67491">
            <text:p>5,67491</text:p>
          </table:table-cell>
          <table:table-cell office:value-type="percentage" office:value="0.45817003">
            <text:p>45,82%</text:p>
          </table:table-cell>
          <table:table-cell office:value-type="percentage" office:value="0.8171">
            <text:p>81,71%</text:p>
          </table:table-cell>
          <table:table-cell office:value-type="float" office:value="0.447">
            <text:p>0,4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Z</text:p>
          </table:table-cell>
          <table:table-cell office:value-type="string">
            <text:p>Communication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40.7156">
            <text:p>40,7156</text:p>
          </table:table-cell>
          <table:table-cell office:value-type="float" office:value="8.681364">
            <text:p>8,681364</text:p>
          </table:table-cell>
          <table:table-cell office:value-type="float" office:value="1.64799">
            <text:p>1,64799</text:p>
          </table:table-cell>
          <table:table-cell office:value-type="percentage" office:value="0.36507">
            <text:p>36,51%</text:p>
          </table:table-cell>
          <table:table-cell office:value-type="percentage" office:value="0.19875">
            <text:p>19,88%</text:p>
          </table:table-cell>
          <table:table-cell office:value-type="float" office:value="0.32">
            <text:p>0,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E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100.83">
            <text:p>100,83</text:p>
          </table:table-cell>
          <table:table-cell office:value-type="float" office:value="19.390387">
            <text:p>19,390387</text:p>
          </table:table-cell>
          <table:table-cell office:value-type="float" office:value="1.55736">
            <text:p>1,55736</text:p>
          </table:table-cell>
          <table:table-cell office:value-type="percentage" office:value="0.41054">
            <text:p>41,05%</text:p>
          </table:table-cell>
          <table:table-cell office:value-type="percentage" office:value="0.11387">
            <text:p>11,39%</text:p>
          </table:table-cell>
          <table:table-cell office:value-type="float" office:value="0.581">
            <text:p>0,5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P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16.01">
            <text:p>116,01</text:p>
          </table:table-cell>
          <table:table-cell office:value-type="float" office:value="16.98536">
            <text:p>16,98536</text:p>
          </table:table-cell>
          <table:table-cell office:value-type="float" office:value="1.52132">
            <text:p>1,52132</text:p>
          </table:table-cell>
          <table:table-cell office:value-type="percentage" office:value="0.41197">
            <text:p>41,20%</text:p>
          </table:table-cell>
          <table:table-cell office:value-type="percentage" office:value="0.12923001">
            <text:p>12,92%</text:p>
          </table:table-cell>
          <table:table-cell office:value-type="float" office:value="0.598">
            <text:p>0,5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T</text:p>
          </table:table-cell>
          <table:table-cell office:value-type="string">
            <text:p>Real Estat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76.43">
            <text:p>176,43</text:p>
          </table:table-cell>
          <table:table-cell office:value-type="float" office:value="28.093946">
            <text:p>28,093946</text:p>
          </table:table-cell>
          <table:table-cell office:value-type="float" office:value="4.1809">
            <text:p>4,1809</text:p>
          </table:table-cell>
          <table:table-cell office:value-type="percentage" office:value="0.64357">
            <text:p>64,36%</text:p>
          </table:table-cell>
          <table:table-cell office:value-type="percentage" office:value="0.28839">
            <text:p>28,84%</text:p>
          </table:table-cell>
          <table:table-cell office:value-type="float" office:value="0.915">
            <text:p>0,9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WK</text:p>
          </table:table-cell>
          <table:table-cell office:value-type="string">
            <text:p>Utiliti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AGGING</text:p>
          </table:table-cell>
          <table:table-cell office:value-type="float" office:value="131.43">
            <text:p>131,43</text:p>
          </table:table-cell>
          <table:table-cell office:value-type="float" office:value="23.057894">
            <text:p>23,057894</text:p>
          </table:table-cell>
          <table:table-cell office:value-type="float" office:value="1.40983">
            <text:p>1,40983</text:p>
          </table:table-cell>
          <table:table-cell office:value-type="percentage" office:value="0.54458">
            <text:p>54,46%</text:p>
          </table:table-cell>
          <table:table-cell office:value-type="percentage" office:value="0.10457">
            <text:p>10,46%</text:p>
          </table:table-cell>
          <table:table-cell office:value-type="float" office:value="0.751">
            <text:p>0,7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O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16.63">
            <text:p>516,63</text:p>
          </table:table-cell>
          <table:table-cell office:value-type="float" office:value="41.63014">
            <text:p>41,63014</text:p>
          </table:table-cell>
          <table:table-cell office:value-type="float" office:value="1.81347">
            <text:p>1,81347</text:p>
          </table:table-cell>
          <table:table-cell office:value-type="percentage" office:value="0.47714">
            <text:p>47,71%</text:p>
          </table:table-cell>
          <table:table-cell office:value-type="percentage" office:value="0.54914004">
            <text:p>54,91%</text:p>
          </table:table-cell>
          <table:table-cell office:value-type="float" office:value="1.453">
            <text:p>1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KTX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83.9">
            <text:p>183,9</text:p>
          </table:table-cell>
          <table:table-cell office:value-type="float" office:value="31.275509">
            <text:p>31,275509</text:p>
          </table:table-cell>
          <table:table-cell office:value-type="float" office:value="4.81">
            <text:p>4,81</text:p>
          </table:table-cell>
          <table:table-cell office:value-type="percentage" office:value="0.50688">
            <text:p>50,69%</text:p>
          </table:table-cell>
          <table:table-cell office:value-type="percentage" office:value="0.15823">
            <text:p>15,82%</text:p>
          </table:table-cell>
          <table:table-cell office:value-type="float" office:value="0.993">
            <text:p>0,9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WW</text:p>
          </table:table-cell>
          <table:table-cell office:value-type="string">
            <text:p>Industrial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WEAKENING</text:p>
          </table:table-cell>
          <table:table-cell office:value-type="float" office:value="1024.275">
            <text:p>1024,275</text:p>
          </table:table-cell>
          <table:table-cell office:value-type="float" office:value="28.675112">
            <text:p>28,675112</text:p>
          </table:table-cell>
          <table:table-cell office:value-type="float" office:value="0.6867">
            <text:p>0,6867</text:p>
          </table:table-cell>
          <table:table-cell office:value-type="percentage" office:value="0.16771999">
            <text:p>16,77%</text:p>
          </table:table-cell>
          <table:table-cell office:value-type="percentage" office:value="0.46719003">
            <text:p>46,72%</text:p>
          </table:table-cell>
          <table:table-cell office:value-type="float" office:value="1.116">
            <text:p>1,116</text:p>
          </table:table-cell>
          <table:table-cell table:number-columns-repeated="1013"/>
        </table:table-row>
        <table:table-row table:style-name="ro2">
          <table:table-cell office:value-type="string">
            <text:p>MDLZ</text:p>
          </table:table-cell>
          <table:table-cell office:value-type="string">
            <text:p>Consumer Defensive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IMPROVING</text:p>
          </table:table-cell>
          <table:table-cell office:value-type="float" office:value="54.93">
            <text:p>54,93</text:p>
          </table:table-cell>
          <table:table-cell office:value-type="float" office:value="20.573032">
            <text:p>20,573032</text:p>
          </table:table-cell>
          <table:table-cell office:value-type="float" office:value="0.83621">
            <text:p>0,83621</text:p>
          </table:table-cell>
          <table:table-cell office:value-type="percentage" office:value="0.14920999">
            <text:p>14,92%</text:p>
          </table:table-cell>
          <table:table-cell office:value-type="percentage" office:value="0.13101">
            <text:p>13,10%</text:p>
          </table:table-cell>
          <table:table-cell office:value-type="float" office:value="0.397">
            <text:p>0,397</text:p>
          </table:table-cell>
          <table:table-cell table:number-columns-repeated="1013"/>
        </table:table-row>
        <table:table-row table:style-name="ro2">
          <table:table-cell office:value-type="string">
            <text:p>MMC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187.2">
            <text:p>187,2</text:p>
          </table:table-cell>
          <table:table-cell office:value-type="float" office:value="22.472988">
            <text:p>22,472988</text:p>
          </table:table-cell>
          <table:table-cell office:value-type="float" office:value="1.39501">
            <text:p>1,39501</text:p>
          </table:table-cell>
          <table:table-cell office:value-type="percentage" office:value="0.29222">
            <text:p>29,22%</text:p>
          </table:table-cell>
          <table:table-cell office:value-type="percentage" office:value="0.28734">
            <text:p>28,73%</text:p>
          </table:table-cell>
          <table:table-cell office:value-type="float" office:value="0.751">
            <text:p>0,7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</text:p>
          </table:table-cell>
          <table:table-cell office:value-type="string">
            <text:p>Financial Services</text:p>
          </table:table-cell>
          <table:table-cell table:style-name="ce2" office:value-type="string">
            <text:p>NO</text:p>
          </table:table-cell>
          <table:table-cell office:value-type="float" office:value="5">
            <text:p>5</text:p>
          </table:table-cell>
          <table:table-cell table:style-name="ce3" office:value-type="string">
            <text:p>LEADING</text:p>
          </table:table-cell>
          <table:table-cell office:value-type="float" office:value="576.03">
            <text:p>576,03</text:p>
          </table:table-cell>
          <table:table-cell office:value-type="float" office:value="36.783527">
            <text:p>36,783527</text:p>
          </table:table-cell>
          <table:table-cell office:value-type="float" office:value="2.39715">
            <text:p>2,39715</text:p>
          </table:table-cell>
          <table:table-cell office:value-type="percentage" office:value="0.62312">
            <text:p>62,31%</text:p>
          </table:table-cell>
          <table:table-cell office:value-type="percentage" office:value="1.8486099">
            <text:p>184,86%</text:p>
          </table:table-cell>
          <table:table-cell office:value-type="float" office:value="0.868">
            <text:p>0,8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 table:number-rows-repeated="205">
          <table:table-cell table:number-columns-repeated="2"/>
          <table:table-cell table:style-name="ce2"/>
          <table:table-cell/>
          <table:table-cell table:style-name="ce3"/>
          <table:table-cell table:number-columns-repeated="101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30">30/12/2025</text:date>, <text:time>19.51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30T19:51:34.07</dc:date>
    <dc:creator>Matteo </dc:creator>
    <meta:document-statistic meta:table-count="1" meta:cell-count="3361" meta:object-count="0"/>
    <meta:generator>OpenOffice/4.1.16$Win32 OpenOffice.org_project/4116m3$Build-9816</meta:generator>
  </office:meta>
</office:document-meta>
</file>