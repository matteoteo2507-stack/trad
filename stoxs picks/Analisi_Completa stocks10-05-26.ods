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1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Dati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map style:condition="is-true-formula(LEFT([.A1];2)=&quot;SI&quot;)" style:apply-style-name="ConditionalStyle_5f_1" style:base-cell-address="Dati.A1"/>
    </style:style>
    <style:style style:name="ce2" style:family="table-cell" style:parent-style-name="Excel_20_Built-in_20_Normal">
      <style:map style:condition="is-true-formula(NOT(ISERROR(SEARCH(&quot;LEADING&quot;;[.A1]))))" style:apply-style-name="ConditionalStyle_5f_1" style:base-cell-address="Dati.A1"/>
      <style:map style:condition="is-true-formula(NOT(ISERROR(SEARCH(&quot;LAGGING&quot;;[.A1]))))" style:apply-style-name="ConditionalStyle_5f_2" style:base-cell-address="Dati.A1"/>
    </style:style>
    <style:style style:name="ce3" style:family="table-cell" style:parent-style-name="Excel_20_Built-in_20_Normal" style:data-style-name="N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number-columns-repeated="2" table:default-cell-style-name="ce3"/>
        <table:table-column table:style-name="co1" table:number-columns-repeated="1014" table:default-cell-style-name="Excel_20_Built-in_20_Normal"/>
        <table:table-row table:style-name="ro1">
          <table:table-cell office:value-type="string">
            <text:p>Ticker</text:p>
          </table:table-cell>
          <table:table-cell office:value-type="string">
            <text:p>Settore</text:p>
          </table:table-cell>
          <table:table-cell office:value-type="string">
            <text:p>TARGET MATCH</text:p>
          </table:table-cell>
          <table:table-cell office:value-type="string">
            <text:p>SCORE (Max 6)</text:p>
          </table:table-cell>
          <table:table-cell office:value-type="string">
            <text:p>RRG Trend</text:p>
          </table:table-cell>
          <table:table-cell office:value-type="string">
            <text:p>Prezzo</text:p>
          </table:table-cell>
          <table:table-cell office:value-type="string">
            <text:p>P/E</text:p>
          </table:table-cell>
          <table:table-cell office:value-type="string">
            <text:p>D/E Ratio</text:p>
          </table:table-cell>
          <table:table-cell office:value-type="string">
            <text:p>MOL %</text:p>
          </table:table-cell>
          <table:table-cell office:value-type="string">
            <text:p>ROE %</text:p>
          </table:table-cell>
          <table:table-cell office:value-type="string">
            <text:p>Beta</text:p>
          </table:table-cell>
          <table:table-cell office:value-type="string">
            <text:p>Note</text:p>
          </table:table-cell>
          <table:table-cell table:number-columns-repeated="1012"/>
        </table:table-row>
        <table:table-row table:style-name="ro2">
          <table:table-cell office:value-type="string">
            <text:p>AOS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58.6">
            <text:p>58,6</text:p>
          </table:table-cell>
          <table:table-cell office:value-type="float" office:value="15.626666">
            <text:p>15,626666</text:p>
          </table:table-cell>
          <table:table-cell office:value-type="float" office:value="0.34981">
            <text:p>0,34981</text:p>
          </table:table-cell>
          <table:table-cell office:value-type="percentage" office:value="0.20864001">
            <text:p>20,86%</text:p>
          </table:table-cell>
          <table:table-cell office:value-type="percentage" office:value="0.28267">
            <text:p>28,27%</text:p>
          </table:table-cell>
          <table:table-cell office:value-type="float" office:value="1.217">
            <text:p>1,217</text:p>
          </table:table-cell>
          <table:table-cell table:number-columns-repeated="1013"/>
        </table:table-row>
        <table:table-row table:style-name="ro2">
          <table:table-cell office:value-type="string">
            <text:p>AFL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13.1">
            <text:p>113,1</text:p>
          </table:table-cell>
          <table:table-cell office:value-type="float" office:value="12.9257145">
            <text:p>12,9257145</text:p>
          </table:table-cell>
          <table:table-cell office:value-type="float" office:value="0.48276">
            <text:p>0,48276</text:p>
          </table:table-cell>
          <table:table-cell office:value-type="percentage" office:value="0.32465">
            <text:p>32,47%</text:p>
          </table:table-cell>
          <table:table-cell office:value-type="percentage" office:value="0.16469">
            <text:p>16,47%</text:p>
          </table:table-cell>
          <table:table-cell office:value-type="float" office:value="0.619">
            <text:p>0,619</text:p>
          </table:table-cell>
          <table:table-cell table:number-columns-repeated="1013"/>
        </table:table-row>
        <table:table-row table:style-name="ro2">
          <table:table-cell office:value-type="string">
            <text:p>ABNB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41.49">
            <text:p>141,49</text:p>
          </table:table-cell>
          <table:table-cell office:value-type="float" office:value="34.935802">
            <text:p>34,935802</text:p>
          </table:table-cell>
          <table:table-cell office:value-type="float" office:value="0.33185">
            <text:p>0,33185</text:p>
          </table:table-cell>
          <table:table-cell office:value-type="percentage" office:value="0.20708">
            <text:p>20,71%</text:p>
          </table:table-cell>
          <table:table-cell office:value-type="percentage" office:value="0.32325">
            <text:p>32,33%</text:p>
          </table:table-cell>
          <table:table-cell office:value-type="float" office:value="1.208">
            <text:p>1,208</text:p>
          </table:table-cell>
          <table:table-cell table:number-columns-repeated="1013"/>
        </table:table-row>
        <table:table-row table:style-name="ro2">
          <table:table-cell office:value-type="string">
            <text:p>ALL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13.15">
            <text:p>213,15</text:p>
          </table:table-cell>
          <table:table-cell office:value-type="float" office:value="4.714665">
            <text:p>4,714665</text:p>
          </table:table-cell>
          <table:table-cell office:value-type="float" office:value="0.23719">
            <text:p>0,23719</text:p>
          </table:table-cell>
          <table:table-cell office:value-type="percentage" office:value="0.21767999">
            <text:p>21,77%</text:p>
          </table:table-cell>
          <table:table-cell office:value-type="percentage" office:value="0.45221">
            <text:p>45,22%</text:p>
          </table:table-cell>
          <table:table-cell office:value-type="float" office:value="0.207">
            <text:p>0,207</text:p>
          </table:table-cell>
          <table:table-cell table:number-columns-repeated="1013"/>
        </table:table-row>
        <table:table-row table:style-name="ro2">
          <table:table-cell office:value-type="string">
            <text:p>GOOGL</text:p>
          </table:table-cell>
          <table:table-cell office:value-type="string">
            <text:p>Communication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400.8">
            <text:p>400,8</text:p>
          </table:table-cell>
          <table:table-cell office:value-type="float" office:value="30.572083">
            <text:p>30,572083</text:p>
          </table:table-cell>
          <table:table-cell office:value-type="float" office:value="0.20026">
            <text:p>0,20026</text:p>
          </table:table-cell>
          <table:table-cell office:value-type="percentage" office:value="0.38181">
            <text:p>38,18%</text:p>
          </table:table-cell>
          <table:table-cell office:value-type="percentage" office:value="0.38884997">
            <text:p>38,88%</text:p>
          </table:table-cell>
          <table:table-cell office:value-type="float" office:value="1.267">
            <text:p>1,267</text:p>
          </table:table-cell>
          <table:table-cell table:number-columns-repeated="1013"/>
        </table:table-row>
        <table:table-row table:style-name="ro2">
          <table:table-cell office:value-type="string">
            <text:p>GOOG</text:p>
          </table:table-cell>
          <table:table-cell office:value-type="string">
            <text:p>Communication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397.05">
            <text:p>397,05</text:p>
          </table:table-cell>
          <table:table-cell office:value-type="float" office:value="30.309158">
            <text:p>30,309158</text:p>
          </table:table-cell>
          <table:table-cell office:value-type="float" office:value="0.20026">
            <text:p>0,20026</text:p>
          </table:table-cell>
          <table:table-cell office:value-type="percentage" office:value="0.38181">
            <text:p>38,18%</text:p>
          </table:table-cell>
          <table:table-cell office:value-type="percentage" office:value="0.38884997">
            <text:p>38,88%</text:p>
          </table:table-cell>
          <table:table-cell office:value-type="float" office:value="1.267">
            <text:p>1,267</text:p>
          </table:table-cell>
          <table:table-cell table:number-columns-repeated="1013"/>
        </table:table-row>
        <table:table-row table:style-name="ro2">
          <table:table-cell office:value-type="string">
            <text:p>AIG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76.36">
            <text:p>76,36</text:p>
          </table:table-cell>
          <table:table-cell office:value-type="float" office:value="13.443663">
            <text:p>13,443663</text:p>
          </table:table-cell>
          <table:table-cell office:value-type="float" office:value="0.22647">
            <text:p>0,22647</text:p>
          </table:table-cell>
          <table:table-cell office:value-type="percentage" office:value="0.31145">
            <text:p>31,15%</text:p>
          </table:table-cell>
          <table:table-cell office:value-type="percentage" office:value="0.07723">
            <text:p>7,72%</text:p>
          </table:table-cell>
          <table:table-cell office:value-type="float" office:value="0.541">
            <text:p>0,541</text:p>
          </table:table-cell>
          <table:table-cell table:number-columns-repeated="1013"/>
        </table:table-row>
        <table:table-row table:style-name="ro2">
          <table:table-cell office:value-type="string">
            <text:p>AME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32.4">
            <text:p>232,4</text:p>
          </table:table-cell>
          <table:table-cell office:value-type="float" office:value="35.10574">
            <text:p>35,10574</text:p>
          </table:table-cell>
          <table:table-cell office:value-type="float" office:value="0.22489">
            <text:p>0,22489</text:p>
          </table:table-cell>
          <table:table-cell office:value-type="percentage" office:value="0.31856">
            <text:p>31,86%</text:p>
          </table:table-cell>
          <table:table-cell office:value-type="percentage" office:value="0.14626999">
            <text:p>14,63%</text:p>
          </table:table-cell>
          <table:table-cell office:value-type="float" office:value="1.033">
            <text:p>1,033</text:p>
          </table:table-cell>
          <table:table-cell table:number-columns-repeated="1013"/>
        </table:table-row>
        <table:table-row table:style-name="ro2">
          <table:table-cell office:value-type="string">
            <text:p>ADI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WEAKENING</text:p>
          </table:table-cell>
          <table:table-cell office:value-type="float" office:value="416.52">
            <text:p>416,52</text:p>
          </table:table-cell>
          <table:table-cell office:value-type="float" office:value="76.28571">
            <text:p>76,28571</text:p>
          </table:table-cell>
          <table:table-cell office:value-type="float" office:value="0.25753">
            <text:p>0,25753</text:p>
          </table:table-cell>
          <table:table-cell office:value-type="percentage" office:value="0.46433">
            <text:p>46,43%</text:p>
          </table:table-cell>
          <table:table-cell office:value-type="percentage" office:value="0.07862">
            <text:p>7,86%</text:p>
          </table:table-cell>
          <table:table-cell office:value-type="float" office:value="1.194">
            <text:p>1,194</text:p>
          </table:table-cell>
          <table:table-cell table:number-columns-repeated="1013"/>
        </table:table-row>
        <table:table-row table:style-name="ro2">
          <table:table-cell office:value-type="string">
            <text:p>AMAT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435.44">
            <text:p>435,44</text:p>
          </table:table-cell>
          <table:table-cell office:value-type="float" office:value="44.660515">
            <text:p>44,660515</text:p>
          </table:table-cell>
          <table:table-cell office:value-type="float" office:value="0.33108">
            <text:p>0,33108</text:p>
          </table:table-cell>
          <table:table-cell office:value-type="percentage" office:value="0.31506002">
            <text:p>31,51%</text:p>
          </table:table-cell>
          <table:table-cell office:value-type="percentage" office:value="0.38863">
            <text:p>38,86%</text:p>
          </table:table-cell>
          <table:table-cell office:value-type="float" office:value="1.654">
            <text:p>1,654</text:p>
          </table:table-cell>
          <table:table-cell table:number-columns-repeated="1013"/>
        </table:table-row>
        <table:table-row table:style-name="ro2">
          <table:table-cell office:value-type="string">
            <text:p>ACGL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93.8">
            <text:p>93,8</text:p>
          </table:table-cell>
          <table:table-cell office:value-type="float" office:value="7.215385">
            <text:p>7,215385</text:p>
          </table:table-cell>
          <table:table-cell office:value-type="float" office:value="0.11282">
            <text:p>0,11282</text:p>
          </table:table-cell>
          <table:table-cell office:value-type="percentage" office:value="0.29817">
            <text:p>29,82%</text:p>
          </table:table-cell>
          <table:table-cell office:value-type="percentage" office:value="0.21305999">
            <text:p>21,31%</text:p>
          </table:table-cell>
          <table:table-cell office:value-type="float" office:value="0.33">
            <text:p>0,33</text:p>
          </table:table-cell>
          <table:table-cell table:number-columns-repeated="1013"/>
        </table:table-row>
        <table:table-row table:style-name="ro2">
          <table:table-cell office:value-type="string">
            <text:p>BRK-B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475.94">
            <text:p>475,94</text:p>
          </table:table-cell>
          <table:table-cell office:value-type="float" office:value="14.164882">
            <text:p>14,164882</text:p>
          </table:table-cell>
          <table:table-cell office:value-type="float" office:value="0.17669">
            <text:p>0,17669</text:p>
          </table:table-cell>
          <table:table-cell office:value-type="percentage" office:value="0.31435">
            <text:p>31,44%</text:p>
          </table:table-cell>
          <table:table-cell office:value-type="percentage" office:value="0.10499">
            <text:p>10,50%</text:p>
          </table:table-cell>
          <table:table-cell office:value-type="float" office:value="0.622">
            <text:p>0,622</text:p>
          </table:table-cell>
          <table:table-cell table:number-columns-repeated="1013"/>
        </table:table-row>
        <table:table-row table:style-name="ro2">
          <table:table-cell office:value-type="string">
            <text:p>TECH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48.36">
            <text:p>48,36</text:p>
          </table:table-cell>
          <table:table-cell office:value-type="float" office:value="69.08572">
            <text:p>69,08572</text:p>
          </table:table-cell>
          <table:table-cell office:value-type="float" office:value="0.13922">
            <text:p>0,13922</text:p>
          </table:table-cell>
          <table:table-cell office:value-type="percentage" office:value="0.30231002">
            <text:p>30,23%</text:p>
          </table:table-cell>
          <table:table-cell office:value-type="percentage" office:value="0.053400002">
            <text:p>5,34%</text:p>
          </table:table-cell>
          <table:table-cell office:value-type="float" office:value="1.405">
            <text:p>1,405</text:p>
          </table:table-cell>
          <table:table-cell table:number-columns-repeated="1013"/>
        </table:table-row>
        <table:table-row table:style-name="ro2">
          <table:table-cell office:value-type="string">
            <text:p>BIIB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193.45">
            <text:p>193,45</text:p>
          </table:table-cell>
          <table:table-cell office:value-type="float" office:value="20.801075">
            <text:p>20,801075</text:p>
          </table:table-cell>
          <table:table-cell office:value-type="float" office:value="0.35181">
            <text:p>0,35181</text:p>
          </table:table-cell>
          <table:table-cell office:value-type="percentage" office:value="0.35377997">
            <text:p>35,38%</text:p>
          </table:table-cell>
          <table:table-cell office:value-type="percentage" office:value="0.077010006">
            <text:p>7,70%</text:p>
          </table:table-cell>
          <table:table-cell office:value-type="float" office:value="0.195">
            <text:p>0,195</text:p>
          </table:table-cell>
          <table:table-cell table:number-columns-repeated="1013"/>
        </table:table-row>
        <table:table-row table:style-name="ro2">
          <table:table-cell office:value-type="string">
            <text:p>BSX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53.93">
            <text:p>53,93</text:p>
          </table:table-cell>
          <table:table-cell office:value-type="float" office:value="22.564852">
            <text:p>22,564852</text:p>
          </table:table-cell>
          <table:table-cell office:value-type="float" office:value="0.4225">
            <text:p>0,4225</text:p>
          </table:table-cell>
          <table:table-cell office:value-type="percentage" office:value="0.26681">
            <text:p>26,68%</text:p>
          </table:table-cell>
          <table:table-cell office:value-type="percentage" office:value="0.14661">
            <text:p>14,66%</text:p>
          </table:table-cell>
          <table:table-cell office:value-type="float" office:value="0.623">
            <text:p>0,623</text:p>
          </table:table-cell>
          <table:table-cell table:number-columns-repeated="1013"/>
        </table:table-row>
        <table:table-row table:style-name="ro2">
          <table:table-cell office:value-type="string">
            <text:p>CDNS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362.7">
            <text:p>362,7</text:p>
          </table:table-cell>
          <table:table-cell office:value-type="float" office:value="84.74299">
            <text:p>84,74299</text:p>
          </table:table-cell>
          <table:table-cell office:value-type="float" office:value="0.46992">
            <text:p>0,46992</text:p>
          </table:table-cell>
          <table:table-cell office:value-type="percentage" office:value="0.36433">
            <text:p>36,43%</text:p>
          </table:table-cell>
          <table:table-cell office:value-type="percentage" office:value="0.20656">
            <text:p>20,66%</text:p>
          </table:table-cell>
          <table:table-cell office:value-type="float" office:value="1.131">
            <text:p>1,131</text:p>
          </table:table-cell>
          <table:table-cell table:number-columns-repeated="1013"/>
        </table:table-row>
        <table:table-row table:style-name="ro2">
          <table:table-cell office:value-type="string">
            <text:p>CBOE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348.56">
            <text:p>348,56</text:p>
          </table:table-cell>
          <table:table-cell office:value-type="float" office:value="29.766012">
            <text:p>29,766012</text:p>
          </table:table-cell>
          <table:table-cell office:value-type="float" office:value="0.29489">
            <text:p>0,29489</text:p>
          </table:table-cell>
          <table:table-cell office:value-type="percentage" office:value="0.37233">
            <text:p>37,23%</text:p>
          </table:table-cell>
          <table:table-cell office:value-type="percentage" office:value="0.2514">
            <text:p>25,14%</text:p>
          </table:table-cell>
          <table:table-cell office:value-type="float" office:value="0.372">
            <text:p>0,372</text:p>
          </table:table-cell>
          <table:table-cell table:number-columns-repeated="1013"/>
        </table:table-row>
        <table:table-row table:style-name="ro2">
          <table:table-cell office:value-type="string">
            <text:p>CF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15.02">
            <text:p>115,02</text:p>
          </table:table-cell>
          <table:table-cell office:value-type="float" office:value="10.362162">
            <text:p>10,362162</text:p>
          </table:table-cell>
          <table:table-cell office:value-type="float" office:value="0.43847">
            <text:p>0,43847</text:p>
          </table:table-cell>
          <table:table-cell office:value-type="percentage" office:value="0.46402">
            <text:p>46,40%</text:p>
          </table:table-cell>
          <table:table-cell office:value-type="percentage" office:value="0.273">
            <text:p>27,30%</text:p>
          </table:table-cell>
          <table:table-cell office:value-type="float" office:value="0.417">
            <text:p>0,417</text:p>
          </table:table-cell>
          <table:table-cell table:number-columns-repeated="1013"/>
        </table:table-row>
        <table:table-row table:style-name="ro2">
          <table:table-cell office:value-type="string">
            <text:p>CB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319.64">
            <text:p>319,64</text:p>
          </table:table-cell>
          <table:table-cell office:value-type="float" office:value="11.310687">
            <text:p>11,310687</text:p>
          </table:table-cell>
          <table:table-cell office:value-type="float" office:value="0.31458">
            <text:p>0,31458</text:p>
          </table:table-cell>
          <table:table-cell office:value-type="percentage" office:value="0.23757">
            <text:p>23,76%</text:p>
          </table:table-cell>
          <table:table-cell office:value-type="percentage" office:value="0.15433">
            <text:p>15,43%</text:p>
          </table:table-cell>
          <table:table-cell office:value-type="float" office:value="0.44">
            <text:p>0,44</text:p>
          </table:table-cell>
          <table:table-cell table:number-columns-repeated="1013"/>
        </table:table-row>
        <table:table-row table:style-name="ro2">
          <table:table-cell office:value-type="string">
            <text:p>CME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81.25">
            <text:p>281,25</text:p>
          </table:table-cell>
          <table:table-cell office:value-type="float" office:value="23.976982">
            <text:p>23,976982</text:p>
          </table:table-cell>
          <table:table-cell office:value-type="float" office:value="0.14059">
            <text:p>0,14059</text:p>
          </table:table-cell>
          <table:table-cell office:value-type="percentage" office:value="0.71067">
            <text:p>71,07%</text:p>
          </table:table-cell>
          <table:table-cell office:value-type="percentage" office:value="0.15919">
            <text:p>15,92%</text:p>
          </table:table-cell>
          <table:table-cell office:value-type="float" office:value="0.26">
            <text:p>0,26</text:p>
          </table:table-cell>
          <table:table-cell table:number-columns-repeated="1013"/>
        </table:table-row>
        <table:table-row table:style-name="ro2">
          <table:table-cell office:value-type="string">
            <text:p>COP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13.87">
            <text:p>113,87</text:p>
          </table:table-cell>
          <table:table-cell office:value-type="float" office:value="19.3">
            <text:p>19,3</text:p>
          </table:table-cell>
          <table:table-cell office:value-type="float" office:value="0.36143">
            <text:p>0,36143</text:p>
          </table:table-cell>
          <table:table-cell office:value-type="percentage" office:value="0.39319">
            <text:p>39,32%</text:p>
          </table:table-cell>
          <table:table-cell office:value-type="percentage" office:value="0.112840004">
            <text:p>11,28%</text:p>
          </table:table-cell>
          <table:table-cell office:value-type="float" office:value="0.149">
            <text:p>0,149</text:p>
          </table:table-cell>
          <table:table-cell table:number-columns-repeated="1013"/>
        </table:table-row>
        <table:table-row table:style-name="ro2">
          <table:table-cell office:value-type="string">
            <text:p>COO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60">
            <text:p>60</text:p>
          </table:table-cell>
          <table:table-cell office:value-type="float" office:value="29.850746">
            <text:p>29,850746</text:p>
          </table:table-cell>
          <table:table-cell office:value-type="float" office:value="0.33201">
            <text:p>0,33201</text:p>
          </table:table-cell>
          <table:table-cell office:value-type="percentage" office:value="0.26479998">
            <text:p>26,48%</text:p>
          </table:table-cell>
          <table:table-cell office:value-type="percentage" office:value="0.04868">
            <text:p>4,87%</text:p>
          </table:table-cell>
          <table:table-cell office:value-type="float" office:value="0.894">
            <text:p>0,894</text:p>
          </table:table-cell>
          <table:table-cell table:number-columns-repeated="1013"/>
        </table:table-row>
        <table:table-row table:style-name="ro2">
          <table:table-cell office:value-type="string">
            <text:p>DHR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71.16">
            <text:p>171,16</text:p>
          </table:table-cell>
          <table:table-cell office:value-type="float" office:value="33.23495">
            <text:p>33,23495</text:p>
          </table:table-cell>
          <table:table-cell office:value-type="float" office:value="0.3717">
            <text:p>0,3717</text:p>
          </table:table-cell>
          <table:table-cell office:value-type="percentage" office:value="0.32024">
            <text:p>32,02%</text:p>
          </table:table-cell>
          <table:table-cell office:value-type="percentage" office:value="0.0708">
            <text:p>7,08%</text:p>
          </table:table-cell>
          <table:table-cell office:value-type="float" office:value="0.841">
            <text:p>0,841</text:p>
          </table:table-cell>
          <table:table-cell table:number-columns-repeated="1013"/>
        </table:table-row>
        <table:table-row table:style-name="ro2">
          <table:table-cell office:value-type="string">
            <text:p>DECK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00.42">
            <text:p>100,42</text:p>
          </table:table-cell>
          <table:table-cell office:value-type="float" office:value="14.264204">
            <text:p>14,264204</text:p>
          </table:table-cell>
          <table:table-cell office:value-type="float" office:value="0.1314">
            <text:p>0,1314</text:p>
          </table:table-cell>
          <table:table-cell office:value-type="percentage" office:value="0.25303">
            <text:p>25,30%</text:p>
          </table:table-cell>
          <table:table-cell office:value-type="percentage" office:value="0.39688">
            <text:p>39,69%</text:p>
          </table:table-cell>
          <table:table-cell office:value-type="float" office:value="1.141">
            <text:p>1,141</text:p>
          </table:table-cell>
          <table:table-cell table:number-columns-repeated="1013"/>
        </table:table-row>
        <table:table-row table:style-name="ro2">
          <table:table-cell office:value-type="string">
            <text:p>DXCM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60.61">
            <text:p>60,61</text:p>
          </table:table-cell>
          <table:table-cell office:value-type="float" office:value="26.012877">
            <text:p>26,012877</text:p>
          </table:table-cell>
          <table:table-cell office:value-type="float" office:value="0.46833">
            <text:p>0,46833</text:p>
          </table:table-cell>
          <table:table-cell office:value-type="percentage" office:value="0.26823">
            <text:p>26,82%</text:p>
          </table:table-cell>
          <table:table-cell office:value-type="percentage" office:value="0.35624">
            <text:p>35,62%</text:p>
          </table:table-cell>
          <table:table-cell office:value-type="float" office:value="1.398">
            <text:p>1,398</text:p>
          </table:table-cell>
          <table:table-cell table:number-columns-repeated="1013"/>
        </table:table-row>
        <table:table-row table:style-name="ro2">
          <table:table-cell office:value-type="string">
            <text:p>DOV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19.83">
            <text:p>219,83</text:p>
          </table:table-cell>
          <table:table-cell office:value-type="float" office:value="27.47875">
            <text:p>27,47875</text:p>
          </table:table-cell>
          <table:table-cell office:value-type="float" office:value="0.43927">
            <text:p>0,43927</text:p>
          </table:table-cell>
          <table:table-cell office:value-type="percentage" office:value="0.22534999">
            <text:p>22,53%</text:p>
          </table:table-cell>
          <table:table-cell office:value-type="percentage" office:value="0.14998001">
            <text:p>15,00%</text:p>
          </table:table-cell>
          <table:table-cell office:value-type="float" office:value="1.213">
            <text:p>1,213</text:p>
          </table:table-cell>
          <table:table-cell table:number-columns-repeated="1013"/>
        </table:table-row>
        <table:table-row table:style-name="ro2">
          <table:table-cell office:value-type="string">
            <text:p>EOG</text:p>
          </table:table-cell>
          <table:table-cell office:value-type="string">
            <text:p>Ener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30.03">
            <text:p>130,03</text:p>
          </table:table-cell>
          <table:table-cell office:value-type="float" office:value="12.785644">
            <text:p>12,785644</text:p>
          </table:table-cell>
          <table:table-cell office:value-type="float" office:value="0.26873">
            <text:p>0,26873</text:p>
          </table:table-cell>
          <table:table-cell office:value-type="percentage" office:value="0.53398">
            <text:p>53,40%</text:p>
          </table:table-cell>
          <table:table-cell office:value-type="percentage" office:value="0.18195">
            <text:p>18,20%</text:p>
          </table:table-cell>
          <table:table-cell office:value-type="float" office:value="0.279">
            <text:p>0,279</text:p>
          </table:table-cell>
          <table:table-cell table:number-columns-repeated="1013"/>
        </table:table-row>
        <table:table-row table:style-name="ro2">
          <table:table-cell office:value-type="string">
            <text:p>EQT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55.96">
            <text:p>55,96</text:p>
          </table:table-cell>
          <table:table-cell office:value-type="float" office:value="10.618596">
            <text:p>10,618596</text:p>
          </table:table-cell>
          <table:table-cell office:value-type="float" office:value="0.20816">
            <text:p>0,20816</text:p>
          </table:table-cell>
          <table:table-cell office:value-type="percentage" office:value="0.81861997">
            <text:p>81,86%</text:p>
          </table:table-cell>
          <table:table-cell office:value-type="percentage" office:value="0.13402">
            <text:p>13,40%</text:p>
          </table:table-cell>
          <table:table-cell office:value-type="float" office:value="0.588">
            <text:p>0,588</text:p>
          </table:table-cell>
          <table:table-cell table:number-columns-repeated="1013"/>
        </table:table-row>
        <table:table-row table:style-name="ro2">
          <table:table-cell office:value-type="string">
            <text:p>EXE</text:p>
          </table:table-cell>
          <table:table-cell office:value-type="string">
            <text:p>Ener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95.94">
            <text:p>95,94</text:p>
          </table:table-cell>
          <table:table-cell office:value-type="float" office:value="7.1383934">
            <text:p>7,1383934</text:p>
          </table:table-cell>
          <table:table-cell office:value-type="float" office:value="0.25883">
            <text:p>0,25883</text:p>
          </table:table-cell>
          <table:table-cell office:value-type="percentage" office:value="0.57302">
            <text:p>57,30%</text:p>
          </table:table-cell>
          <table:table-cell office:value-type="percentage" office:value="0.17568001">
            <text:p>17,57%</text:p>
          </table:table-cell>
          <table:table-cell office:value-type="float" office:value="0.352">
            <text:p>0,352</text:p>
          </table:table-cell>
          <table:table-cell table:number-columns-repeated="1013"/>
        </table:table-row>
        <table:table-row table:style-name="ro2">
          <table:table-cell office:value-type="string">
            <text:p>FAST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44.17">
            <text:p>44,17</text:p>
          </table:table-cell>
          <table:table-cell office:value-type="float" office:value="39.088493">
            <text:p>39,088493</text:p>
          </table:table-cell>
          <table:table-cell office:value-type="float" office:value="0.11167">
            <text:p>0,11167</text:p>
          </table:table-cell>
          <table:table-cell office:value-type="percentage" office:value="0.22368">
            <text:p>22,37%</text:p>
          </table:table-cell>
          <table:table-cell office:value-type="percentage" office:value="0.33842">
            <text:p>33,84%</text:p>
          </table:table-cell>
          <table:table-cell office:value-type="float" office:value="0.744">
            <text:p>0,744</text:p>
          </table:table-cell>
          <table:table-cell table:number-columns-repeated="1013"/>
        </table:table-row>
        <table:table-row table:style-name="ro2">
          <table:table-cell office:value-type="string">
            <text:p>FCX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61.65">
            <text:p>61,65</text:p>
          </table:table-cell>
          <table:table-cell office:value-type="float" office:value="32.61905">
            <text:p>32,61905</text:p>
          </table:table-cell>
          <table:table-cell office:value-type="float" office:value="0.33008">
            <text:p>0,33008</text:p>
          </table:table-cell>
          <table:table-cell office:value-type="percentage" office:value="0.36675">
            <text:p>36,68%</text:p>
          </table:table-cell>
          <table:table-cell office:value-type="percentage" office:value="0.15630999">
            <text:p>15,63%</text:p>
          </table:table-cell>
          <table:table-cell office:value-type="float" office:value="1.316">
            <text:p>1,316</text:p>
          </table:table-cell>
          <table:table-cell table:number-columns-repeated="1013"/>
        </table:table-row>
        <table:table-row table:style-name="ro2">
          <table:table-cell office:value-type="string">
            <text:p>IEX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216.92">
            <text:p>216,92</text:p>
          </table:table-cell>
          <table:table-cell office:value-type="float" office:value="32.04136">
            <text:p>32,04136</text:p>
          </table:table-cell>
          <table:table-cell office:value-type="float" office:value="0.46915">
            <text:p>0,46915</text:p>
          </table:table-cell>
          <table:table-cell office:value-type="percentage" office:value="0.26957">
            <text:p>26,96%</text:p>
          </table:table-cell>
          <table:table-cell office:value-type="percentage" office:value="0.12748">
            <text:p>12,75%</text:p>
          </table:table-cell>
          <table:table-cell office:value-type="float" office:value="1.014">
            <text:p>1,014</text:p>
          </table:table-cell>
          <table:table-cell table:number-columns-repeated="1013"/>
        </table:table-row>
        <table:table-row table:style-name="ro2">
          <table:table-cell office:value-type="string">
            <text:p>INTU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396.31">
            <text:p>396,31</text:p>
          </table:table-cell>
          <table:table-cell office:value-type="float" office:value="25.76788">
            <text:p>25,76788</text:p>
          </table:table-cell>
          <table:table-cell office:value-type="float" office:value="0.36148">
            <text:p>0,36148</text:p>
          </table:table-cell>
          <table:table-cell office:value-type="percentage" office:value="0.30351">
            <text:p>30,35%</text:p>
          </table:table-cell>
          <table:table-cell office:value-type="percentage" office:value="0.23457001">
            <text:p>23,46%</text:p>
          </table:table-cell>
          <table:table-cell office:value-type="float" office:value="1.035">
            <text:p>1,035</text:p>
          </table:table-cell>
          <table:table-cell table:number-columns-repeated="1013"/>
        </table:table-row>
        <table:table-row table:style-name="ro2">
          <table:table-cell office:value-type="string">
            <text:p>KEYS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WEAKENING</text:p>
          </table:table-cell>
          <table:table-cell office:value-type="float" office:value="360.3">
            <text:p>360,3</text:p>
          </table:table-cell>
          <table:table-cell office:value-type="float" office:value="63.321613">
            <text:p>63,321613</text:p>
          </table:table-cell>
          <table:table-cell office:value-type="float" office:value="0.44674">
            <text:p>0,44674</text:p>
          </table:table-cell>
          <table:table-cell office:value-type="percentage" office:value="0.22653">
            <text:p>22,65%</text:p>
          </table:table-cell>
          <table:table-cell office:value-type="percentage" office:value="0.17222999">
            <text:p>17,22%</text:p>
          </table:table-cell>
          <table:table-cell office:value-type="float" office:value="1.261">
            <text:p>1,261</text:p>
          </table:table-cell>
          <table:table-cell table:number-columns-repeated="1013"/>
        </table:table-row>
        <table:table-row table:style-name="ro2">
          <table:table-cell office:value-type="string">
            <text:p>LRCX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294.05">
            <text:p>294,05</text:p>
          </table:table-cell>
          <table:table-cell office:value-type="float" office:value="55.58601">
            <text:p>55,58601</text:p>
          </table:table-cell>
          <table:table-cell office:value-type="float" office:value="0.35282">
            <text:p>0,35282</text:p>
          </table:table-cell>
          <table:table-cell office:value-type="percentage" office:value="0.36195">
            <text:p>36,20%</text:p>
          </table:table-cell>
          <table:table-cell office:value-type="percentage" office:value="0.66762">
            <text:p>66,76%</text:p>
          </table:table-cell>
          <table:table-cell office:value-type="float" office:value="1.819">
            <text:p>1,819</text:p>
          </table:table-cell>
          <table:table-cell table:number-columns-repeated="1013"/>
        </table:table-row>
        <table:table-row table:style-name="ro2">
          <table:table-cell office:value-type="string">
            <text:p>LULU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31.18">
            <text:p>131,18</text:p>
          </table:table-cell>
          <table:table-cell office:value-type="float" office:value="9.89291">
            <text:p>9,89291</text:p>
          </table:table-cell>
          <table:table-cell office:value-type="float" office:value="0.36245">
            <text:p>0,36245</text:p>
          </table:table-cell>
          <table:table-cell office:value-type="percentage" office:value="0.24379998">
            <text:p>24,38%</text:p>
          </table:table-cell>
          <table:table-cell office:value-type="percentage" office:value="0.34013">
            <text:p>34,01%</text:p>
          </table:table-cell>
          <table:table-cell office:value-type="float" office:value="0.899">
            <text:p>0,899</text:p>
          </table:table-cell>
          <table:table-cell table:number-columns-repeated="1013"/>
        </table:table-row>
        <table:table-row table:style-name="ro2">
          <table:table-cell office:value-type="string">
            <text:p>META</text:p>
          </table:table-cell>
          <table:table-cell office:value-type="string">
            <text:p>Communication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609.63">
            <text:p>609,63</text:p>
          </table:table-cell>
          <table:table-cell office:value-type="float" office:value="22.176428">
            <text:p>22,176428</text:p>
          </table:table-cell>
          <table:table-cell office:value-type="float" office:value="0.35608">
            <text:p>0,35608</text:p>
          </table:table-cell>
          <table:table-cell office:value-type="percentage" office:value="0.5085">
            <text:p>50,85%</text:p>
          </table:table-cell>
          <table:table-cell office:value-type="percentage" office:value="0.32930002">
            <text:p>32,93%</text:p>
          </table:table-cell>
          <table:table-cell office:value-type="float" office:value="1.243">
            <text:p>1,243</text:p>
          </table:table-cell>
          <table:table-cell table:number-columns-repeated="1013"/>
        </table:table-row>
        <table:table-row table:style-name="ro2">
          <table:table-cell office:value-type="string">
            <text:p>MU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746.81">
            <text:p>746,81</text:p>
          </table:table-cell>
          <table:table-cell office:value-type="float" office:value="35.21028">
            <text:p>35,21028</text:p>
          </table:table-cell>
          <table:table-cell office:value-type="float" office:value="0.14902">
            <text:p>0,14902</text:p>
          </table:table-cell>
          <table:table-cell office:value-type="percentage" office:value="0.63324">
            <text:p>63,32%</text:p>
          </table:table-cell>
          <table:table-cell office:value-type="percentage" office:value="0.39823002">
            <text:p>39,82%</text:p>
          </table:table-cell>
          <table:table-cell office:value-type="float" office:value="1.919">
            <text:p>1,919</text:p>
          </table:table-cell>
          <table:table-cell table:number-columns-repeated="1013"/>
        </table:table-row>
        <table:table-row table:style-name="ro2">
          <table:table-cell office:value-type="string">
            <text:p>MSFT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415.12">
            <text:p>415,12</text:p>
          </table:table-cell>
          <table:table-cell office:value-type="float" office:value="24.753725">
            <text:p>24,753725</text:p>
          </table:table-cell>
          <table:table-cell office:value-type="float" office:value="0.30271">
            <text:p>0,30271</text:p>
          </table:table-cell>
          <table:table-cell office:value-type="percentage" office:value="0.57956004">
            <text:p>57,96%</text:p>
          </table:table-cell>
          <table:table-cell office:value-type="percentage" office:value="0.34013999">
            <text:p>34,01%</text:p>
          </table:table-cell>
          <table:table-cell office:value-type="float" office:value="1.093">
            <text:p>1,093</text:p>
          </table:table-cell>
          <table:table-cell table:number-columns-repeated="1013"/>
        </table:table-row>
        <table:table-row table:style-name="ro2">
          <table:table-cell office:value-type="string">
            <text:p>NEM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16.51">
            <text:p>116,51</text:p>
          </table:table-cell>
          <table:table-cell office:value-type="float" office:value="15.111544">
            <text:p>15,111544</text:p>
          </table:table-cell>
          <table:table-cell office:value-type="float" office:value="0.15762">
            <text:p>0,15762</text:p>
          </table:table-cell>
          <table:table-cell office:value-type="percentage" office:value="0.65445">
            <text:p>65,45%</text:p>
          </table:table-cell>
          <table:table-cell office:value-type="percentage" office:value="0.25832">
            <text:p>25,83%</text:p>
          </table:table-cell>
          <table:table-cell office:value-type="float" office:value="0.448">
            <text:p>0,448</text:p>
          </table:table-cell>
          <table:table-cell table:number-columns-repeated="1013"/>
        </table:table-row>
        <table:table-row table:style-name="ro2">
          <table:table-cell office:value-type="string">
            <text:p>OXY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53.03">
            <text:p>53,03</text:p>
          </table:table-cell>
          <table:table-cell office:value-type="float" office:value="71.66216">
            <text:p>71,66216</text:p>
          </table:table-cell>
          <table:table-cell office:value-type="float" office:value="0.41989">
            <text:p>0,41989</text:p>
          </table:table-cell>
          <table:table-cell office:value-type="percentage" office:value="0.51267">
            <text:p>51,27%</text:p>
          </table:table-cell>
          <table:table-cell office:value-type="percentage" office:value="0.04053">
            <text:p>4,05%</text:p>
          </table:table-cell>
          <table:table-cell office:value-type="float" office:value="0.172">
            <text:p>0,172</text:p>
          </table:table-cell>
          <table:table-cell table:number-columns-repeated="1013"/>
        </table:table-row>
        <table:table-row table:style-name="ro2">
          <table:table-cell office:value-type="string">
            <text:p>ON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WEAKENING</text:p>
          </table:table-cell>
          <table:table-cell office:value-type="float" office:value="103.2">
            <text:p>103,2</text:p>
          </table:table-cell>
          <table:table-cell office:value-type="float" office:value="75.88235">
            <text:p>75,88235</text:p>
          </table:table-cell>
          <table:table-cell office:value-type="float" office:value="0.44337">
            <text:p>0,44337</text:p>
          </table:table-cell>
          <table:table-cell office:value-type="percentage" office:value="0.33775002">
            <text:p>33,78%</text:p>
          </table:table-cell>
          <table:table-cell office:value-type="percentage" office:value="0.074939996">
            <text:p>7,49%</text:p>
          </table:table-cell>
          <table:table-cell office:value-type="float" office:value="1.938">
            <text:p>1,938</text:p>
          </table:table-cell>
          <table:table-cell table:number-columns-repeated="1013"/>
        </table:table-row>
        <table:table-row table:style-name="ro2">
          <table:table-cell office:value-type="string">
            <text:p>PTC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146.65">
            <text:p>146,65</text:p>
          </table:table-cell>
          <table:table-cell office:value-type="float" office:value="14.087416">
            <text:p>14,087416</text:p>
          </table:table-cell>
          <table:table-cell office:value-type="float" office:value="0.3578">
            <text:p>0,3578</text:p>
          </table:table-cell>
          <table:table-cell office:value-type="percentage" office:value="0.44009">
            <text:p>44,01%</text:p>
          </table:table-cell>
          <table:table-cell office:value-type="percentage" office:value="0.344">
            <text:p>34,40%</text:p>
          </table:table-cell>
          <table:table-cell office:value-type="float" office:value="0.978">
            <text:p>0,978</text:p>
          </table:table-cell>
          <table:table-cell table:number-columns-repeated="1013"/>
        </table:table-row>
        <table:table-row table:style-name="ro2">
          <table:table-cell office:value-type="string">
            <text:p>RMD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06.76">
            <text:p>206,76</text:p>
          </table:table-cell>
          <table:table-cell office:value-type="float" office:value="19.919075">
            <text:p>19,919075</text:p>
          </table:table-cell>
          <table:table-cell office:value-type="float" office:value="0.12988">
            <text:p>0,12988</text:p>
          </table:table-cell>
          <table:table-cell office:value-type="percentage" office:value="0.38272998">
            <text:p>38,27%</text:p>
          </table:table-cell>
          <table:table-cell office:value-type="percentage" office:value="0.25246">
            <text:p>25,25%</text:p>
          </table:table-cell>
          <table:table-cell office:value-type="float" office:value="0.845">
            <text:p>0,845</text:p>
          </table:table-cell>
          <table:table-cell table:number-columns-repeated="1013"/>
        </table:table-row>
        <table:table-row table:style-name="ro2">
          <table:table-cell office:value-type="string">
            <text:p>RVTY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101">
            <text:p>101</text:p>
          </table:table-cell>
          <table:table-cell office:value-type="float" office:value="48.557693">
            <text:p>48,557693</text:p>
          </table:table-cell>
          <table:table-cell office:value-type="float" office:value="0.46642">
            <text:p>0,46642</text:p>
          </table:table-cell>
          <table:table-cell office:value-type="percentage" office:value="0.29386">
            <text:p>29,39%</text:p>
          </table:table-cell>
          <table:table-cell office:value-type="percentage" office:value="0.03227">
            <text:p>3,23%</text:p>
          </table:table-cell>
          <table:table-cell office:value-type="float" office:value="1.051">
            <text:p>1,051</text:p>
          </table:table-cell>
          <table:table-cell table:number-columns-repeated="1013"/>
        </table:table-row>
        <table:table-row table:style-name="ro2">
          <table:table-cell office:value-type="string">
            <text:p>SPGI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420.12">
            <text:p>420,12</text:p>
          </table:table-cell>
          <table:table-cell office:value-type="float" office:value="26.589872">
            <text:p>26,589872</text:p>
          </table:table-cell>
          <table:table-cell office:value-type="float" office:value="0.38392">
            <text:p>0,38392</text:p>
          </table:table-cell>
          <table:table-cell office:value-type="percentage" office:value="0.50051">
            <text:p>50,05%</text:p>
          </table:table-cell>
          <table:table-cell office:value-type="percentage" office:value="0.13939999">
            <text:p>13,94%</text:p>
          </table:table-cell>
          <table:table-cell office:value-type="float" office:value="1.105">
            <text:p>1,105</text:p>
          </table:table-cell>
          <table:table-cell table:number-columns-repeated="1013"/>
        </table:table-row>
        <table:table-row table:style-name="ro2">
          <table:table-cell office:value-type="string">
            <text:p>CRM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181.82">
            <text:p>181,82</text:p>
          </table:table-cell>
          <table:table-cell office:value-type="float" office:value="23.310257">
            <text:p>23,310257</text:p>
          </table:table-cell>
          <table:table-cell office:value-type="float" office:value="0.29947">
            <text:p>0,29947</text:p>
          </table:table-cell>
          <table:table-cell office:value-type="percentage" office:value="0.30218">
            <text:p>30,22%</text:p>
          </table:table-cell>
          <table:table-cell office:value-type="percentage" office:value="0.123959996">
            <text:p>12,40%</text:p>
          </table:table-cell>
          <table:table-cell office:value-type="float" office:value="1.139">
            <text:p>1,139</text:p>
          </table:table-cell>
          <table:table-cell table:number-columns-repeated="1013"/>
        </table:table-row>
        <table:table-row table:style-name="ro2">
          <table:table-cell office:value-type="string">
            <text:p>SLB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53.27">
            <text:p>53,27</text:p>
          </table:table-cell>
          <table:table-cell office:value-type="float" office:value="23.46696">
            <text:p>23,46696</text:p>
          </table:table-cell>
          <table:table-cell office:value-type="float" office:value="0.42515">
            <text:p>0,42515</text:p>
          </table:table-cell>
          <table:table-cell office:value-type="percentage" office:value="0.20897">
            <text:p>20,90%</text:p>
          </table:table-cell>
          <table:table-cell office:value-type="percentage" office:value="0.14066">
            <text:p>14,07%</text:p>
          </table:table-cell>
          <table:table-cell office:value-type="float" office:value="0.731">
            <text:p>0,731</text:p>
          </table:table-cell>
          <table:table-cell table:number-columns-repeated="1013"/>
        </table:table-row>
        <table:table-row table:style-name="ro2">
          <table:table-cell office:value-type="string">
            <text:p>NOW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91.18">
            <text:p>91,18</text:p>
          </table:table-cell>
          <table:table-cell office:value-type="float" office:value="54.27381">
            <text:p>54,27381</text:p>
          </table:table-cell>
          <table:table-cell office:value-type="float" office:value="0.20728">
            <text:p>0,20728</text:p>
          </table:table-cell>
          <table:table-cell office:value-type="percentage" office:value="0.20688">
            <text:p>20,69%</text:p>
          </table:table-cell>
          <table:table-cell office:value-type="percentage" office:value="0.1607">
            <text:p>16,07%</text:p>
          </table:table-cell>
          <table:table-cell office:value-type="float" office:value="0.819">
            <text:p>0,819</text:p>
          </table:table-cell>
          <table:table-cell table:number-columns-repeated="1013"/>
        </table:table-row>
        <table:table-row table:style-name="ro2">
          <table:table-cell office:value-type="string">
            <text:p>SWKS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66.78">
            <text:p>66,78</text:p>
          </table:table-cell>
          <table:table-cell office:value-type="float" office:value="27.824999">
            <text:p>27,824999</text:p>
          </table:table-cell>
          <table:table-cell office:value-type="float" office:value="0.20632">
            <text:p>0,20632</text:p>
          </table:table-cell>
          <table:table-cell office:value-type="percentage" office:value="0.22479">
            <text:p>22,48%</text:p>
          </table:table-cell>
          <table:table-cell office:value-type="percentage" office:value="0.06171">
            <text:p>6,17%</text:p>
          </table:table-cell>
          <table:table-cell office:value-type="float" office:value="1.476">
            <text:p>1,476</text:p>
          </table:table-cell>
          <table:table-cell table:number-columns-repeated="1013"/>
        </table:table-row>
        <table:table-row table:style-name="ro2">
          <table:table-cell office:value-type="string">
            <text:p>SNA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374">
            <text:p>374</text:p>
          </table:table-cell>
          <table:table-cell office:value-type="float" office:value="19.308208">
            <text:p>19,308208</text:p>
          </table:table-cell>
          <table:table-cell office:value-type="float" office:value="0.21731">
            <text:p>0,21731</text:p>
          </table:table-cell>
          <table:table-cell office:value-type="percentage" office:value="0.26888">
            <text:p>26,89%</text:p>
          </table:table-cell>
          <table:table-cell office:value-type="percentage" office:value="0.18202">
            <text:p>18,20%</text:p>
          </table:table-cell>
          <table:table-cell office:value-type="float" office:value="0.744">
            <text:p>0,744</text:p>
          </table:table-cell>
          <table:table-cell table:number-columns-repeated="1013"/>
        </table:table-row>
        <table:table-row table:style-name="ro2">
          <table:table-cell office:value-type="string">
            <text:p>STE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07.45">
            <text:p>207,45</text:p>
          </table:table-cell>
          <table:table-cell office:value-type="float" office:value="28.892757">
            <text:p>28,892757</text:p>
          </table:table-cell>
          <table:table-cell office:value-type="float" office:value="0.28651">
            <text:p>0,28651</text:p>
          </table:table-cell>
          <table:table-cell office:value-type="percentage" office:value="0.27021998">
            <text:p>27,02%</text:p>
          </table:table-cell>
          <table:table-cell office:value-type="percentage" office:value="0.10468">
            <text:p>10,47%</text:p>
          </table:table-cell>
          <table:table-cell office:value-type="float" office:value="0.954">
            <text:p>0,954</text:p>
          </table:table-cell>
          <table:table-cell table:number-columns-repeated="1013"/>
        </table:table-row>
        <table:table-row table:style-name="ro2">
          <table:table-cell office:value-type="string">
            <text:p>SNPS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WEAKENING</text:p>
          </table:table-cell>
          <table:table-cell office:value-type="float" office:value="516.48">
            <text:p>516,48</text:p>
          </table:table-cell>
          <table:table-cell office:value-type="float" office:value="79.3364">
            <text:p>79,3364</text:p>
          </table:table-cell>
          <table:table-cell office:value-type="float" office:value="0.35579">
            <text:p>0,35579</text:p>
          </table:table-cell>
          <table:table-cell office:value-type="percentage" office:value="0.20169">
            <text:p>20,17%</text:p>
          </table:table-cell>
          <table:table-cell office:value-type="percentage" office:value="0.055430003">
            <text:p>5,54%</text:p>
          </table:table-cell>
          <table:table-cell office:value-type="float" office:value="1.245">
            <text:p>1,245</text:p>
          </table:table-cell>
          <table:table-cell table:number-columns-repeated="1013"/>
        </table:table-row>
        <table:table-row table:style-name="ro2">
          <table:table-cell office:value-type="string">
            <text:p>TEL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06.2">
            <text:p>206,2</text:p>
          </table:table-cell>
          <table:table-cell office:value-type="float" office:value="21.062307">
            <text:p>21,062307</text:p>
          </table:table-cell>
          <table:table-cell office:value-type="float" office:value="0.43798">
            <text:p>0,43798</text:p>
          </table:table-cell>
          <table:table-cell office:value-type="percentage" office:value="0.25305">
            <text:p>25,31%</text:p>
          </table:table-cell>
          <table:table-cell office:value-type="percentage" office:value="0.22719999">
            <text:p>22,72%</text:p>
          </table:table-cell>
          <table:table-cell office:value-type="float" office:value="1.177">
            <text:p>1,177</text:p>
          </table:table-cell>
          <table:table-cell table:number-columns-repeated="1013"/>
        </table:table-row>
        <table:table-row table:style-name="ro2">
          <table:table-cell office:value-type="string">
            <text:p>TDY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621.38">
            <text:p>621,38</text:p>
          </table:table-cell>
          <table:table-cell office:value-type="float" office:value="31.446356">
            <text:p>31,446356</text:p>
          </table:table-cell>
          <table:table-cell office:value-type="float" office:value="0.23133">
            <text:p>0,23133</text:p>
          </table:table-cell>
          <table:table-cell office:value-type="percentage" office:value="0.24709">
            <text:p>24,71%</text:p>
          </table:table-cell>
          <table:table-cell office:value-type="percentage" office:value="0.09049">
            <text:p>9,05%</text:p>
          </table:table-cell>
          <table:table-cell office:value-type="float" office:value="0.969">
            <text:p>0,969</text:p>
          </table:table-cell>
          <table:table-cell table:number-columns-repeated="1013"/>
        </table:table-row>
        <table:table-row table:style-name="ro2">
          <table:table-cell office:value-type="string">
            <text:p>TTD</text:p>
          </table:table-cell>
          <table:table-cell office:value-type="string">
            <text:p>Communication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3.08">
            <text:p>23,08</text:p>
          </table:table-cell>
          <table:table-cell office:value-type="float" office:value="26.227272">
            <text:p>26,227272</text:p>
          </table:table-cell>
          <table:table-cell office:value-type="float" office:value="0.17264">
            <text:p>0,17264</text:p>
          </table:table-cell>
          <table:table-cell office:value-type="percentage" office:value="0.23903999">
            <text:p>23,90%</text:p>
          </table:table-cell>
          <table:table-cell office:value-type="percentage" office:value="0.16735001">
            <text:p>16,74%</text:p>
          </table:table-cell>
          <table:table-cell office:value-type="float" office:value="1.096">
            <text:p>1,096</text:p>
          </table:table-cell>
          <table:table-cell table:number-columns-repeated="1013"/>
        </table:table-row>
        <table:table-row table:style-name="ro2">
          <table:table-cell office:value-type="string">
            <text:p>TRV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298.04">
            <text:p>298,04</text:p>
          </table:table-cell>
          <table:table-cell office:value-type="float" office:value="8.896717">
            <text:p>8,896717</text:p>
          </table:table-cell>
          <table:table-cell office:value-type="float" office:value="0.28975">
            <text:p>0,28975</text:p>
          </table:table-cell>
          <table:table-cell office:value-type="percentage" office:value="0.21605">
            <text:p>21,61%</text:p>
          </table:table-cell>
          <table:table-cell office:value-type="percentage" office:value="0.25272">
            <text:p>25,27%</text:p>
          </table:table-cell>
          <table:table-cell office:value-type="float" office:value="0.512">
            <text:p>0,512</text:p>
          </table:table-cell>
          <table:table-cell table:number-columns-repeated="1013"/>
        </table:table-row>
        <table:table-row table:style-name="ro2">
          <table:table-cell office:value-type="string">
            <text:p>TRMB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60.8">
            <text:p>60,8</text:p>
          </table:table-cell>
          <table:table-cell office:value-type="float" office:value="31.83246">
            <text:p>31,83246</text:p>
          </table:table-cell>
          <table:table-cell office:value-type="float" office:value="0.25062">
            <text:p>0,25062</text:p>
          </table:table-cell>
          <table:table-cell office:value-type="percentage" office:value="0.23515">
            <text:p>23,52%</text:p>
          </table:table-cell>
          <table:table-cell office:value-type="percentage" office:value="0.08252">
            <text:p>8,25%</text:p>
          </table:table-cell>
          <table:table-cell office:value-type="float" office:value="1.453">
            <text:p>1,453</text:p>
          </table:table-cell>
          <table:table-cell table:number-columns-repeated="1013"/>
        </table:table-row>
        <table:table-row table:style-name="ro2">
          <table:table-cell office:value-type="string">
            <text:p>VRTX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429.82">
            <text:p>429,82</text:p>
          </table:table-cell>
          <table:table-cell office:value-type="float" office:value="25.508606">
            <text:p>25,508606</text:p>
          </table:table-cell>
          <table:table-cell office:value-type="float" office:value="0.1026">
            <text:p>0,1026</text:p>
          </table:table-cell>
          <table:table-cell office:value-type="percentage" office:value="0.40769002">
            <text:p>40,77%</text:p>
          </table:table-cell>
          <table:table-cell office:value-type="percentage" office:value="0.24197">
            <text:p>24,20%</text:p>
          </table:table-cell>
          <table:table-cell office:value-type="float" office:value="0.301">
            <text:p>0,301</text:p>
          </table:table-cell>
          <table:table-cell table:number-columns-repeated="1013"/>
        </table:table-row>
        <table:table-row table:style-name="ro2">
          <table:table-cell office:value-type="string">
            <text:p>DIS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108.02">
            <text:p>108,02</text:p>
          </table:table-cell>
          <table:table-cell office:value-type="float" office:value="17.2832">
            <text:p>17,2832</text:p>
          </table:table-cell>
          <table:table-cell office:value-type="float" office:value="0.41069">
            <text:p>0,41069</text:p>
          </table:table-cell>
          <table:table-cell office:value-type="percentage" office:value="0.20275">
            <text:p>20,28%</text:p>
          </table:table-cell>
          <table:table-cell office:value-type="percentage" office:value="0.1101">
            <text:p>11,01%</text:p>
          </table:table-cell>
          <table:table-cell office:value-type="float" office:value="1.416">
            <text:p>1,416</text:p>
          </table:table-cell>
          <table:table-cell table:number-columns-repeated="1013"/>
        </table:table-row>
        <table:table-row table:style-name="ro2">
          <table:table-cell office:value-type="string">
            <text:p>WAT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355.13">
            <text:p>355,13</text:p>
          </table:table-cell>
          <table:table-cell office:value-type="float" office:value="45.23949">
            <text:p>45,23949</text:p>
          </table:table-cell>
          <table:table-cell office:value-type="float" office:value="0.34103">
            <text:p>0,34103</text:p>
          </table:table-cell>
          <table:table-cell office:value-type="percentage" office:value="0.32970002">
            <text:p>32,97%</text:p>
          </table:table-cell>
          <table:table-cell office:value-type="percentage" office:value="0.05212">
            <text:p>5,21%</text:p>
          </table:table-cell>
          <table:table-cell office:value-type="float" office:value="1.141">
            <text:p>1,141</text:p>
          </table:table-cell>
          <table:table-cell table:number-columns-repeated="1013"/>
        </table:table-row>
        <table:table-row table:style-name="ro2">
          <table:table-cell office:value-type="string">
            <text:p>WELL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IMPROVING</text:p>
          </table:table-cell>
          <table:table-cell office:value-type="float" office:value="214.63">
            <text:p>214,63</text:p>
          </table:table-cell>
          <table:table-cell office:value-type="float" office:value="104.18932">
            <text:p>104,18932</text:p>
          </table:table-cell>
          <table:table-cell office:value-type="float" office:value="0.44486">
            <text:p>0,44486</text:p>
          </table:table-cell>
          <table:table-cell office:value-type="percentage" office:value="0.254">
            <text:p>25,40%</text:p>
          </table:table-cell>
          <table:table-cell office:value-type="percentage" office:value="0.03665">
            <text:p>3,67%</text:p>
          </table:table-cell>
          <table:table-cell office:value-type="float" office:value="0.825">
            <text:p>0,825</text:p>
          </table:table-cell>
          <table:table-cell table:number-columns-repeated="1013"/>
        </table:table-row>
        <table:table-row table:style-name="ro2">
          <table:table-cell office:value-type="string">
            <text:p>WST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325.92">
            <text:p>325,92</text:p>
          </table:table-cell>
          <table:table-cell office:value-type="float" office:value="43.456">
            <text:p>43,456</text:p>
          </table:table-cell>
          <table:table-cell office:value-type="float" office:value="0.10734">
            <text:p>0,10734</text:p>
          </table:table-cell>
          <table:table-cell office:value-type="percentage" office:value="0.27007">
            <text:p>27,01%</text:p>
          </table:table-cell>
          <table:table-cell office:value-type="percentage" office:value="0.19131">
            <text:p>19,13%</text:p>
          </table:table-cell>
          <table:table-cell office:value-type="float" office:value="1.17">
            <text:p>1,17</text:p>
          </table:table-cell>
          <table:table-cell table:number-columns-repeated="1013"/>
        </table:table-row>
        <table:table-row table:style-name="ro2">
          <table:table-cell office:value-type="string">
            <text:p>WDC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6">
            <text:p>6</text:p>
          </table:table-cell>
          <table:table-cell table:style-name="ce2" office:value-type="string">
            <text:p>LEADING</text:p>
          </table:table-cell>
          <table:table-cell office:value-type="float" office:value="480">
            <text:p>480</text:p>
          </table:table-cell>
          <table:table-cell office:value-type="float" office:value="28.742514">
            <text:p>28,742514</text:p>
          </table:table-cell>
          <table:table-cell office:value-type="float" office:value="0.1781">
            <text:p>0,1781</text:p>
          </table:table-cell>
          <table:table-cell office:value-type="percentage" office:value="0.33353">
            <text:p>33,35%</text:p>
          </table:table-cell>
          <table:table-cell office:value-type="percentage" office:value="0.85920995">
            <text:p>85,92%</text:p>
          </table:table-cell>
          <table:table-cell office:value-type="float" office:value="2.158">
            <text:p>2,158</text:p>
          </table:table-cell>
          <table:table-cell table:number-columns-repeated="1013"/>
        </table:table-row>
        <table:table-row table:style-name="ro2">
          <table:table-cell office:value-type="string">
            <text:p>XYL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6">
            <text:p>6</text:p>
          </table:table-cell>
          <table:table-cell table:style-name="ce2" office:value-type="string">
            <text:p>LAGGING</text:p>
          </table:table-cell>
          <table:table-cell office:value-type="float" office:value="113.73">
            <text:p>113,73</text:p>
          </table:table-cell>
          <table:table-cell office:value-type="float" office:value="28.361595">
            <text:p>28,361595</text:p>
          </table:table-cell>
          <table:table-cell office:value-type="float" office:value="0.18354">
            <text:p>0,18354</text:p>
          </table:table-cell>
          <table:table-cell office:value-type="percentage" office:value="0.21032">
            <text:p>21,03%</text:p>
          </table:table-cell>
          <table:table-cell office:value-type="percentage" office:value="0.08724">
            <text:p>8,72%</text:p>
          </table:table-cell>
          <table:table-cell office:value-type="float" office:value="1.077">
            <text:p>1,077</text:p>
          </table:table-cell>
          <table:table-cell table:number-columns-repeated="1013"/>
        </table:table-row>
        <table:table-row table:style-name="ro2">
          <table:table-cell office:value-type="string">
            <text:p>ABT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84.32">
            <text:p>84,32</text:p>
          </table:table-cell>
          <table:table-cell office:value-type="float" office:value="23.619047">
            <text:p>23,619047</text:p>
          </table:table-cell>
          <table:table-cell office:value-type="float" office:value="0.64773">
            <text:p>0,64773</text:p>
          </table:table-cell>
          <table:table-cell office:value-type="percentage" office:value="0.2602">
            <text:p>26,02%</text:p>
          </table:table-cell>
          <table:table-cell office:value-type="percentage" office:value="0.123339996">
            <text:p>12,33%</text:p>
          </table:table-cell>
          <table:table-cell office:value-type="float" office:value="0.647">
            <text:p>0,647</text:p>
          </table:table-cell>
          <table:table-cell table:number-columns-repeated="1013"/>
        </table:table-row>
        <table:table-row table:style-name="ro2">
          <table:table-cell office:value-type="string">
            <text:p>ACN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180.42">
            <text:p>180,42</text:p>
          </table:table-cell>
          <table:table-cell office:value-type="float" office:value="14.788525">
            <text:p>14,788525</text:p>
          </table:table-cell>
          <table:table-cell office:value-type="float" office:value="0.25469">
            <text:p>0,25469</text:p>
          </table:table-cell>
          <table:table-cell office:value-type="percentage" office:value="0.17661">
            <text:p>17,66%</text:p>
          </table:table-cell>
          <table:table-cell office:value-type="percentage" office:value="0.24763">
            <text:p>24,76%</text:p>
          </table:table-cell>
          <table:table-cell office:value-type="float" office:value="1.071">
            <text:p>1,071</text:p>
          </table:table-cell>
          <table:table-cell table:number-columns-repeated="1013"/>
        </table:table-row>
        <table:table-row table:style-name="ro2">
          <table:table-cell office:value-type="string">
            <text:p>ADBE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253.04">
            <text:p>253,04</text:p>
          </table:table-cell>
          <table:table-cell office:value-type="float" office:value="14.74592">
            <text:p>14,74592</text:p>
          </table:table-cell>
          <table:table-cell office:value-type="float" office:value="0.5834">
            <text:p>0,5834</text:p>
          </table:table-cell>
          <table:table-cell office:value-type="percentage" office:value="0.38915002">
            <text:p>38,92%</text:p>
          </table:table-cell>
          <table:table-cell office:value-type="percentage" office:value="0.58774">
            <text:p>58,77%</text:p>
          </table:table-cell>
          <table:table-cell office:value-type="float" office:value="1.417">
            <text:p>1,417</text:p>
          </table:table-cell>
          <table:table-cell table:number-columns-repeated="1013"/>
        </table:table-row>
        <table:table-row table:style-name="ro2">
          <table:table-cell office:value-type="string">
            <text:p>A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15.62">
            <text:p>115,62</text:p>
          </table:table-cell>
          <table:table-cell office:value-type="float" office:value="25.523178">
            <text:p>25,523178</text:p>
          </table:table-cell>
          <table:table-cell office:value-type="float" office:value="0.5139">
            <text:p>0,5139</text:p>
          </table:table-cell>
          <table:table-cell office:value-type="percentage" office:value="0.27898002">
            <text:p>27,90%</text:p>
          </table:table-cell>
          <table:table-cell office:value-type="percentage" office:value="0.19945998">
            <text:p>19,95%</text:p>
          </table:table-cell>
          <table:table-cell office:value-type="float" office:value="1.219">
            <text:p>1,219</text:p>
          </table:table-cell>
          <table:table-cell table:number-columns-repeated="1013"/>
        </table:table-row>
        <table:table-row table:style-name="ro2">
          <table:table-cell office:value-type="string">
            <text:p>AMZN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272.68">
            <text:p>272,68</text:p>
          </table:table-cell>
          <table:table-cell office:value-type="float" office:value="32.578255">
            <text:p>32,578255</text:p>
          </table:table-cell>
          <table:table-cell office:value-type="float" office:value="0.533">
            <text:p>0,533</text:p>
          </table:table-cell>
          <table:table-cell office:value-type="percentage" office:value="0.20984">
            <text:p>20,98%</text:p>
          </table:table-cell>
          <table:table-cell office:value-type="percentage" office:value="0.24285">
            <text:p>24,29%</text:p>
          </table:table-cell>
          <table:table-cell office:value-type="float" office:value="1.468">
            <text:p>1,468</text:p>
          </table:table-cell>
          <table:table-cell table:number-columns-repeated="1013"/>
        </table:table-row>
        <table:table-row table:style-name="ro2">
          <table:table-cell office:value-type="string">
            <text:p>APA</text:p>
          </table:table-cell>
          <table:table-cell office:value-type="string">
            <text:p>Ener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35.56">
            <text:p>35,56</text:p>
          </table:table-cell>
          <table:table-cell office:value-type="float" office:value="8.289044">
            <text:p>8,289044</text:p>
          </table:table-cell>
          <table:table-cell office:value-type="float" office:value="0.61314">
            <text:p>0,61314</text:p>
          </table:table-cell>
          <table:table-cell office:value-type="percentage" office:value="0.62251">
            <text:p>62,25%</text:p>
          </table:table-cell>
          <table:table-cell office:value-type="percentage" office:value="0.26217">
            <text:p>26,22%</text:p>
          </table:table-cell>
          <table:table-cell office:value-type="float" office:value="0.374">
            <text:p>0,374</text:p>
          </table:table-cell>
          <table:table-cell table:number-columns-repeated="1013"/>
        </table:table-row>
        <table:table-row table:style-name="ro2">
          <table:table-cell office:value-type="string">
            <text:p>AAPL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293.32">
            <text:p>293,32</text:p>
          </table:table-cell>
          <table:table-cell office:value-type="float" office:value="35.467957">
            <text:p>35,467957</text:p>
          </table:table-cell>
          <table:table-cell office:value-type="float" office:value="0.79548">
            <text:p>0,79548</text:p>
          </table:table-cell>
          <table:table-cell office:value-type="percentage" office:value="0.35437">
            <text:p>35,44%</text:p>
          </table:table-cell>
          <table:table-cell office:value-type="percentage" office:value="1.4147099">
            <text:p>141,47%</text:p>
          </table:table-cell>
          <table:table-cell office:value-type="float" office:value="1.065">
            <text:p>1,065</text:p>
          </table:table-cell>
          <table:table-cell table:number-columns-repeated="1013"/>
        </table:table-row>
        <table:table-row table:style-name="ro2">
          <table:table-cell office:value-type="string">
            <text:p>AJG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98.87">
            <text:p>198,87</text:p>
          </table:table-cell>
          <table:table-cell office:value-type="float" office:value="32.17961">
            <text:p>32,17961</text:p>
          </table:table-cell>
          <table:table-cell office:value-type="float" office:value="0.5618">
            <text:p>0,5618</text:p>
          </table:table-cell>
          <table:table-cell office:value-type="percentage" office:value="0.27891">
            <text:p>27,89%</text:p>
          </table:table-cell>
          <table:table-cell office:value-type="percentage" office:value="0.07007">
            <text:p>7,01%</text:p>
          </table:table-cell>
          <table:table-cell office:value-type="float" office:value="0.545">
            <text:p>0,545</text:p>
          </table:table-cell>
          <table:table-cell table:number-columns-repeated="1013"/>
        </table:table-row>
        <table:table-row table:style-name="ro2">
          <table:table-cell office:value-type="string">
            <text:p>ATO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80.87">
            <text:p>180,87</text:p>
          </table:table-cell>
          <table:table-cell office:value-type="float" office:value="22.27463">
            <text:p>22,27463</text:p>
          </table:table-cell>
          <table:table-cell office:value-type="float" office:value="0.64588">
            <text:p>0,64588</text:p>
          </table:table-cell>
          <table:table-cell office:value-type="percentage" office:value="0.52042">
            <text:p>52,04%</text:p>
          </table:table-cell>
          <table:table-cell office:value-type="percentage" office:value="0.096">
            <text:p>9,60%</text:p>
          </table:table-cell>
          <table:table-cell office:value-type="float" office:value="0.648">
            <text:p>0,648</text:p>
          </table:table-cell>
          <table:table-cell table:number-columns-repeated="1013"/>
        </table:table-row>
        <table:table-row table:style-name="ro2">
          <table:table-cell office:value-type="string">
            <text:p>ADSK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44.5">
            <text:p>244,5</text:p>
          </table:table-cell>
          <table:table-cell office:value-type="float" office:value="46.749523">
            <text:p>46,749523</text:p>
          </table:table-cell>
          <table:table-cell office:value-type="float" office:value="0.89787">
            <text:p>0,89787</text:p>
          </table:table-cell>
          <table:table-cell office:value-type="percentage" office:value="0.26450002">
            <text:p>26,45%</text:p>
          </table:table-cell>
          <table:table-cell office:value-type="percentage" office:value="0.39675">
            <text:p>39,68%</text:p>
          </table:table-cell>
          <table:table-cell office:value-type="float" office:value="1.322">
            <text:p>1,322</text:p>
          </table:table-cell>
          <table:table-cell table:number-columns-repeated="1013"/>
        </table:table-row>
        <table:table-row table:style-name="ro2">
          <table:table-cell office:value-type="string">
            <text:p>ADP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212.995">
            <text:p>212,995</text:p>
          </table:table-cell>
          <table:table-cell office:value-type="float" office:value="19.887487">
            <text:p>19,887487</text:p>
          </table:table-cell>
          <table:table-cell office:value-type="float" office:value="0.69259">
            <text:p>0,69259</text:p>
          </table:table-cell>
          <table:table-cell office:value-type="percentage" office:value="0.29351">
            <text:p>29,35%</text:p>
          </table:table-cell>
          <table:table-cell office:value-type="percentage" office:value="0.71208">
            <text:p>71,21%</text:p>
          </table:table-cell>
          <table:table-cell office:value-type="float" office:value="0.841">
            <text:p>0,841</text:p>
          </table:table-cell>
          <table:table-cell table:number-columns-repeated="1013"/>
        </table:table-row>
        <table:table-row table:style-name="ro2">
          <table:table-cell office:value-type="string">
            <text:p>AVB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184.08">
            <text:p>184,08</text:p>
          </table:table-cell>
          <table:table-cell office:value-type="float" office:value="22.838709">
            <text:p>22,838709</text:p>
          </table:table-cell>
          <table:table-cell office:value-type="float" office:value="0.81307">
            <text:p>0,81307</text:p>
          </table:table-cell>
          <table:table-cell office:value-type="percentage" office:value="0.60330003">
            <text:p>60,33%</text:p>
          </table:table-cell>
          <table:table-cell office:value-type="percentage" office:value="0.09719">
            <text:p>9,72%</text:p>
          </table:table-cell>
          <table:table-cell office:value-type="float" office:value="0.798">
            <text:p>0,798</text:p>
          </table:table-cell>
          <table:table-cell table:number-columns-repeated="1013"/>
        </table:table-row>
        <table:table-row table:style-name="ro2">
          <table:table-cell office:value-type="string">
            <text:p>AVGO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430">
            <text:p>430</text:p>
          </table:table-cell>
          <table:table-cell office:value-type="float" office:value="83.984375">
            <text:p>83,984375</text:p>
          </table:table-cell>
          <table:table-cell office:value-type="float" office:value="0.82704">
            <text:p>0,82704</text:p>
          </table:table-cell>
          <table:table-cell office:value-type="percentage" office:value="0.54506">
            <text:p>54,51%</text:p>
          </table:table-cell>
          <table:table-cell office:value-type="percentage" office:value="0.33370999">
            <text:p>33,37%</text:p>
          </table:table-cell>
          <table:table-cell office:value-type="float" office:value="1.44">
            <text:p>1,44</text:p>
          </table:table-cell>
          <table:table-cell table:number-columns-repeated="1013"/>
        </table:table-row>
        <table:table-row table:style-name="ro2">
          <table:table-cell office:value-type="string">
            <text:p>BRO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56.45">
            <text:p>56,45</text:p>
          </table:table-cell>
          <table:table-cell office:value-type="float" office:value="18.387623">
            <text:p>18,387623</text:p>
          </table:table-cell>
          <table:table-cell office:value-type="float" office:value="0.6437">
            <text:p>0,6437</text:p>
          </table:table-cell>
          <table:table-cell office:value-type="percentage" office:value="0.39725">
            <text:p>39,73%</text:p>
          </table:table-cell>
          <table:table-cell office:value-type="percentage" office:value="0.11926">
            <text:p>11,93%</text:p>
          </table:table-cell>
          <table:table-cell office:value-type="float" office:value="0.657">
            <text:p>0,657</text:p>
          </table:table-cell>
          <table:table-cell table:number-columns-repeated="1013"/>
        </table:table-row>
        <table:table-row table:style-name="ro2">
          <table:table-cell office:value-type="string">
            <text:p>BF-B</text:p>
          </table:table-cell>
          <table:table-cell office:value-type="string">
            <text:p>Consumer Defensiv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7.68">
            <text:p>27,68</text:p>
          </table:table-cell>
          <table:table-cell office:value-type="float" office:value="16.093023">
            <text:p>16,093023</text:p>
          </table:table-cell>
          <table:table-cell office:value-type="float" office:value="0.67246">
            <text:p>0,67246</text:p>
          </table:table-cell>
          <table:table-cell office:value-type="percentage" office:value="0.30921">
            <text:p>30,92%</text:p>
          </table:table-cell>
          <table:table-cell office:value-type="percentage" office:value="0.20417">
            <text:p>20,42%</text:p>
          </table:table-cell>
          <table:table-cell office:value-type="float" office:value="0.346">
            <text:p>0,346</text:p>
          </table:table-cell>
          <table:table-cell table:number-columns-repeated="1013"/>
        </table:table-row>
        <table:table-row table:style-name="ro2">
          <table:table-cell office:value-type="string">
            <text:p>CHD</text:p>
          </table:table-cell>
          <table:table-cell office:value-type="string">
            <text:p>Consumer Defensiv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93.44">
            <text:p>93,44</text:p>
          </table:table-cell>
          <table:table-cell office:value-type="float" office:value="30.736843">
            <text:p>30,736843</text:p>
          </table:table-cell>
          <table:table-cell office:value-type="float" office:value="0.56794">
            <text:p>0,56794</text:p>
          </table:table-cell>
          <table:table-cell office:value-type="percentage" office:value="0.22368">
            <text:p>22,37%</text:p>
          </table:table-cell>
          <table:table-cell office:value-type="percentage" office:value="0.16779">
            <text:p>16,78%</text:p>
          </table:table-cell>
          <table:table-cell office:value-type="float" office:value="0.482">
            <text:p>0,482</text:p>
          </table:table-cell>
          <table:table-cell table:number-columns-repeated="1013"/>
        </table:table-row>
        <table:table-row table:style-name="ro2">
          <table:table-cell office:value-type="string">
            <text:p>CTAS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66.97">
            <text:p>166,97</text:p>
          </table:table-cell>
          <table:table-cell office:value-type="float" office:value="35.22574">
            <text:p>35,22574</text:p>
          </table:table-cell>
          <table:table-cell office:value-type="float" office:value="0.60943">
            <text:p>0,60943</text:p>
          </table:table-cell>
          <table:table-cell office:value-type="percentage" office:value="0.26327">
            <text:p>26,33%</text:p>
          </table:table-cell>
          <table:table-cell office:value-type="percentage" office:value="0.41303003">
            <text:p>41,30%</text:p>
          </table:table-cell>
          <table:table-cell office:value-type="float" office:value="0.962">
            <text:p>0,962</text:p>
          </table:table-cell>
          <table:table-cell table:number-columns-repeated="1013"/>
        </table:table-row>
        <table:table-row table:style-name="ro2">
          <table:table-cell office:value-type="string">
            <text:p>CSCO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96.57">
            <text:p>96,57</text:p>
          </table:table-cell>
          <table:table-cell office:value-type="float" office:value="34.73741">
            <text:p>34,73741</text:p>
          </table:table-cell>
          <table:table-cell office:value-type="float" office:value="0.66509">
            <text:p>0,66509</text:p>
          </table:table-cell>
          <table:table-cell office:value-type="percentage" office:value="0.27587">
            <text:p>27,59%</text:p>
          </table:table-cell>
          <table:table-cell office:value-type="percentage" office:value="0.23754999">
            <text:p>23,75%</text:p>
          </table:table-cell>
          <table:table-cell office:value-type="float" office:value="0.912">
            <text:p>0,912</text:p>
          </table:table-cell>
          <table:table-cell table:number-columns-repeated="1013"/>
        </table:table-row>
        <table:table-row table:style-name="ro2">
          <table:table-cell office:value-type="string">
            <text:p>FIX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1952.37">
            <text:p>1952,37</text:p>
          </table:table-cell>
          <table:table-cell office:value-type="float" office:value="56.492184">
            <text:p>56,492184</text:p>
          </table:table-cell>
          <table:table-cell office:value-type="float" office:value="0.45489">
            <text:p>0,45489</text:p>
          </table:table-cell>
          <table:table-cell office:value-type="percentage" office:value="0.1713">
            <text:p>17,13%</text:p>
          </table:table-cell>
          <table:table-cell office:value-type="percentage" office:value="0.53294">
            <text:p>53,29%</text:p>
          </table:table-cell>
          <table:table-cell office:value-type="float" office:value="1.705">
            <text:p>1,705</text:p>
          </table:table-cell>
          <table:table-cell table:number-columns-repeated="1013"/>
        </table:table-row>
        <table:table-row table:style-name="ro2">
          <table:table-cell office:value-type="string">
            <text:p>CEG</text:p>
          </table:table-cell>
          <table:table-cell office:value-type="string">
            <text:p>Utiliti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303.63">
            <text:p>303,63</text:p>
          </table:table-cell>
          <table:table-cell office:value-type="float" office:value="40.97571">
            <text:p>40,97571</text:p>
          </table:table-cell>
          <table:table-cell office:value-type="float" office:value="0.6394">
            <text:p>0,6394</text:p>
          </table:table-cell>
          <table:table-cell office:value-type="percentage" office:value="0.22058001">
            <text:p>22,06%</text:p>
          </table:table-cell>
          <table:table-cell office:value-type="percentage" office:value="0.16364">
            <text:p>16,36%</text:p>
          </table:table-cell>
          <table:table-cell office:value-type="float" office:value="1.155">
            <text:p>1,155</text:p>
          </table:table-cell>
          <table:table-cell table:number-columns-repeated="1013"/>
        </table:table-row>
        <table:table-row table:style-name="ro2">
          <table:table-cell office:value-type="string">
            <text:p>CPRT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33.94">
            <text:p>33,94</text:p>
          </table:table-cell>
          <table:table-cell office:value-type="float" office:value="21.345911">
            <text:p>21,345911</text:p>
          </table:table-cell>
          <table:table-cell office:value-type="float" office:value="0.98">
            <text:p>0,98</text:p>
          </table:table-cell>
          <table:table-cell office:value-type="percentage" office:value="0.42136002">
            <text:p>42,14%</text:p>
          </table:table-cell>
          <table:table-cell office:value-type="percentage" office:value="0.17129">
            <text:p>17,13%</text:p>
          </table:table-cell>
          <table:table-cell office:value-type="float" office:value="1.02">
            <text:p>1,02</text:p>
          </table:table-cell>
          <table:table-cell table:number-columns-repeated="1013"/>
        </table:table-row>
        <table:table-row table:style-name="ro2">
          <table:table-cell office:value-type="string">
            <text:p>GLW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186.94">
            <text:p>186,94</text:p>
          </table:table-cell>
          <table:table-cell office:value-type="float" office:value="89.87501">
            <text:p>89,87501</text:p>
          </table:table-cell>
          <table:table-cell office:value-type="float" office:value="0.80363">
            <text:p>0,80363</text:p>
          </table:table-cell>
          <table:table-cell office:value-type="percentage" office:value="0.23938">
            <text:p>23,94%</text:p>
          </table:table-cell>
          <table:table-cell office:value-type="percentage" office:value="0.1674">
            <text:p>16,74%</text:p>
          </table:table-cell>
          <table:table-cell office:value-type="float" office:value="1.136">
            <text:p>1,136</text:p>
          </table:table-cell>
          <table:table-cell table:number-columns-repeated="1013"/>
        </table:table-row>
        <table:table-row table:style-name="ro2">
          <table:table-cell office:value-type="string">
            <text:p>DVN</text:p>
          </table:table-cell>
          <table:table-cell office:value-type="string">
            <text:p>Ener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45.61">
            <text:p>45,61</text:p>
          </table:table-cell>
          <table:table-cell office:value-type="float" office:value="12.704736">
            <text:p>12,704736</text:p>
          </table:table-cell>
          <table:table-cell office:value-type="float" office:value="0.56404">
            <text:p>0,56404</text:p>
          </table:table-cell>
          <table:table-cell office:value-type="percentage" office:value="0.42005002">
            <text:p>42,01%</text:p>
          </table:table-cell>
          <table:table-cell office:value-type="percentage" office:value="0.15178001">
            <text:p>15,18%</text:p>
          </table:table-cell>
          <table:table-cell office:value-type="float" office:value="0.478">
            <text:p>0,478</text:p>
          </table:table-cell>
          <table:table-cell table:number-columns-repeated="1013"/>
        </table:table-row>
        <table:table-row table:style-name="ro2">
          <table:table-cell office:value-type="string">
            <text:p>DLR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95.31">
            <text:p>195,31</text:p>
          </table:table-cell>
          <table:table-cell office:value-type="float" office:value="51.806366">
            <text:p>51,806366</text:p>
          </table:table-cell>
          <table:table-cell office:value-type="float" office:value="0.76592">
            <text:p>0,76592</text:p>
          </table:table-cell>
          <table:table-cell office:value-type="percentage" office:value="0.4575">
            <text:p>45,75%</text:p>
          </table:table-cell>
          <table:table-cell office:value-type="percentage" office:value="0.05688">
            <text:p>5,69%</text:p>
          </table:table-cell>
          <table:table-cell office:value-type="float" office:value="1.08">
            <text:p>1,08</text:p>
          </table:table-cell>
          <table:table-cell table:number-columns-repeated="1013"/>
        </table:table-row>
        <table:table-row table:style-name="ro2">
          <table:table-cell office:value-type="string">
            <text:p>DHI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47.63">
            <text:p>147,63</text:p>
          </table:table-cell>
          <table:table-cell office:value-type="float" office:value="13.875">
            <text:p>13,875</text:p>
          </table:table-cell>
          <table:table-cell office:value-type="float" office:value="0.27453">
            <text:p>0,27453</text:p>
          </table:table-cell>
          <table:table-cell office:value-type="percentage" office:value="0.128">
            <text:p>12,80%</text:p>
          </table:table-cell>
          <table:table-cell office:value-type="percentage" office:value="0.13084">
            <text:p>13,08%</text:p>
          </table:table-cell>
          <table:table-cell office:value-type="float" office:value="1.414">
            <text:p>1,414</text:p>
          </table:table-cell>
          <table:table-cell table:number-columns-repeated="1013"/>
        </table:table-row>
        <table:table-row table:style-name="ro2">
          <table:table-cell office:value-type="string">
            <text:p>ECL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54.22">
            <text:p>254,22</text:p>
          </table:table-cell>
          <table:table-cell office:value-type="float" office:value="34.354053">
            <text:p>34,354053</text:p>
          </table:table-cell>
          <table:table-cell office:value-type="float" office:value="0.92369">
            <text:p>0,92369</text:p>
          </table:table-cell>
          <table:table-cell office:value-type="percentage" office:value="0.24561001">
            <text:p>24,56%</text:p>
          </table:table-cell>
          <table:table-cell office:value-type="percentage" office:value="0.22427">
            <text:p>22,43%</text:p>
          </table:table-cell>
          <table:table-cell office:value-type="float" office:value="0.929">
            <text:p>0,929</text:p>
          </table:table-cell>
          <table:table-cell table:number-columns-repeated="1013"/>
        </table:table-row>
        <table:table-row table:style-name="ro2">
          <table:table-cell office:value-type="string">
            <text:p>EA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00.44">
            <text:p>200,44</text:p>
          </table:table-cell>
          <table:table-cell office:value-type="float" office:value="57.105415">
            <text:p>57,105415</text:p>
          </table:table-cell>
          <table:table-cell office:value-type="float" office:value="0.21954">
            <text:p>0,21954</text:p>
          </table:table-cell>
          <table:table-cell office:value-type="percentage" office:value="0.19718">
            <text:p>19,72%</text:p>
          </table:table-cell>
          <table:table-cell office:value-type="percentage" office:value="0.1349">
            <text:p>13,49%</text:p>
          </table:table-cell>
          <table:table-cell office:value-type="float" office:value="0.656">
            <text:p>0,656</text:p>
          </table:table-cell>
          <table:table-cell table:number-columns-repeated="1013"/>
        </table:table-row>
        <table:table-row table:style-name="ro2">
          <table:table-cell office:value-type="string">
            <text:p>EMR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41.31">
            <text:p>141,31</text:p>
          </table:table-cell>
          <table:table-cell office:value-type="float" office:value="32.710648">
            <text:p>32,710648</text:p>
          </table:table-cell>
          <table:table-cell office:value-type="float" office:value="0.69182">
            <text:p>0,69182</text:p>
          </table:table-cell>
          <table:table-cell office:value-type="percentage" office:value="0.32076">
            <text:p>32,08%</text:p>
          </table:table-cell>
          <table:table-cell office:value-type="percentage" office:value="0.12328">
            <text:p>12,33%</text:p>
          </table:table-cell>
          <table:table-cell office:value-type="float" office:value="1.255">
            <text:p>1,255</text:p>
          </table:table-cell>
          <table:table-cell table:number-columns-repeated="1013"/>
        </table:table-row>
        <table:table-row table:style-name="ro2">
          <table:table-cell office:value-type="string">
            <text:p>EQR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65.54">
            <text:p>65,54</text:p>
          </table:table-cell>
          <table:table-cell office:value-type="float" office:value="26.216">
            <text:p>26,216</text:p>
          </table:table-cell>
          <table:table-cell office:value-type="float" office:value="0.7842">
            <text:p>0,7842</text:p>
          </table:table-cell>
          <table:table-cell office:value-type="percentage" office:value="0.60787">
            <text:p>60,79%</text:p>
          </table:table-cell>
          <table:table-cell office:value-type="percentage" office:value="0.08671">
            <text:p>8,67%</text:p>
          </table:table-cell>
          <table:table-cell office:value-type="float" office:value="0.771">
            <text:p>0,771</text:p>
          </table:table-cell>
          <table:table-cell table:number-columns-repeated="1013"/>
        </table:table-row>
        <table:table-row table:style-name="ro2">
          <table:table-cell office:value-type="string">
            <text:p>EXR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43.3">
            <text:p>143,3</text:p>
          </table:table-cell>
          <table:table-cell office:value-type="float" office:value="32.130047">
            <text:p>32,130047</text:p>
          </table:table-cell>
          <table:table-cell office:value-type="float" office:value="0.98092">
            <text:p>0,98092</text:p>
          </table:table-cell>
          <table:table-cell office:value-type="percentage" office:value="0.65685">
            <text:p>65,69%</text:p>
          </table:table-cell>
          <table:table-cell office:value-type="percentage" office:value="0.0683">
            <text:p>6,83%</text:p>
          </table:table-cell>
          <table:table-cell office:value-type="float" office:value="1.228">
            <text:p>1,228</text:p>
          </table:table-cell>
          <table:table-cell table:number-columns-repeated="1013"/>
        </table:table-row>
        <table:table-row table:style-name="ro2">
          <table:table-cell office:value-type="string">
            <text:p>FDS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23.61">
            <text:p>223,61</text:p>
          </table:table-cell>
          <table:table-cell office:value-type="float" office:value="14.3893175">
            <text:p>14,3893175</text:p>
          </table:table-cell>
          <table:table-cell office:value-type="float" office:value="0.72972">
            <text:p>0,72972</text:p>
          </table:table-cell>
          <table:table-cell office:value-type="percentage" office:value="0.37905997">
            <text:p>37,91%</text:p>
          </table:table-cell>
          <table:table-cell office:value-type="percentage" office:value="0.28084">
            <text:p>28,08%</text:p>
          </table:table-cell>
          <table:table-cell office:value-type="float" office:value="0.69">
            <text:p>0,69</text:p>
          </table:table-cell>
          <table:table-cell table:number-columns-repeated="1013"/>
        </table:table-row>
        <table:table-row table:style-name="ro2">
          <table:table-cell office:value-type="string">
            <text:p>FTNT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114.07">
            <text:p>114,07</text:p>
          </table:table-cell>
          <table:table-cell office:value-type="float" office:value="44.21318">
            <text:p>44,21318</text:p>
          </table:table-cell>
          <table:table-cell office:value-type="float" office:value="0.5731">
            <text:p>0,5731</text:p>
          </table:table-cell>
          <table:table-cell office:value-type="percentage" office:value="0.33215">
            <text:p>33,22%</text:p>
          </table:table-cell>
          <table:table-cell office:value-type="percentage" office:value="1.32392">
            <text:p>132,39%</text:p>
          </table:table-cell>
          <table:table-cell office:value-type="float" office:value="0.919">
            <text:p>0,919</text:p>
          </table:table-cell>
          <table:table-cell table:number-columns-repeated="1013"/>
        </table:table-row>
        <table:table-row table:style-name="ro2">
          <table:table-cell office:value-type="string">
            <text:p>FTV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60.43">
            <text:p>60,43</text:p>
          </table:table-cell>
          <table:table-cell office:value-type="float" office:value="35.54706">
            <text:p>35,54706</text:p>
          </table:table-cell>
          <table:table-cell office:value-type="float" office:value="0.58806">
            <text:p>0,58806</text:p>
          </table:table-cell>
          <table:table-cell office:value-type="percentage" office:value="0.28101">
            <text:p>28,10%</text:p>
          </table:table-cell>
          <table:table-cell office:value-type="percentage" office:value="0.06814">
            <text:p>6,81%</text:p>
          </table:table-cell>
          <table:table-cell office:value-type="float" office:value="1.005">
            <text:p>1,005</text:p>
          </table:table-cell>
          <table:table-cell table:number-columns-repeated="1013"/>
        </table:table-row>
        <table:table-row table:style-name="ro2">
          <table:table-cell office:value-type="string">
            <text:p>FOXA</text:p>
          </table:table-cell>
          <table:table-cell office:value-type="string">
            <text:p>Communication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62.94">
            <text:p>62,94</text:p>
          </table:table-cell>
          <table:table-cell office:value-type="float" office:value="15.093525">
            <text:p>15,093525</text:p>
          </table:table-cell>
          <table:table-cell office:value-type="float" office:value="0.67389">
            <text:p>0,67389</text:p>
          </table:table-cell>
          <table:table-cell office:value-type="percentage" office:value="0.21311001">
            <text:p>21,31%</text:p>
          </table:table-cell>
          <table:table-cell office:value-type="percentage" office:value="0.16823">
            <text:p>16,82%</text:p>
          </table:table-cell>
          <table:table-cell office:value-type="float" office:value="0.526">
            <text:p>0,526</text:p>
          </table:table-cell>
          <table:table-cell table:number-columns-repeated="1013"/>
        </table:table-row>
        <table:table-row table:style-name="ro2">
          <table:table-cell office:value-type="string">
            <text:p>FOX</text:p>
          </table:table-cell>
          <table:table-cell office:value-type="string">
            <text:p>Communication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56.6">
            <text:p>56,6</text:p>
          </table:table-cell>
          <table:table-cell office:value-type="float" office:value="13.573141">
            <text:p>13,573141</text:p>
          </table:table-cell>
          <table:table-cell office:value-type="float" office:value="0.67389">
            <text:p>0,67389</text:p>
          </table:table-cell>
          <table:table-cell office:value-type="percentage" office:value="0.21311001">
            <text:p>21,31%</text:p>
          </table:table-cell>
          <table:table-cell office:value-type="percentage" office:value="0.16823">
            <text:p>16,82%</text:p>
          </table:table-cell>
          <table:table-cell office:value-type="float" office:value="0.526">
            <text:p>0,526</text:p>
          </table:table-cell>
          <table:table-cell table:number-columns-repeated="1013"/>
        </table:table-row>
        <table:table-row table:style-name="ro2">
          <table:table-cell office:value-type="string">
            <text:p>BEN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31.05">
            <text:p>31,05</text:p>
          </table:table-cell>
          <table:table-cell office:value-type="float" office:value="23.70229">
            <text:p>23,70229</text:p>
          </table:table-cell>
          <table:table-cell office:value-type="float" office:value="0.23471">
            <text:p>0,23471</text:p>
          </table:table-cell>
          <table:table-cell office:value-type="percentage" office:value="0.19789">
            <text:p>19,79%</text:p>
          </table:table-cell>
          <table:table-cell office:value-type="percentage" office:value="0.06704">
            <text:p>6,70%</text:p>
          </table:table-cell>
          <table:table-cell office:value-type="float" office:value="1.591">
            <text:p>1,591</text:p>
          </table:table-cell>
          <table:table-cell table:number-columns-repeated="1013"/>
        </table:table-row>
        <table:table-row table:style-name="ro2">
          <table:table-cell office:value-type="string">
            <text:p>GD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346.53">
            <text:p>346,53</text:p>
          </table:table-cell>
          <table:table-cell office:value-type="float" office:value="21.780642">
            <text:p>21,780642</text:p>
          </table:table-cell>
          <table:table-cell office:value-type="float" office:value="0.37701">
            <text:p>0,37701</text:p>
          </table:table-cell>
          <table:table-cell office:value-type="percentage" office:value="0.12056">
            <text:p>12,06%</text:p>
          </table:table-cell>
          <table:table-cell office:value-type="percentage" office:value="0.17974001">
            <text:p>17,97%</text:p>
          </table:table-cell>
          <table:table-cell office:value-type="float" office:value="0.345">
            <text:p>0,345</text:p>
          </table:table-cell>
          <table:table-cell table:number-columns-repeated="1013"/>
        </table:table-row>
        <table:table-row table:style-name="ro2">
          <table:table-cell office:value-type="string">
            <text:p>GILD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131.33">
            <text:p>131,33</text:p>
          </table:table-cell>
          <table:table-cell office:value-type="float" office:value="17.868029">
            <text:p>17,868029</text:p>
          </table:table-cell>
          <table:table-cell office:value-type="float" office:value="0.94635">
            <text:p>0,94635</text:p>
          </table:table-cell>
          <table:table-cell office:value-type="percentage" office:value="0.49563">
            <text:p>49,56%</text:p>
          </table:table-cell>
          <table:table-cell office:value-type="percentage" office:value="0.4336">
            <text:p>43,36%</text:p>
          </table:table-cell>
          <table:table-cell office:value-type="float" office:value="0.332">
            <text:p>0,332</text:p>
          </table:table-cell>
          <table:table-cell table:number-columns-repeated="1013"/>
        </table:table-row>
        <table:table-row table:style-name="ro2">
          <table:table-cell office:value-type="string">
            <text:p>GL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51.08">
            <text:p>151,08</text:p>
          </table:table-cell>
          <table:table-cell office:value-type="float" office:value="10.4626045">
            <text:p>10,4626045</text:p>
          </table:table-cell>
          <table:table-cell office:value-type="float" office:value="0.53588">
            <text:p>0,53588</text:p>
          </table:table-cell>
          <table:table-cell office:value-type="percentage" office:value="0.26972">
            <text:p>26,97%</text:p>
          </table:table-cell>
          <table:table-cell office:value-type="percentage" office:value="0.20455">
            <text:p>20,46%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HIG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32.02">
            <text:p>132,02</text:p>
          </table:table-cell>
          <table:table-cell office:value-type="float" office:value="9.290641">
            <text:p>9,290641</text:p>
          </table:table-cell>
          <table:table-cell office:value-type="float" office:value="0.23151">
            <text:p>0,23151</text:p>
          </table:table-cell>
          <table:table-cell office:value-type="percentage" office:value="0.19176">
            <text:p>19,18%</text:p>
          </table:table-cell>
          <table:table-cell office:value-type="percentage" office:value="0.22735001">
            <text:p>22,74%</text:p>
          </table:table-cell>
          <table:table-cell office:value-type="float" office:value="0.504">
            <text:p>0,504</text:p>
          </table:table-cell>
          <table:table-cell table:number-columns-repeated="1013"/>
        </table:table-row>
        <table:table-row table:style-name="ro2">
          <table:table-cell office:value-type="string">
            <text:p>HST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22.27">
            <text:p>22,27</text:p>
          </table:table-cell>
          <table:table-cell office:value-type="float" office:value="15.14966">
            <text:p>15,14966</text:p>
          </table:table-cell>
          <table:table-cell office:value-type="float" office:value="0.80482">
            <text:p>0,80482</text:p>
          </table:table-cell>
          <table:table-cell office:value-type="percentage" office:value="0.2702">
            <text:p>27,02%</text:p>
          </table:table-cell>
          <table:table-cell office:value-type="percentage" office:value="0.1487">
            <text:p>14,87%</text:p>
          </table:table-cell>
          <table:table-cell office:value-type="float" office:value="1.116">
            <text:p>1,116</text:p>
          </table:table-cell>
          <table:table-cell table:number-columns-repeated="1013"/>
        </table:table-row>
        <table:table-row table:style-name="ro2">
          <table:table-cell office:value-type="string">
            <text:p>HWM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270.56">
            <text:p>270,56</text:p>
          </table:table-cell>
          <table:table-cell office:value-type="float" office:value="62.920925">
            <text:p>62,920925</text:p>
          </table:table-cell>
          <table:table-cell office:value-type="float" office:value="0.87794">
            <text:p>0,87794</text:p>
          </table:table-cell>
          <table:table-cell office:value-type="percentage" office:value="0.29700002">
            <text:p>29,70%</text:p>
          </table:table-cell>
          <table:table-cell office:value-type="percentage" office:value="0.33818">
            <text:p>33,82%</text:p>
          </table:table-cell>
          <table:table-cell office:value-type="float" office:value="1.191">
            <text:p>1,191</text:p>
          </table:table-cell>
          <table:table-cell table:number-columns-repeated="1013"/>
        </table:table-row>
        <table:table-row table:style-name="ro2">
          <table:table-cell office:value-type="string">
            <text:p>HUBB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492.58">
            <text:p>492,58</text:p>
          </table:table-cell>
          <table:table-cell office:value-type="float" office:value="29.146746">
            <text:p>29,146746</text:p>
          </table:table-cell>
          <table:table-cell office:value-type="float" office:value="0.72468">
            <text:p>0,72468</text:p>
          </table:table-cell>
          <table:table-cell office:value-type="percentage" office:value="0.24461001">
            <text:p>24,46%</text:p>
          </table:table-cell>
          <table:table-cell office:value-type="percentage" office:value="0.25822002">
            <text:p>25,82%</text:p>
          </table:table-cell>
          <table:table-cell office:value-type="float" office:value="0.949">
            <text:p>0,949</text:p>
          </table:table-cell>
          <table:table-cell table:number-columns-repeated="1013"/>
        </table:table-row>
        <table:table-row table:style-name="ro2">
          <table:table-cell office:value-type="string">
            <text:p>IDXX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560.11">
            <text:p>560,11</text:p>
          </table:table-cell>
          <table:table-cell office:value-type="float" office:value="41.154297">
            <text:p>41,154297</text:p>
          </table:table-cell>
          <table:table-cell office:value-type="float" office:value="0.7104">
            <text:p>0,7104</text:p>
          </table:table-cell>
          <table:table-cell office:value-type="percentage" office:value="0.3477">
            <text:p>34,77%</text:p>
          </table:table-cell>
          <table:table-cell office:value-type="percentage" office:value="0.72915">
            <text:p>72,92%</text:p>
          </table:table-cell>
          <table:table-cell office:value-type="float" office:value="1.574">
            <text:p>1,574</text:p>
          </table:table-cell>
          <table:table-cell table:number-columns-repeated="1013"/>
        </table:table-row>
        <table:table-row table:style-name="ro2">
          <table:table-cell office:value-type="string">
            <text:p>INCY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98.56">
            <text:p>98,56</text:p>
          </table:table-cell>
          <table:table-cell office:value-type="float" office:value="13.920904">
            <text:p>13,920904</text:p>
          </table:table-cell>
          <table:table-cell office:value-type="float" office:value="0.701">
            <text:p>0,701</text:p>
          </table:table-cell>
          <table:table-cell office:value-type="percentage" office:value="0.28893">
            <text:p>28,89%</text:p>
          </table:table-cell>
          <table:table-cell office:value-type="percentage" office:value="0.30823">
            <text:p>30,82%</text:p>
          </table:table-cell>
          <table:table-cell office:value-type="float" office:value="0.797">
            <text:p>0,797</text:p>
          </table:table-cell>
          <table:table-cell table:number-columns-repeated="1013"/>
        </table:table-row>
        <table:table-row table:style-name="ro2">
          <table:table-cell office:value-type="string">
            <text:p>PODD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54.16">
            <text:p>154,16</text:p>
          </table:table-cell>
          <table:table-cell office:value-type="float" office:value="36.018692">
            <text:p>36,018692</text:p>
          </table:table-cell>
          <table:table-cell office:value-type="float" office:value="0.77844">
            <text:p>0,77844</text:p>
          </table:table-cell>
          <table:table-cell office:value-type="percentage" office:value="0.20753">
            <text:p>20,75%</text:p>
          </table:table-cell>
          <table:table-cell office:value-type="percentage" office:value="0.22997999">
            <text:p>23,00%</text:p>
          </table:table-cell>
          <table:table-cell office:value-type="float" office:value="1.197">
            <text:p>1,197</text:p>
          </table:table-cell>
          <table:table-cell table:number-columns-repeated="1013"/>
        </table:table-row>
        <table:table-row table:style-name="ro2">
          <table:table-cell office:value-type="string">
            <text:p>ICE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55.82">
            <text:p>155,82</text:p>
          </table:table-cell>
          <table:table-cell office:value-type="float" office:value="22.681225">
            <text:p>22,681225</text:p>
          </table:table-cell>
          <table:table-cell office:value-type="float" office:value="0.70986">
            <text:p>0,70986</text:p>
          </table:table-cell>
          <table:table-cell office:value-type="percentage" office:value="0.63479">
            <text:p>63,48%</text:p>
          </table:table-cell>
          <table:table-cell office:value-type="percentage" office:value="0.13853">
            <text:p>13,85%</text:p>
          </table:table-cell>
          <table:table-cell office:value-type="float" office:value="0.964">
            <text:p>0,964</text:p>
          </table:table-cell>
          <table:table-cell table:number-columns-repeated="1013"/>
        </table:table-row>
        <table:table-row table:style-name="ro2">
          <table:table-cell office:value-type="string">
            <text:p>INVH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28.73">
            <text:p>28,73</text:p>
          </table:table-cell>
          <table:table-cell office:value-type="float" office:value="30.242105">
            <text:p>30,242105</text:p>
          </table:table-cell>
          <table:table-cell office:value-type="float" office:value="0.97038">
            <text:p>0,97038</text:p>
          </table:table-cell>
          <table:table-cell office:value-type="percentage" office:value="0.53698003">
            <text:p>53,70%</text:p>
          </table:table-cell>
          <table:table-cell office:value-type="percentage" office:value="0.061929997">
            <text:p>6,19%</text:p>
          </table:table-cell>
          <table:table-cell office:value-type="float" office:value="0.859">
            <text:p>0,859</text:p>
          </table:table-cell>
          <table:table-cell table:number-columns-repeated="1013"/>
        </table:table-row>
        <table:table-row table:style-name="ro2">
          <table:table-cell office:value-type="string">
            <text:p>JNJ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21.32">
            <text:p>221,32</text:p>
          </table:table-cell>
          <table:table-cell office:value-type="float" office:value="25.645424">
            <text:p>25,645424</text:p>
          </table:table-cell>
          <table:table-cell office:value-type="float" office:value="0.6773">
            <text:p>0,6773</text:p>
          </table:table-cell>
          <table:table-cell office:value-type="percentage" office:value="0.35621">
            <text:p>35,62%</text:p>
          </table:table-cell>
          <table:table-cell office:value-type="percentage" office:value="0.26416">
            <text:p>26,42%</text:p>
          </table:table-cell>
          <table:table-cell office:value-type="float" office:value="0.263">
            <text:p>0,263</text:p>
          </table:table-cell>
          <table:table-cell table:number-columns-repeated="1013"/>
        </table:table-row>
        <table:table-row table:style-name="ro2">
          <table:table-cell office:value-type="string">
            <text:p>KVUE</text:p>
          </table:table-cell>
          <table:table-cell office:value-type="string">
            <text:p>Consumer Defensiv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7.59">
            <text:p>17,59</text:p>
          </table:table-cell>
          <table:table-cell office:value-type="float" office:value="20.940477">
            <text:p>20,940477</text:p>
          </table:table-cell>
          <table:table-cell office:value-type="float" office:value="0.82975">
            <text:p>0,82975</text:p>
          </table:table-cell>
          <table:table-cell office:value-type="percentage" office:value="0.22692">
            <text:p>22,69%</text:p>
          </table:table-cell>
          <table:table-cell office:value-type="percentage" office:value="0.15701">
            <text:p>15,70%</text:p>
          </table:table-cell>
          <table:table-cell office:value-type="float" office:value="0.521">
            <text:p>0,521</text:p>
          </table:table-cell>
          <table:table-cell table:number-columns-repeated="1013"/>
        </table:table-row>
        <table:table-row table:style-name="ro2">
          <table:table-cell office:value-type="string">
            <text:p>KDP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8.83">
            <text:p>28,83</text:p>
          </table:table-cell>
          <table:table-cell office:value-type="float" office:value="21.355555">
            <text:p>21,355555</text:p>
          </table:table-cell>
          <table:table-cell office:value-type="float" office:value="0.85985">
            <text:p>0,85985</text:p>
          </table:table-cell>
          <table:table-cell office:value-type="percentage" office:value="0.26216">
            <text:p>26,22%</text:p>
          </table:table-cell>
          <table:table-cell office:value-type="percentage" office:value="0.06312">
            <text:p>6,31%</text:p>
          </table:table-cell>
          <table:table-cell office:value-type="float" office:value="0.416">
            <text:p>0,416</text:p>
          </table:table-cell>
          <table:table-cell table:number-columns-repeated="1013"/>
        </table:table-row>
        <table:table-row table:style-name="ro2">
          <table:table-cell office:value-type="string">
            <text:p>KIM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3.48">
            <text:p>23,48</text:p>
          </table:table-cell>
          <table:table-cell office:value-type="float" office:value="26.988504">
            <text:p>26,988504</text:p>
          </table:table-cell>
          <table:table-cell office:value-type="float" office:value="0.78788">
            <text:p>0,78788</text:p>
          </table:table-cell>
          <table:table-cell office:value-type="percentage" office:value="0.60686">
            <text:p>60,69%</text:p>
          </table:table-cell>
          <table:table-cell office:value-type="percentage" office:value="0.058579996">
            <text:p>5,86%</text:p>
          </table:table-cell>
          <table:table-cell office:value-type="float" office:value="0.986">
            <text:p>0,986</text:p>
          </table:table-cell>
          <table:table-cell table:number-columns-repeated="1013"/>
        </table:table-row>
        <table:table-row table:style-name="ro2">
          <table:table-cell office:value-type="string">
            <text:p>KMI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31.41">
            <text:p>31,41</text:p>
          </table:table-cell>
          <table:table-cell office:value-type="float" office:value="21.080536">
            <text:p>21,080536</text:p>
          </table:table-cell>
          <table:table-cell office:value-type="float" office:value="0.9884">
            <text:p>0,9884</text:p>
          </table:table-cell>
          <table:table-cell office:value-type="percentage" office:value="0.42439">
            <text:p>42,44%</text:p>
          </table:table-cell>
          <table:table-cell office:value-type="percentage" office:value="0.10597">
            <text:p>10,60%</text:p>
          </table:table-cell>
          <table:table-cell office:value-type="float" office:value="0.564">
            <text:p>0,564</text:p>
          </table:table-cell>
          <table:table-cell table:number-columns-repeated="1013"/>
        </table:table-row>
        <table:table-row table:style-name="ro2">
          <table:table-cell office:value-type="string">
            <text:p>LIN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493.16">
            <text:p>493,16</text:p>
          </table:table-cell>
          <table:table-cell office:value-type="float" office:value="32.681244">
            <text:p>32,681244</text:p>
          </table:table-cell>
          <table:table-cell office:value-type="float" office:value="0.65642">
            <text:p>0,65642</text:p>
          </table:table-cell>
          <table:table-cell office:value-type="percentage" office:value="0.39215">
            <text:p>39,22%</text:p>
          </table:table-cell>
          <table:table-cell office:value-type="percentage" office:value="0.18229">
            <text:p>18,23%</text:p>
          </table:table-cell>
          <table:table-cell office:value-type="float" office:value="0.74">
            <text:p>0,74</text:p>
          </table:table-cell>
          <table:table-cell table:number-columns-repeated="1013"/>
        </table:table-row>
        <table:table-row table:style-name="ro2">
          <table:table-cell office:value-type="string">
            <text:p>L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04.5">
            <text:p>104,5</text:p>
          </table:table-cell>
          <table:table-cell office:value-type="float" office:value="13.295165">
            <text:p>13,295165</text:p>
          </table:table-cell>
          <table:table-cell office:value-type="float" office:value="0.45603">
            <text:p>0,45603</text:p>
          </table:table-cell>
          <table:table-cell office:value-type="percentage" office:value="0.17186001">
            <text:p>17,19%</text:p>
          </table:table-cell>
          <table:table-cell office:value-type="percentage" office:value="0.09217">
            <text:p>9,22%</text:p>
          </table:table-cell>
          <table:table-cell office:value-type="float" office:value="0.564">
            <text:p>0,564</text:p>
          </table:table-cell>
          <table:table-cell table:number-columns-repeated="1013"/>
        </table:table-row>
        <table:table-row table:style-name="ro2">
          <table:table-cell office:value-type="string">
            <text:p>MLM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590.38">
            <text:p>590,38</text:p>
          </table:table-cell>
          <table:table-cell office:value-type="float" office:value="37.037643">
            <text:p>37,037643</text:p>
          </table:table-cell>
          <table:table-cell office:value-type="float" office:value="0.5035">
            <text:p>0,5035</text:p>
          </table:table-cell>
          <table:table-cell office:value-type="percentage" office:value="0.33228">
            <text:p>33,23%</text:p>
          </table:table-cell>
          <table:table-cell office:value-type="percentage" office:value="0.0947">
            <text:p>9,47%</text:p>
          </table:table-cell>
          <table:table-cell office:value-type="float" office:value="1.136">
            <text:p>1,136</text:p>
          </table:table-cell>
          <table:table-cell table:number-columns-repeated="1013"/>
        </table:table-row>
        <table:table-row table:style-name="ro2">
          <table:table-cell office:value-type="string">
            <text:p>MDT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76.15">
            <text:p>76,15</text:p>
          </table:table-cell>
          <table:table-cell office:value-type="float" office:value="21.27095">
            <text:p>21,27095</text:p>
          </table:table-cell>
          <table:table-cell office:value-type="float" office:value="0.5706">
            <text:p>0,5706</text:p>
          </table:table-cell>
          <table:table-cell office:value-type="percentage" office:value="0.26604">
            <text:p>26,60%</text:p>
          </table:table-cell>
          <table:table-cell office:value-type="percentage" office:value="0.0939">
            <text:p>9,39%</text:p>
          </table:table-cell>
          <table:table-cell office:value-type="float" office:value="0.632">
            <text:p>0,632</text:p>
          </table:table-cell>
          <table:table-cell table:number-columns-repeated="1013"/>
        </table:table-row>
        <table:table-row table:style-name="ro2">
          <table:table-cell office:value-type="string">
            <text:p>MAA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129.31">
            <text:p>129,31</text:p>
          </table:table-cell>
          <table:table-cell office:value-type="float" office:value="39.18485">
            <text:p>39,18485</text:p>
          </table:table-cell>
          <table:table-cell office:value-type="float" office:value="0.99825">
            <text:p>0,99825</text:p>
          </table:table-cell>
          <table:table-cell office:value-type="percentage" office:value="0.56001997">
            <text:p>56,00%</text:p>
          </table:table-cell>
          <table:table-cell office:value-type="percentage" office:value="0.06711">
            <text:p>6,71%</text:p>
          </table:table-cell>
          <table:table-cell office:value-type="float" office:value="0.757">
            <text:p>0,757</text:p>
          </table:table-cell>
          <table:table-cell table:number-columns-repeated="1013"/>
        </table:table-row>
        <table:table-row table:style-name="ro2">
          <table:table-cell office:value-type="string">
            <text:p>MPWR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1600.84">
            <text:p>1600,84</text:p>
          </table:table-cell>
          <table:table-cell office:value-type="float" office:value="114.92031">
            <text:p>114,92031</text:p>
          </table:table-cell>
          <table:table-cell office:value-type="float" office:value="0.543">
            <text:p>0,543</text:p>
          </table:table-cell>
          <table:table-cell office:value-type="percentage" office:value="0.28988">
            <text:p>28,99%</text:p>
          </table:table-cell>
          <table:table-cell office:value-type="percentage" office:value="0.19574">
            <text:p>19,57%</text:p>
          </table:table-cell>
          <table:table-cell office:value-type="float" office:value="1.742">
            <text:p>1,742</text:p>
          </table:table-cell>
          <table:table-cell table:number-columns-repeated="1013"/>
        </table:table-row>
        <table:table-row table:style-name="ro2">
          <table:table-cell office:value-type="string">
            <text:p>NDAQ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88.91">
            <text:p>88,91</text:p>
          </table:table-cell>
          <table:table-cell office:value-type="float" office:value="26.780123">
            <text:p>26,780123</text:p>
          </table:table-cell>
          <table:table-cell office:value-type="float" office:value="0.79058">
            <text:p>0,79058</text:p>
          </table:table-cell>
          <table:table-cell office:value-type="percentage" office:value="0.59347">
            <text:p>59,35%</text:p>
          </table:table-cell>
          <table:table-cell office:value-type="percentage" office:value="0.162">
            <text:p>16,20%</text:p>
          </table:table-cell>
          <table:table-cell office:value-type="float" office:value="0.99">
            <text:p>0,99</text:p>
          </table:table-cell>
          <table:table-cell table:number-columns-repeated="1013"/>
        </table:table-row>
        <table:table-row table:style-name="ro2">
          <table:table-cell office:value-type="string">
            <text:p>NFLX</text:p>
          </table:table-cell>
          <table:table-cell office:value-type="string">
            <text:p>Communication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87.49">
            <text:p>87,49</text:p>
          </table:table-cell>
          <table:table-cell office:value-type="float" office:value="28.22258">
            <text:p>28,22258</text:p>
          </table:table-cell>
          <table:table-cell office:value-type="float" office:value="0.53788">
            <text:p>0,53788</text:p>
          </table:table-cell>
          <table:table-cell office:value-type="percentage" office:value="0.30472">
            <text:p>30,47%</text:p>
          </table:table-cell>
          <table:table-cell office:value-type="percentage" office:value="0.48494998">
            <text:p>48,49%</text:p>
          </table:table-cell>
          <table:table-cell office:value-type="float" office:value="1.548">
            <text:p>1,548</text:p>
          </table:table-cell>
          <table:table-cell table:number-columns-repeated="1013"/>
        </table:table-row>
        <table:table-row table:style-name="ro2">
          <table:table-cell office:value-type="string">
            <text:p>NWSA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27.02">
            <text:p>27,02</text:p>
          </table:table-cell>
          <table:table-cell office:value-type="float" office:value="34.20253">
            <text:p>34,20253</text:p>
          </table:table-cell>
          <table:table-cell office:value-type="float" office:value="0.30622">
            <text:p>0,30622</text:p>
          </table:table-cell>
          <table:table-cell office:value-type="percentage" office:value="0.14148">
            <text:p>14,15%</text:p>
          </table:table-cell>
          <table:table-cell office:value-type="percentage" office:value="0.06524">
            <text:p>6,52%</text:p>
          </table:table-cell>
          <table:table-cell office:value-type="float" office:value="0.902">
            <text:p>0,902</text:p>
          </table:table-cell>
          <table:table-cell table:number-columns-repeated="1013"/>
        </table:table-row>
        <table:table-row table:style-name="ro2">
          <table:table-cell office:value-type="string">
            <text:p>NWS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31.31">
            <text:p>31,31</text:p>
          </table:table-cell>
          <table:table-cell office:value-type="float" office:value="39.632908">
            <text:p>39,632908</text:p>
          </table:table-cell>
          <table:table-cell office:value-type="float" office:value="0.30622">
            <text:p>0,30622</text:p>
          </table:table-cell>
          <table:table-cell office:value-type="percentage" office:value="0.14148">
            <text:p>14,15%</text:p>
          </table:table-cell>
          <table:table-cell office:value-type="percentage" office:value="0.06524">
            <text:p>6,52%</text:p>
          </table:table-cell>
          <table:table-cell office:value-type="float" office:value="0.902">
            <text:p>0,902</text:p>
          </table:table-cell>
          <table:table-cell table:number-columns-repeated="1013"/>
        </table:table-row>
        <table:table-row table:style-name="ro2">
          <table:table-cell office:value-type="string">
            <text:p>NDSN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83.53">
            <text:p>283,53</text:p>
          </table:table-cell>
          <table:table-cell office:value-type="float" office:value="30.685066">
            <text:p>30,685066</text:p>
          </table:table-cell>
          <table:table-cell office:value-type="float" office:value="0.66986">
            <text:p>0,66986</text:p>
          </table:table-cell>
          <table:table-cell office:value-type="percentage" office:value="0.31941">
            <text:p>31,94%</text:p>
          </table:table-cell>
          <table:table-cell office:value-type="percentage" office:value="0.17473">
            <text:p>17,47%</text:p>
          </table:table-cell>
          <table:table-cell office:value-type="float" office:value="0.993">
            <text:p>0,993</text:p>
          </table:table-cell>
          <table:table-cell table:number-columns-repeated="1013"/>
        </table:table-row>
        <table:table-row table:style-name="ro2">
          <table:table-cell office:value-type="string">
            <text:p>NVR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5974.07">
            <text:p>5974,07</text:p>
          </table:table-cell>
          <table:table-cell office:value-type="float" office:value="14.598675">
            <text:p>14,598675</text:p>
          </table:table-cell>
          <table:table-cell office:value-type="float" office:value="0.3122">
            <text:p>0,3122</text:p>
          </table:table-cell>
          <table:table-cell office:value-type="percentage" office:value="0.16781999">
            <text:p>16,78%</text:p>
          </table:table-cell>
          <table:table-cell office:value-type="percentage" office:value="0.33257">
            <text:p>33,26%</text:p>
          </table:table-cell>
          <table:table-cell office:value-type="float" office:value="0.952">
            <text:p>0,952</text:p>
          </table:table-cell>
          <table:table-cell table:number-columns-repeated="1013"/>
        </table:table-row>
        <table:table-row table:style-name="ro2">
          <table:table-cell office:value-type="string">
            <text:p>ODFL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98.33">
            <text:p>198,33</text:p>
          </table:table-cell>
          <table:table-cell office:value-type="float" office:value="41.31875">
            <text:p>41,31875</text:p>
          </table:table-cell>
          <table:table-cell office:value-type="float" office:value="0.909">
            <text:p>0,909</text:p>
          </table:table-cell>
          <table:table-cell office:value-type="percentage" office:value="0.31307">
            <text:p>31,31%</text:p>
          </table:table-cell>
          <table:table-cell office:value-type="percentage" office:value="0.23331">
            <text:p>23,33%</text:p>
          </table:table-cell>
          <table:table-cell office:value-type="float" office:value="1.172">
            <text:p>1,172</text:p>
          </table:table-cell>
          <table:table-cell table:number-columns-repeated="1013"/>
        </table:table-row>
        <table:table-row table:style-name="ro2">
          <table:table-cell office:value-type="string">
            <text:p>PKG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224.59">
            <text:p>224,59</text:p>
          </table:table-cell>
          <table:table-cell office:value-type="float" office:value="27.322384">
            <text:p>27,322384</text:p>
          </table:table-cell>
          <table:table-cell office:value-type="float" office:value="0.95185">
            <text:p>0,95185</text:p>
          </table:table-cell>
          <table:table-cell office:value-type="percentage" office:value="0.21303">
            <text:p>21,30%</text:p>
          </table:table-cell>
          <table:table-cell office:value-type="percentage" office:value="0.16313">
            <text:p>16,31%</text:p>
          </table:table-cell>
          <table:table-cell office:value-type="float" office:value="0.83">
            <text:p>0,83</text:p>
          </table:table-cell>
          <table:table-cell table:number-columns-repeated="1013"/>
        </table:table-row>
        <table:table-row table:style-name="ro2">
          <table:table-cell office:value-type="string">
            <text:p>PH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878.83">
            <text:p>878,83</text:p>
          </table:table-cell>
          <table:table-cell office:value-type="float" office:value="32.46509">
            <text:p>32,46509</text:p>
          </table:table-cell>
          <table:table-cell office:value-type="float" office:value="0.65554">
            <text:p>0,65554</text:p>
          </table:table-cell>
          <table:table-cell office:value-type="percentage" office:value="0.26107">
            <text:p>26,11%</text:p>
          </table:table-cell>
          <table:table-cell office:value-type="percentage" office:value="0.24841999">
            <text:p>24,84%</text:p>
          </table:table-cell>
          <table:table-cell office:value-type="float" office:value="1.182">
            <text:p>1,182</text:p>
          </table:table-cell>
          <table:table-cell table:number-columns-repeated="1013"/>
        </table:table-row>
        <table:table-row table:style-name="ro2">
          <table:table-cell office:value-type="string">
            <text:p>PNR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76.82">
            <text:p>76,82</text:p>
          </table:table-cell>
          <table:table-cell office:value-type="float" office:value="19.301508">
            <text:p>19,301508</text:p>
          </table:table-cell>
          <table:table-cell office:value-type="float" office:value="0.54634">
            <text:p>0,54634</text:p>
          </table:table-cell>
          <table:table-cell office:value-type="percentage" office:value="0.26188">
            <text:p>26,19%</text:p>
          </table:table-cell>
          <table:table-cell office:value-type="percentage" office:value="0.1761">
            <text:p>17,61%</text:p>
          </table:table-cell>
          <table:table-cell office:value-type="float" office:value="1.097">
            <text:p>1,097</text:p>
          </table:table-cell>
          <table:table-cell table:number-columns-repeated="1013"/>
        </table:table-row>
        <table:table-row table:style-name="ro2">
          <table:table-cell office:value-type="string">
            <text:p>PFE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5.68">
            <text:p>25,68</text:p>
          </table:table-cell>
          <table:table-cell office:value-type="float" office:value="19.603054">
            <text:p>19,603054</text:p>
          </table:table-cell>
          <table:table-cell office:value-type="float" office:value="0.71602">
            <text:p>0,71602</text:p>
          </table:table-cell>
          <table:table-cell office:value-type="percentage" office:value="0.40212002">
            <text:p>40,21%</text:p>
          </table:table-cell>
          <table:table-cell office:value-type="percentage" office:value="0.083100006">
            <text:p>8,31%</text:p>
          </table:table-cell>
          <table:table-cell office:value-type="float" office:value="0.305">
            <text:p>0,305</text:p>
          </table:table-cell>
          <table:table-cell table:number-columns-repeated="1013"/>
        </table:table-row>
        <table:table-row table:style-name="ro2">
          <table:table-cell office:value-type="string">
            <text:p>PFG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100.5">
            <text:p>100,5</text:p>
          </table:table-cell>
          <table:table-cell office:value-type="float" office:value="14.418939">
            <text:p>14,418939</text:p>
          </table:table-cell>
          <table:table-cell office:value-type="float" office:value="0.33624">
            <text:p>0,33624</text:p>
          </table:table-cell>
          <table:table-cell office:value-type="percentage" office:value="0.14148">
            <text:p>14,15%</text:p>
          </table:table-cell>
          <table:table-cell office:value-type="percentage" office:value="0.13385999">
            <text:p>13,39%</text:p>
          </table:table-cell>
          <table:table-cell office:value-type="float" office:value="0.897">
            <text:p>0,897</text:p>
          </table:table-cell>
          <table:table-cell table:number-columns-repeated="1013"/>
        </table:table-row>
        <table:table-row table:style-name="ro2">
          <table:table-cell office:value-type="string">
            <text:p>PG</text:p>
          </table:table-cell>
          <table:table-cell office:value-type="string">
            <text:p>Consumer Defensiv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46.42">
            <text:p>146,42</text:p>
          </table:table-cell>
          <table:table-cell office:value-type="float" office:value="21.406431">
            <text:p>21,406431</text:p>
          </table:table-cell>
          <table:table-cell office:value-type="float" office:value="0.67651">
            <text:p>0,67651</text:p>
          </table:table-cell>
          <table:table-cell office:value-type="percentage" office:value="0.28878">
            <text:p>28,88%</text:p>
          </table:table-cell>
          <table:table-cell office:value-type="percentage" office:value="0.31112">
            <text:p>31,11%</text:p>
          </table:table-cell>
          <table:table-cell office:value-type="float" office:value="0.398">
            <text:p>0,398</text:p>
          </table:table-cell>
          <table:table-cell table:number-columns-repeated="1013"/>
        </table:table-row>
        <table:table-row table:style-name="ro2">
          <table:table-cell office:value-type="string">
            <text:p>PGR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94">
            <text:p>194</text:p>
          </table:table-cell>
          <table:table-cell office:value-type="float" office:value="9.872774">
            <text:p>9,872774</text:p>
          </table:table-cell>
          <table:table-cell office:value-type="float" office:value="0.26174">
            <text:p>0,26174</text:p>
          </table:table-cell>
          <table:table-cell office:value-type="percentage" office:value="0.16941999">
            <text:p>16,94%</text:p>
          </table:table-cell>
          <table:table-cell office:value-type="percentage" office:value="0.37903">
            <text:p>37,90%</text:p>
          </table:table-cell>
          <table:table-cell office:value-type="float" office:value="0.295">
            <text:p>0,295</text:p>
          </table:table-cell>
          <table:table-cell table:number-columns-repeated="1013"/>
        </table:table-row>
        <table:table-row table:style-name="ro2">
          <table:table-cell office:value-type="string">
            <text:p>PLD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44.09">
            <text:p>144,09</text:p>
          </table:table-cell>
          <table:table-cell office:value-type="float" office:value="36.203518">
            <text:p>36,203518</text:p>
          </table:table-cell>
          <table:table-cell office:value-type="float" office:value="0.60934">
            <text:p>0,60934</text:p>
          </table:table-cell>
          <table:table-cell office:value-type="percentage" office:value="0.69971">
            <text:p>69,97%</text:p>
          </table:table-cell>
          <table:table-cell office:value-type="percentage" office:value="0.06844">
            <text:p>6,84%</text:p>
          </table:table-cell>
          <table:table-cell office:value-type="float" office:value="1.35">
            <text:p>1,35</text:p>
          </table:table-cell>
          <table:table-cell table:number-columns-repeated="1013"/>
        </table:table-row>
        <table:table-row table:style-name="ro2">
          <table:table-cell office:value-type="string">
            <text:p>PHM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17.55">
            <text:p>117,55</text:p>
          </table:table-cell>
          <table:table-cell office:value-type="float" office:value="11.368472">
            <text:p>11,368472</text:p>
          </table:table-cell>
          <table:table-cell office:value-type="float" office:value="0.18942">
            <text:p>0,18942</text:p>
          </table:table-cell>
          <table:table-cell office:value-type="percentage" office:value="0.17492001">
            <text:p>17,49%</text:p>
          </table:table-cell>
          <table:table-cell office:value-type="percentage" office:value="0.16178">
            <text:p>16,18%</text:p>
          </table:table-cell>
          <table:table-cell office:value-type="float" office:value="1.242">
            <text:p>1,242</text:p>
          </table:table-cell>
          <table:table-cell table:number-columns-repeated="1013"/>
        </table:table-row>
        <table:table-row table:style-name="ro2">
          <table:table-cell office:value-type="string">
            <text:p>QCOM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EADING</text:p>
          </table:table-cell>
          <table:table-cell office:value-type="float" office:value="219.09">
            <text:p>219,09</text:p>
          </table:table-cell>
          <table:table-cell office:value-type="float" office:value="23.583424">
            <text:p>23,583424</text:p>
          </table:table-cell>
          <table:table-cell office:value-type="float" office:value="0.55979">
            <text:p>0,55979</text:p>
          </table:table-cell>
          <table:table-cell office:value-type="percentage" office:value="0.2922">
            <text:p>29,22%</text:p>
          </table:table-cell>
          <table:table-cell office:value-type="percentage" office:value="0.36083">
            <text:p>36,08%</text:p>
          </table:table-cell>
          <table:table-cell office:value-type="float" office:value="1.493">
            <text:p>1,493</text:p>
          </table:table-cell>
          <table:table-cell table:number-columns-repeated="1013"/>
        </table:table-row>
        <table:table-row table:style-name="ro2">
          <table:table-cell office:value-type="string">
            <text:p>Q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147.33">
            <text:p>147,33</text:p>
          </table:table-cell>
          <table:table-cell office:value-type="float" office:value="44.645454">
            <text:p>44,645454</text:p>
          </table:table-cell>
          <table:table-cell office:value-type="float" office:value="0.61431">
            <text:p>0,61431</text:p>
          </table:table-cell>
          <table:table-cell office:value-type="percentage" office:value="0.29386">
            <text:p>29,39%</text:p>
          </table:table-cell>
          <table:table-cell office:value-type="percentage" office:value="0.079840004">
            <text:p>7,98%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61.92">
            <text:p>61,92</text:p>
          </table:table-cell>
          <table:table-cell office:value-type="float" office:value="50.754097">
            <text:p>50,754097</text:p>
          </table:table-cell>
          <table:table-cell office:value-type="float" office:value="0.73467">
            <text:p>0,73467</text:p>
          </table:table-cell>
          <table:table-cell office:value-type="percentage" office:value="0.88232005">
            <text:p>88,23%</text:p>
          </table:table-cell>
          <table:table-cell office:value-type="percentage" office:value="0.02831">
            <text:p>2,83%</text:p>
          </table:table-cell>
          <table:table-cell office:value-type="float" office:value="0.757">
            <text:p>0,757</text:p>
          </table:table-cell>
          <table:table-cell table:number-columns-repeated="1013"/>
        </table:table-row>
        <table:table-row table:style-name="ro2">
          <table:table-cell office:value-type="string">
            <text:p>REG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77.59">
            <text:p>77,59</text:p>
          </table:table-cell>
          <table:table-cell office:value-type="float" office:value="26.663229">
            <text:p>26,663229</text:p>
          </table:table-cell>
          <table:table-cell office:value-type="float" office:value="0.73218">
            <text:p>0,73218</text:p>
          </table:table-cell>
          <table:table-cell office:value-type="percentage" office:value="0.63662">
            <text:p>63,66%</text:p>
          </table:table-cell>
          <table:table-cell office:value-type="percentage" office:value="0.08003">
            <text:p>8,00%</text:p>
          </table:table-cell>
          <table:table-cell office:value-type="float" office:value="0.845">
            <text:p>0,845</text:p>
          </table:table-cell>
          <table:table-cell table:number-columns-repeated="1013"/>
        </table:table-row>
        <table:table-row table:style-name="ro2">
          <table:table-cell office:value-type="string">
            <text:p>ROL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53.83">
            <text:p>53,83</text:p>
          </table:table-cell>
          <table:table-cell office:value-type="float" office:value="49.385323">
            <text:p>49,385323</text:p>
          </table:table-cell>
          <table:table-cell office:value-type="float" office:value="0.77235">
            <text:p>0,77235</text:p>
          </table:table-cell>
          <table:table-cell office:value-type="percentage" office:value="0.2237">
            <text:p>22,37%</text:p>
          </table:table-cell>
          <table:table-cell office:value-type="percentage" office:value="0.38671002">
            <text:p>38,67%</text:p>
          </table:table-cell>
          <table:table-cell office:value-type="float" office:value="0.792">
            <text:p>0,792</text:p>
          </table:table-cell>
          <table:table-cell table:number-columns-repeated="1013"/>
        </table:table-row>
        <table:table-row table:style-name="ro2">
          <table:table-cell office:value-type="string">
            <text:p>ROP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343.32">
            <text:p>343,32</text:p>
          </table:table-cell>
          <table:table-cell office:value-type="float" office:value="21.4575">
            <text:p>21,4575</text:p>
          </table:table-cell>
          <table:table-cell office:value-type="float" office:value="0.55606">
            <text:p>0,55606</text:p>
          </table:table-cell>
          <table:table-cell office:value-type="percentage" office:value="0.39368">
            <text:p>39,37%</text:p>
          </table:table-cell>
          <table:table-cell office:value-type="percentage" office:value="0.09012">
            <text:p>9,01%</text:p>
          </table:table-cell>
          <table:table-cell office:value-type="float" office:value="0.803">
            <text:p>0,803</text:p>
          </table:table-cell>
          <table:table-cell table:number-columns-repeated="1013"/>
        </table:table-row>
        <table:table-row table:style-name="ro2">
          <table:table-cell office:value-type="string">
            <text:p>SRE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91.53">
            <text:p>91,53</text:p>
          </table:table-cell>
          <table:table-cell office:value-type="float" office:value="31.132652">
            <text:p>31,132652</text:p>
          </table:table-cell>
          <table:table-cell office:value-type="float" office:value="0.85267">
            <text:p>0,85267</text:p>
          </table:table-cell>
          <table:table-cell office:value-type="percentage" office:value="0.41452998">
            <text:p>41,45%</text:p>
          </table:table-cell>
          <table:table-cell office:value-type="percentage" office:value="0.05689">
            <text:p>5,69%</text:p>
          </table:table-cell>
          <table:table-cell office:value-type="float" office:value="0.604">
            <text:p>0,604</text:p>
          </table:table-cell>
          <table:table-cell table:number-columns-repeated="1013"/>
        </table:table-row>
        <table:table-row table:style-name="ro2">
          <table:table-cell office:value-type="string">
            <text:p>SYK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85.47">
            <text:p>285,47</text:p>
          </table:table-cell>
          <table:table-cell office:value-type="float" office:value="33.002316">
            <text:p>33,002316</text:p>
          </table:table-cell>
          <table:table-cell office:value-type="float" office:value="0.619">
            <text:p>0,619</text:p>
          </table:table-cell>
          <table:table-cell office:value-type="percentage" office:value="0.27376">
            <text:p>27,38%</text:p>
          </table:table-cell>
          <table:table-cell office:value-type="percentage" office:value="0.152">
            <text:p>15,20%</text:p>
          </table:table-cell>
          <table:table-cell office:value-type="float" office:value="0.81">
            <text:p>0,81</text:p>
          </table:table-cell>
          <table:table-cell table:number-columns-repeated="1013"/>
        </table:table-row>
        <table:table-row table:style-name="ro2">
          <table:table-cell office:value-type="string">
            <text:p>TXN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287.8">
            <text:p>287,8</text:p>
          </table:table-cell>
          <table:table-cell office:value-type="float" office:value="49.28082">
            <text:p>49,28082</text:p>
          </table:table-cell>
          <table:table-cell office:value-type="float" office:value="0.83741">
            <text:p>0,83741</text:p>
          </table:table-cell>
          <table:table-cell office:value-type="percentage" office:value="0.46995">
            <text:p>47,00%</text:p>
          </table:table-cell>
          <table:table-cell office:value-type="percentage" office:value="0.32347">
            <text:p>32,35%</text:p>
          </table:table-cell>
          <table:table-cell office:value-type="float" office:value="1.298">
            <text:p>1,298</text:p>
          </table:table-cell>
          <table:table-cell table:number-columns-repeated="1013"/>
        </table:table-row>
        <table:table-row table:style-name="ro2">
          <table:table-cell office:value-type="string">
            <text:p>TMO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465">
            <text:p>465</text:p>
          </table:table-cell>
          <table:table-cell office:value-type="float" office:value="25.577557">
            <text:p>25,577557</text:p>
          </table:table-cell>
          <table:table-cell office:value-type="float" office:value="0.82903">
            <text:p>0,82903</text:p>
          </table:table-cell>
          <table:table-cell office:value-type="percentage" office:value="0.24993">
            <text:p>24,99%</text:p>
          </table:table-cell>
          <table:table-cell office:value-type="percentage" office:value="0.13523">
            <text:p>13,52%</text:p>
          </table:table-cell>
          <table:table-cell office:value-type="float" office:value="0.883">
            <text:p>0,883</text:p>
          </table:table-cell>
          <table:table-cell table:number-columns-repeated="1013"/>
        </table:table-row>
        <table:table-row table:style-name="ro2">
          <table:table-cell office:value-type="string">
            <text:p>UBER</text:p>
          </table:table-cell>
          <table:table-cell office:value-type="string">
            <text:p>Technology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75.45">
            <text:p>75,45</text:p>
          </table:table-cell>
          <table:table-cell office:value-type="float" office:value="18.722082">
            <text:p>18,722082</text:p>
          </table:table-cell>
          <table:table-cell office:value-type="float" office:value="0.48113">
            <text:p>0,48113</text:p>
          </table:table-cell>
          <table:table-cell office:value-type="percentage" office:value="0.13076">
            <text:p>13,08%</text:p>
          </table:table-cell>
          <table:table-cell office:value-type="percentage" office:value="0.3531">
            <text:p>35,31%</text:p>
          </table:table-cell>
          <table:table-cell office:value-type="float" office:value="1.158">
            <text:p>1,158</text:p>
          </table:table-cell>
          <table:table-cell table:number-columns-repeated="1013"/>
        </table:table-row>
        <table:table-row table:style-name="ro2">
          <table:table-cell office:value-type="string">
            <text:p>VLTO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86.84">
            <text:p>86,84</text:p>
          </table:table-cell>
          <table:table-cell office:value-type="float" office:value="22.381441">
            <text:p>22,381441</text:p>
          </table:table-cell>
          <table:table-cell office:value-type="float" office:value="0.95542">
            <text:p>0,95542</text:p>
          </table:table-cell>
          <table:table-cell office:value-type="percentage" office:value="0.24638">
            <text:p>24,64%</text:p>
          </table:table-cell>
          <table:table-cell office:value-type="percentage" office:value="0.36463">
            <text:p>36,46%</text:p>
          </table:table-cell>
          <table:table-cell office:value-type="float" office:value="0.927">
            <text:p>0,927</text:p>
          </table:table-cell>
          <table:table-cell table:number-columns-repeated="1013"/>
        </table:table-row>
        <table:table-row table:style-name="ro2">
          <table:table-cell office:value-type="string">
            <text:p>VRT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WEAKENING</text:p>
          </table:table-cell>
          <table:table-cell office:value-type="float" office:value="339.97">
            <text:p>339,97</text:p>
          </table:table-cell>
          <table:table-cell office:value-type="float" office:value="85.4196">
            <text:p>85,4196</text:p>
          </table:table-cell>
          <table:table-cell office:value-type="float" office:value="0.76913">
            <text:p>0,76913</text:p>
          </table:table-cell>
          <table:table-cell office:value-type="percentage" office:value="0.21977">
            <text:p>21,98%</text:p>
          </table:table-cell>
          <table:table-cell office:value-type="percentage" office:value="0.45097">
            <text:p>45,10%</text:p>
          </table:table-cell>
          <table:table-cell office:value-type="float" office:value="2.099">
            <text:p>2,099</text:p>
          </table:table-cell>
          <table:table-cell table:number-columns-repeated="1013"/>
        </table:table-row>
        <table:table-row table:style-name="ro2">
          <table:table-cell office:value-type="string">
            <text:p>VICI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8.84">
            <text:p>28,84</text:p>
          </table:table-cell>
          <table:table-cell office:value-type="float" office:value="9.876712">
            <text:p>9,876712</text:p>
          </table:table-cell>
          <table:table-cell office:value-type="float" office:value="0.61853">
            <text:p>0,61853</text:p>
          </table:table-cell>
          <table:table-cell office:value-type="percentage" office:value="0.98765">
            <text:p>98,77%</text:p>
          </table:table-cell>
          <table:table-cell office:value-type="percentage" office:value="0.11331">
            <text:p>11,33%</text:p>
          </table:table-cell>
          <table:table-cell office:value-type="float" office:value="0.696">
            <text:p>0,696</text:p>
          </table:table-cell>
          <table:table-cell table:number-columns-repeated="1013"/>
        </table:table-row>
        <table:table-row table:style-name="ro2">
          <table:table-cell office:value-type="string">
            <text:p>V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IMPROVING</text:p>
          </table:table-cell>
          <table:table-cell office:value-type="float" office:value="318.79">
            <text:p>318,79</text:p>
          </table:table-cell>
          <table:table-cell office:value-type="float" office:value="27.769165">
            <text:p>27,769165</text:p>
          </table:table-cell>
          <table:table-cell office:value-type="float" office:value="0.67233">
            <text:p>0,67233</text:p>
          </table:table-cell>
          <table:table-cell office:value-type="percentage" office:value="0.70056">
            <text:p>70,06%</text:p>
          </table:table-cell>
          <table:table-cell office:value-type="percentage" office:value="0.60349">
            <text:p>60,35%</text:p>
          </table:table-cell>
          <table:table-cell office:value-type="float" office:value="0.784">
            <text:p>0,784</text:p>
          </table:table-cell>
          <table:table-cell table:number-columns-repeated="1013"/>
        </table:table-row>
        <table:table-row table:style-name="ro2">
          <table:table-cell office:value-type="string">
            <text:p>VMC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83.72">
            <text:p>283,72</text:p>
          </table:table-cell>
          <table:table-cell office:value-type="float" office:value="33.65599">
            <text:p>33,65599</text:p>
          </table:table-cell>
          <table:table-cell office:value-type="float" office:value="0.61249">
            <text:p>0,61249</text:p>
          </table:table-cell>
          <table:table-cell office:value-type="percentage" office:value="0.29048002">
            <text:p>29,05%</text:p>
          </table:table-cell>
          <table:table-cell office:value-type="percentage" office:value="0.13458">
            <text:p>13,46%</text:p>
          </table:table-cell>
          <table:table-cell office:value-type="float" office:value="1.091">
            <text:p>1,091</text:p>
          </table:table-cell>
          <table:table-cell table:number-columns-repeated="1013"/>
        </table:table-row>
        <table:table-row table:style-name="ro2">
          <table:table-cell office:value-type="string">
            <text:p>WRB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65.68">
            <text:p>65,68</text:p>
          </table:table-cell>
          <table:table-cell office:value-type="float" office:value="13.915255">
            <text:p>13,915255</text:p>
          </table:table-cell>
          <table:table-cell office:value-type="float" office:value="0.3176">
            <text:p>0,3176</text:p>
          </table:table-cell>
          <table:table-cell office:value-type="percentage" office:value="0.17375">
            <text:p>17,38%</text:p>
          </table:table-cell>
          <table:table-cell office:value-type="percentage" office:value="0.20164">
            <text:p>20,16%</text:p>
          </table:table-cell>
          <table:table-cell office:value-type="float" office:value="0.332">
            <text:p>0,332</text:p>
          </table:table-cell>
          <table:table-cell table:number-columns-repeated="1013"/>
        </table:table-row>
        <table:table-row table:style-name="ro2">
          <table:table-cell office:value-type="string">
            <text:p>WAB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65.71">
            <text:p>265,71</text:p>
          </table:table-cell>
          <table:table-cell office:value-type="float" office:value="37.58274">
            <text:p>37,58274</text:p>
          </table:table-cell>
          <table:table-cell office:value-type="float" office:value="0.6203">
            <text:p>0,6203</text:p>
          </table:table-cell>
          <table:table-cell office:value-type="percentage" office:value="0.219">
            <text:p>21,90%</text:p>
          </table:table-cell>
          <table:table-cell office:value-type="percentage" office:value="0.11305001">
            <text:p>11,31%</text:p>
          </table:table-cell>
          <table:table-cell office:value-type="float" office:value="0.97">
            <text:p>0,97</text:p>
          </table:table-cell>
          <table:table-cell table:number-columns-repeated="1013"/>
        </table:table-row>
        <table:table-row table:style-name="ro2">
          <table:table-cell office:value-type="string">
            <text:p>WSM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182.1">
            <text:p>182,1</text:p>
          </table:table-cell>
          <table:table-cell office:value-type="float" office:value="20.622877">
            <text:p>20,622877</text:p>
          </table:table-cell>
          <table:table-cell office:value-type="float" office:value="0.69957">
            <text:p>0,69957</text:p>
          </table:table-cell>
          <table:table-cell office:value-type="percentage" office:value="0.21120001">
            <text:p>21,12%</text:p>
          </table:table-cell>
          <table:table-cell office:value-type="percentage" office:value="0.51523995">
            <text:p>51,52%</text:p>
          </table:table-cell>
          <table:table-cell office:value-type="float" office:value="1.49">
            <text:p>1,49</text:p>
          </table:table-cell>
          <table:table-cell table:number-columns-repeated="1013"/>
        </table:table-row>
        <table:table-row table:style-name="ro2">
          <table:table-cell office:value-type="string">
            <text:p>WTW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256.36">
            <text:p>256,36</text:p>
          </table:table-cell>
          <table:table-cell office:value-type="float" office:value="15.053433">
            <text:p>15,053433</text:p>
          </table:table-cell>
          <table:table-cell office:value-type="float" office:value="0.85693">
            <text:p>0,85693</text:p>
          </table:table-cell>
          <table:table-cell office:value-type="percentage" office:value="0.27938">
            <text:p>27,94%</text:p>
          </table:table-cell>
          <table:table-cell office:value-type="percentage" office:value="0.20611">
            <text:p>20,61%</text:p>
          </table:table-cell>
          <table:table-cell office:value-type="float" office:value="0.453">
            <text:p>0,453</text:p>
          </table:table-cell>
          <table:table-cell table:number-columns-repeated="1013"/>
        </table:table-row>
        <table:table-row table:style-name="ro2">
          <table:table-cell office:value-type="string">
            <text:p>ZBH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.5">
            <text:p>5,5</text:p>
          </table:table-cell>
          <table:table-cell table:style-name="ce2" office:value-type="string">
            <text:p>LAGGING</text:p>
          </table:table-cell>
          <table:table-cell office:value-type="float" office:value="82.33">
            <text:p>82,33</text:p>
          </table:table-cell>
          <table:table-cell office:value-type="float" office:value="21.329016">
            <text:p>21,329016</text:p>
          </table:table-cell>
          <table:table-cell office:value-type="float" office:value="0.59827">
            <text:p>0,59827</text:p>
          </table:table-cell>
          <table:table-cell office:value-type="percentage" office:value="0.30693">
            <text:p>30,69%</text:p>
          </table:table-cell>
          <table:table-cell office:value-type="percentage" office:value="0.060650002">
            <text:p>6,07%</text:p>
          </table:table-cell>
          <table:table-cell office:value-type="float" office:value="0.473">
            <text:p>0,473</text:p>
          </table:table-cell>
          <table:table-cell table:number-columns-repeated="1013"/>
        </table:table-row>
        <table:table-row table:style-name="ro2">
          <table:table-cell office:value-type="string">
            <text:p>MMM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43.29">
            <text:p>143,29</text:p>
          </table:table-cell>
          <table:table-cell office:value-type="float" office:value="27.608862">
            <text:p>27,608862</text:p>
          </table:table-cell>
          <table:table-cell office:value-type="float" office:value="3.96497">
            <text:p>3,96497</text:p>
          </table:table-cell>
          <table:table-cell office:value-type="percentage" office:value="0.24936001">
            <text:p>24,94%</text:p>
          </table:table-cell>
          <table:table-cell office:value-type="percentage" office:value="0.71458">
            <text:p>71,46%</text:p>
          </table:table-cell>
          <table:table-cell office:value-type="float" office:value="1.09">
            <text:p>1,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S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4.33">
            <text:p>14,33</text:p>
          </table:table-cell>
          <table:table-cell office:value-type="float" office:value="7.463542">
            <text:p>7,463542</text:p>
          </table:table-cell>
          <table:table-cell office:value-type="float" office:value="2.59603">
            <text:p>2,59603</text:p>
          </table:table-cell>
          <table:table-cell office:value-type="percentage" office:value="0.30071">
            <text:p>30,07%</text:p>
          </table:table-cell>
          <table:table-cell office:value-type="percentage" office:value="0.052600004">
            <text:p>5,26%</text:p>
          </table:table-cell>
          <table:table-cell office:value-type="float" office:value="0.957">
            <text:p>0,9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PD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95.41">
            <text:p>295,41</text:p>
          </table:table-cell>
          <table:table-cell office:value-type="float" office:value="31.161394">
            <text:p>31,161394</text:p>
          </table:table-cell>
          <table:table-cell office:value-type="float" office:value="1.01611">
            <text:p>1,01611</text:p>
          </table:table-cell>
          <table:table-cell office:value-type="percentage" office:value="0.31111">
            <text:p>31,11%</text:p>
          </table:table-cell>
          <table:table-cell office:value-type="percentage" office:value="0.12353">
            <text:p>12,35%</text:p>
          </table:table-cell>
          <table:table-cell office:value-type="float" office:value="0.776">
            <text:p>0,77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KAM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47.71">
            <text:p>147,71</text:p>
          </table:table-cell>
          <table:table-cell office:value-type="float" office:value="50.071186">
            <text:p>50,071186</text:p>
          </table:table-cell>
          <table:table-cell office:value-type="float" office:value="1.19534">
            <text:p>1,19534</text:p>
          </table:table-cell>
          <table:table-cell office:value-type="percentage" office:value="0.26882">
            <text:p>26,88%</text:p>
          </table:table-cell>
          <table:table-cell office:value-type="percentage" office:value="0.091680005">
            <text:p>9,17%</text:p>
          </table:table-cell>
          <table:table-cell office:value-type="float" office:value="0.454">
            <text:p>0,45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LGN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68.78">
            <text:p>168,78</text:p>
          </table:table-cell>
          <table:table-cell office:value-type="float" office:value="28.318792">
            <text:p>28,318792</text:p>
          </table:table-cell>
          <table:table-cell office:value-type="float" office:value="2.797">
            <text:p>2,797</text:p>
          </table:table-cell>
          <table:table-cell office:value-type="percentage" office:value="0.21741">
            <text:p>21,74%</text:p>
          </table:table-cell>
          <table:table-cell office:value-type="percentage" office:value="0.10824">
            <text:p>10,82%</text:p>
          </table:table-cell>
          <table:table-cell office:value-type="float" office:value="1.695">
            <text:p>1,6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LLE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34.37">
            <text:p>134,37</text:p>
          </table:table-cell>
          <table:table-cell office:value-type="float" office:value="18.356556">
            <text:p>18,356556</text:p>
          </table:table-cell>
          <table:table-cell office:value-type="float" office:value="1.05863">
            <text:p>1,05863</text:p>
          </table:table-cell>
          <table:table-cell office:value-type="percentage" office:value="0.24299">
            <text:p>24,30%</text:p>
          </table:table-cell>
          <table:table-cell office:value-type="percentage" office:value="0.34179002">
            <text:p>34,18%</text:p>
          </table:table-cell>
          <table:table-cell office:value-type="float" office:value="0.903">
            <text:p>0,90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NT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1.76">
            <text:p>71,76</text:p>
          </table:table-cell>
          <table:table-cell office:value-type="float" office:value="22.566038">
            <text:p>22,566038</text:p>
          </table:table-cell>
          <table:table-cell office:value-type="float" office:value="1.59526">
            <text:p>1,59526</text:p>
          </table:table-cell>
          <table:table-cell office:value-type="percentage" office:value="0.42009997">
            <text:p>42,01%</text:p>
          </table:table-cell>
          <table:table-cell office:value-type="percentage" office:value="0.113120005">
            <text:p>11,31%</text:p>
          </table:table-cell>
          <table:table-cell office:value-type="float" office:value="0.566">
            <text:p>0,5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E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09.07">
            <text:p>109,07</text:p>
          </table:table-cell>
          <table:table-cell office:value-type="float" office:value="19.616907">
            <text:p>19,616907</text:p>
          </table:table-cell>
          <table:table-cell office:value-type="float" office:value="1.55674">
            <text:p>1,55674</text:p>
          </table:table-cell>
          <table:table-cell office:value-type="percentage" office:value="0.44786">
            <text:p>44,79%</text:p>
          </table:table-cell>
          <table:table-cell office:value-type="percentage" office:value="0.117469996">
            <text:p>11,75%</text:p>
          </table:table-cell>
          <table:table-cell office:value-type="float" office:value="0.511">
            <text:p>0,5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EP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30.16">
            <text:p>130,16</text:p>
          </table:table-cell>
          <table:table-cell office:value-type="float" office:value="19.254438">
            <text:p>19,254438</text:p>
          </table:table-cell>
          <table:table-cell office:value-type="float" office:value="1.57099">
            <text:p>1,57099</text:p>
          </table:table-cell>
          <table:table-cell office:value-type="percentage" office:value="0.40748">
            <text:p>40,75%</text:p>
          </table:table-cell>
          <table:table-cell office:value-type="percentage" office:value="0.12585">
            <text:p>12,59%</text:p>
          </table:table-cell>
          <table:table-cell office:value-type="float" office:value="0.552">
            <text:p>0,55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T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76.53">
            <text:p>176,53</text:p>
          </table:table-cell>
          <table:table-cell office:value-type="float" office:value="28.472582">
            <text:p>28,472582</text:p>
          </table:table-cell>
          <table:table-cell office:value-type="float" office:value="4.4455">
            <text:p>4,4455</text:p>
          </table:table-cell>
          <table:table-cell office:value-type="percentage" office:value="0.64602995">
            <text:p>64,60%</text:p>
          </table:table-cell>
          <table:table-cell office:value-type="percentage" office:value="0.29952">
            <text:p>29,95%</text:p>
          </table:table-cell>
          <table:table-cell office:value-type="float" office:value="0.9">
            <text:p>0,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WK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25.05">
            <text:p>125,05</text:p>
          </table:table-cell>
          <table:table-cell office:value-type="float" office:value="22.171988">
            <text:p>22,171988</text:p>
          </table:table-cell>
          <table:table-cell office:value-type="float" office:value="1.4233">
            <text:p>1,4233</text:p>
          </table:table-cell>
          <table:table-cell office:value-type="percentage" office:value="0.54486">
            <text:p>54,49%</text:p>
          </table:table-cell>
          <table:table-cell office:value-type="percentage" office:value="0.10217">
            <text:p>10,22%</text:p>
          </table:table-cell>
          <table:table-cell office:value-type="float" office:value="0.634">
            <text:p>0,63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GN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31.7">
            <text:p>331,7</text:p>
          </table:table-cell>
          <table:table-cell office:value-type="float" office:value="23.098886">
            <text:p>23,098886</text:p>
          </table:table-cell>
          <table:table-cell office:value-type="float" office:value="6.23754">
            <text:p>6,23754</text:p>
          </table:table-cell>
          <table:table-cell office:value-type="percentage" office:value="0.45453998">
            <text:p>45,45%</text:p>
          </table:table-cell>
          <table:table-cell office:value-type="percentage" office:value="1.01318">
            <text:p>101,32%</text:p>
          </table:table-cell>
          <table:table-cell office:value-type="float" office:value="0.435">
            <text:p>0,4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PH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28.03">
            <text:p>128,03</text:p>
          </table:table-cell>
          <table:table-cell office:value-type="float" office:value="36.79023">
            <text:p>36,79023</text:p>
          </table:table-cell>
          <table:table-cell office:value-type="float" office:value="1.33051">
            <text:p>1,33051</text:p>
          </table:table-cell>
          <table:table-cell office:value-type="percentage" office:value="0.31545">
            <text:p>31,55%</text:p>
          </table:table-cell>
          <table:table-cell office:value-type="percentage" office:value="0.36825">
            <text:p>36,83%</text:p>
          </table:table-cell>
          <table:table-cell office:value-type="float" office:value="1.297">
            <text:p>1,29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ON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12.79">
            <text:p>312,79</text:p>
          </table:table-cell>
          <table:table-cell office:value-type="float" office:value="17.186264">
            <text:p>17,186264</text:p>
          </table:table-cell>
          <table:table-cell office:value-type="float" office:value="1.5505">
            <text:p>1,5505</text:p>
          </table:table-cell>
          <table:table-cell office:value-type="percentage" office:value="0.33421">
            <text:p>33,42%</text:p>
          </table:table-cell>
          <table:table-cell office:value-type="percentage" office:value="0.46447">
            <text:p>46,45%</text:p>
          </table:table-cell>
          <table:table-cell office:value-type="float" office:value="0.714">
            <text:p>0,71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PP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68.55">
            <text:p>468,55</text:p>
          </table:table-cell>
          <table:table-cell office:value-type="float" office:value="40.81446">
            <text:p>40,81446</text:p>
          </table:table-cell>
          <table:table-cell office:value-type="float" office:value="1.62888">
            <text:p>1,62888</text:p>
          </table:table-cell>
          <table:table-cell office:value-type="percentage" office:value="0.79038">
            <text:p>79,04%</text:p>
          </table:table-cell>
          <table:table-cell office:value-type="percentage" office:value="2.66444">
            <text:p>266,44%</text:p>
          </table:table-cell>
          <table:table-cell office:value-type="float" office:value="2.366">
            <text:p>2,3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RES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26.25">
            <text:p>126,25</text:p>
          </table:table-cell>
          <table:table-cell office:value-type="float" office:value="74.2647">
            <text:p>74,2647</text:p>
          </table:table-cell>
          <table:table-cell office:value-type="float" office:value="1.68762">
            <text:p>1,68762</text:p>
          </table:table-cell>
          <table:table-cell office:value-type="percentage" office:value="0.2335">
            <text:p>23,35%</text:p>
          </table:table-cell>
          <table:table-cell office:value-type="percentage" office:value="0.14182">
            <text:p>14,18%</text:p>
          </table:table-cell>
          <table:table-cell office:value-type="float" office:value="1.521">
            <text:p>1,5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NET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41.77">
            <text:p>141,77</text:p>
          </table:table-cell>
          <table:table-cell office:value-type="float" office:value="48.718212">
            <text:p>48,718212</text:p>
          </table:table-cell>
          <table:table-cell/>
          <table:table-cell office:value-type="percentage" office:value="0.43638">
            <text:p>43,64%</text:p>
          </table:table-cell>
          <table:table-cell office:value-type="percentage" office:value="0.31520998">
            <text:p>31,52%</text:p>
          </table:table-cell>
          <table:table-cell office:value-type="float" office:value="1.673">
            <text:p>1,67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5.16">
            <text:p>25,16</text:p>
          </table:table-cell>
          <table:table-cell office:value-type="float" office:value="8.276316">
            <text:p>8,276316</text:p>
          </table:table-cell>
          <table:table-cell office:value-type="float" office:value="1.25175">
            <text:p>1,25175</text:p>
          </table:table-cell>
          <table:table-cell office:value-type="percentage" office:value="0.35101002">
            <text:p>35,10%</text:p>
          </table:table-cell>
          <table:table-cell office:value-type="percentage" office:value="0.18370001">
            <text:p>18,37%</text:p>
          </table:table-cell>
          <table:table-cell office:value-type="float" office:value="0.417">
            <text:p>0,41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KR</text:p>
          </table:table-cell>
          <table:table-cell office:value-type="string">
            <text:p>Energy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63.89">
            <text:p>63,89</text:p>
          </table:table-cell>
          <table:table-cell office:value-type="float" office:value="20.41214">
            <text:p>20,41214</text:p>
          </table:table-cell>
          <table:table-cell office:value-type="float" office:value="0.82935">
            <text:p>0,82935</text:p>
          </table:table-cell>
          <table:table-cell office:value-type="percentage" office:value="0.17284">
            <text:p>17,28%</text:p>
          </table:table-cell>
          <table:table-cell office:value-type="percentage" office:value="0.17184">
            <text:p>17,18%</text:p>
          </table:table-cell>
          <table:table-cell office:value-type="float" office:value="0.97">
            <text:p>0,97</text:p>
          </table:table-cell>
          <table:table-cell table:number-columns-repeated="1013"/>
        </table:table-row>
        <table:table-row table:style-name="ro2">
          <table:table-cell office:value-type="string">
            <text:p>BLK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084.83">
            <text:p>1084,83</text:p>
          </table:table-cell>
          <table:table-cell office:value-type="float" office:value="27.325691">
            <text:p>27,325691</text:p>
          </table:table-cell>
          <table:table-cell office:value-type="float" office:value="0.24367">
            <text:p>0,24367</text:p>
          </table:table-cell>
          <table:table-cell office:value-type="percentage" office:value="0.3995">
            <text:p>39,95%</text:p>
          </table:table-cell>
          <table:table-cell/>
          <table:table-cell office:value-type="float" office:value="1.456">
            <text:p>1,456</text:p>
          </table:table-cell>
          <table:table-cell table:number-columns-repeated="1013"/>
        </table:table-row>
        <table:table-row table:style-name="ro2">
          <table:table-cell office:value-type="string">
            <text:p>BMY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56.16">
            <text:p>56,16</text:p>
          </table:table-cell>
          <table:table-cell office:value-type="float" office:value="15.731092">
            <text:p>15,731092</text:p>
          </table:table-cell>
          <table:table-cell office:value-type="float" office:value="2.30967">
            <text:p>2,30967</text:p>
          </table:table-cell>
          <table:table-cell office:value-type="percentage" office:value="0.39136">
            <text:p>39,14%</text:p>
          </table:table-cell>
          <table:table-cell office:value-type="percentage" office:value="0.38731998">
            <text:p>38,73%</text:p>
          </table:table-cell>
          <table:table-cell office:value-type="float" office:value="0.259">
            <text:p>0,2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49.5">
            <text:p>149,5</text:p>
          </table:table-cell>
          <table:table-cell office:value-type="float" office:value="16.006424">
            <text:p>16,006424</text:p>
          </table:table-cell>
          <table:table-cell office:value-type="float" office:value="1.20878">
            <text:p>1,20878</text:p>
          </table:table-cell>
          <table:table-cell office:value-type="percentage" office:value="0.24062">
            <text:p>24,06%</text:p>
          </table:table-cell>
          <table:table-cell office:value-type="percentage" office:value="0.42314">
            <text:p>42,31%</text:p>
          </table:table-cell>
          <table:table-cell office:value-type="float" office:value="0.901">
            <text:p>0,9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XP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59.43">
            <text:p>59,43</text:p>
          </table:table-cell>
          <table:table-cell office:value-type="float" office:value="29.86432">
            <text:p>29,86432</text:p>
          </table:table-cell>
          <table:table-cell office:value-type="float" office:value="2.11994">
            <text:p>2,11994</text:p>
          </table:table-cell>
          <table:table-cell office:value-type="percentage" office:value="0.50564">
            <text:p>50,56%</text:p>
          </table:table-cell>
          <table:table-cell office:value-type="percentage" office:value="0.05525">
            <text:p>5,53%</text:p>
          </table:table-cell>
          <table:table-cell office:value-type="float" office:value="1.059">
            <text:p>1,0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PT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03.77">
            <text:p>103,77</text:p>
          </table:table-cell>
          <table:table-cell office:value-type="float" office:value="28.986032">
            <text:p>28,986032</text:p>
          </table:table-cell>
          <table:table-cell office:value-type="float" office:value="1.04147">
            <text:p>1,04147</text:p>
          </table:table-cell>
          <table:table-cell office:value-type="percentage" office:value="0.53007">
            <text:p>53,01%</text:p>
          </table:table-cell>
          <table:table-cell office:value-type="percentage" office:value="0.09064999">
            <text:p>9,06%</text:p>
          </table:table-cell>
          <table:table-cell office:value-type="float" office:value="0.822">
            <text:p>0,82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CL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6.38">
            <text:p>26,38</text:p>
          </table:table-cell>
          <table:table-cell office:value-type="float" office:value="11.621145">
            <text:p>11,621145</text:p>
          </table:table-cell>
          <table:table-cell office:value-type="float" office:value="2.03901">
            <text:p>2,03901</text:p>
          </table:table-cell>
          <table:table-cell office:value-type="percentage" office:value="0.26893">
            <text:p>26,89%</text:p>
          </table:table-cell>
          <table:table-cell office:value-type="percentage" office:value="0.27853">
            <text:p>27,85%</text:p>
          </table:table-cell>
          <table:table-cell office:value-type="float" office:value="2.331">
            <text:p>2,3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T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897.45">
            <text:p>897,45</text:p>
          </table:table-cell>
          <table:table-cell office:value-type="float" office:value="44.649254">
            <text:p>44,649254</text:p>
          </table:table-cell>
          <table:table-cell office:value-type="float" office:value="2.30793">
            <text:p>2,30793</text:p>
          </table:table-cell>
          <table:table-cell office:value-type="percentage" office:value="0.20573999">
            <text:p>20,57%</text:p>
          </table:table-cell>
          <table:table-cell office:value-type="percentage" office:value="0.51331">
            <text:p>51,33%</text:p>
          </table:table-cell>
          <table:table-cell office:value-type="float" office:value="1.625">
            <text:p>1,62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NP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1.72">
            <text:p>41,72</text:p>
          </table:table-cell>
          <table:table-cell office:value-type="float" office:value="25.595093">
            <text:p>25,595093</text:p>
          </table:table-cell>
          <table:table-cell office:value-type="float" office:value="2.15591">
            <text:p>2,15591</text:p>
          </table:table-cell>
          <table:table-cell office:value-type="percentage" office:value="0.38929">
            <text:p>38,93%</text:p>
          </table:table-cell>
          <table:table-cell office:value-type="percentage" office:value="0.09561">
            <text:p>9,56%</text:p>
          </table:table-cell>
          <table:table-cell office:value-type="float" office:value="0.476">
            <text:p>0,47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HTR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54.86">
            <text:p>154,86</text:p>
          </table:table-cell>
          <table:table-cell office:value-type="float" office:value="4.188802">
            <text:p>4,188802</text:p>
          </table:table-cell>
          <table:table-cell office:value-type="float" office:value="4.59525">
            <text:p>4,59525</text:p>
          </table:table-cell>
          <table:table-cell office:value-type="percentage" office:value="0.40221">
            <text:p>40,22%</text:p>
          </table:table-cell>
          <table:table-cell office:value-type="percentage" office:value="0.27504998">
            <text:p>27,50%</text:p>
          </table:table-cell>
          <table:table-cell office:value-type="float" office:value="0.757">
            <text:p>0,7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VX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81.62">
            <text:p>181,62</text:p>
          </table:table-cell>
          <table:table-cell office:value-type="float" office:value="31.641115">
            <text:p>31,641115</text:p>
          </table:table-cell>
          <table:table-cell office:value-type="float" office:value="0.23989">
            <text:p>0,23989</text:p>
          </table:table-cell>
          <table:table-cell office:value-type="percentage" office:value="0.20408002">
            <text:p>20,41%</text:p>
          </table:table-cell>
          <table:table-cell office:value-type="percentage" office:value="0.06638">
            <text:p>6,64%</text:p>
          </table:table-cell>
          <table:table-cell office:value-type="float" office:value="0.501">
            <text:p>0,501</text:p>
          </table:table-cell>
          <table:table-cell table:number-columns-repeated="1013"/>
        </table:table-row>
        <table:table-row table:style-name="ro2">
          <table:table-cell office:value-type="string">
            <text:p>CINF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61.5">
            <text:p>161,5</text:p>
          </table:table-cell>
          <table:table-cell office:value-type="float" office:value="9.233848">
            <text:p>9,233848</text:p>
          </table:table-cell>
          <table:table-cell office:value-type="float" office:value="5.626">
            <text:p>5,626</text:p>
          </table:table-cell>
          <table:table-cell office:value-type="percentage" office:value="0.28218">
            <text:p>28,22%</text:p>
          </table:table-cell>
          <table:table-cell office:value-type="percentage" office:value="0.18735">
            <text:p>18,74%</text:p>
          </table:table-cell>
          <table:table-cell office:value-type="float" office:value="0.598">
            <text:p>0,59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MS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2.61">
            <text:p>72,61</text:p>
          </table:table-cell>
          <table:table-cell office:value-type="float" office:value="20.058012">
            <text:p>20,058012</text:p>
          </table:table-cell>
          <table:table-cell office:value-type="float" office:value="1.89842">
            <text:p>1,89842</text:p>
          </table:table-cell>
          <table:table-cell office:value-type="percentage" office:value="0.3455">
            <text:p>34,55%</text:p>
          </table:table-cell>
          <table:table-cell office:value-type="percentage" office:value="0.103719994">
            <text:p>10,37%</text:p>
          </table:table-cell>
          <table:table-cell office:value-type="float" office:value="0.371">
            <text:p>0,37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O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78.42">
            <text:p>78,42</text:p>
          </table:table-cell>
          <table:table-cell office:value-type="float" office:value="24.660376">
            <text:p>24,660376</text:p>
          </table:table-cell>
          <table:table-cell office:value-type="float" office:value="1.24943">
            <text:p>1,24943</text:p>
          </table:table-cell>
          <table:table-cell office:value-type="percentage" office:value="0.33922002">
            <text:p>33,92%</text:p>
          </table:table-cell>
          <table:table-cell office:value-type="percentage" office:value="0.43372002">
            <text:p>43,37%</text:p>
          </table:table-cell>
          <table:table-cell office:value-type="float" office:value="0.356">
            <text:p>0,3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OIN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01.16">
            <text:p>201,16</text:p>
          </table:table-cell>
          <table:table-cell office:value-type="float" office:value="73.95588">
            <text:p>73,95588</text:p>
          </table:table-cell>
          <table:table-cell office:value-type="float" office:value="0.59081">
            <text:p>0,59081</text:p>
          </table:table-cell>
          <table:table-cell office:value-type="percentage" office:value="0.15946999">
            <text:p>15,95%</text:p>
          </table:table-cell>
          <table:table-cell office:value-type="percentage" office:value="0.06686">
            <text:p>6,69%</text:p>
          </table:table-cell>
          <table:table-cell office:value-type="float" office:value="3.381">
            <text:p>3,381</text:p>
          </table:table-cell>
          <table:table-cell table:number-columns-repeated="1013"/>
        </table:table-row>
        <table:table-row table:style-name="ro2">
          <table:table-cell office:value-type="string">
            <text:p>CL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87.55">
            <text:p>87,55</text:p>
          </table:table-cell>
          <table:table-cell office:value-type="float" office:value="33.934113">
            <text:p>33,934113</text:p>
          </table:table-cell>
          <table:table-cell office:value-type="float" office:value="16.40535">
            <text:p>16,40535</text:p>
          </table:table-cell>
          <table:table-cell office:value-type="percentage" office:value="0.23663999">
            <text:p>23,66%</text:p>
          </table:table-cell>
          <table:table-cell office:value-type="percentage" office:value="3.6357698">
            <text:p>363,58%</text:p>
          </table:table-cell>
          <table:table-cell office:value-type="float" office:value="0.304">
            <text:p>0,3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MCSA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5.4">
            <text:p>25,4</text:p>
          </table:table-cell>
          <table:table-cell office:value-type="float" office:value="4.980392">
            <text:p>4,980392</text:p>
          </table:table-cell>
          <table:table-cell office:value-type="float" office:value="1.06858">
            <text:p>1,06858</text:p>
          </table:table-cell>
          <table:table-cell office:value-type="percentage" office:value="0.28235">
            <text:p>28,24%</text:p>
          </table:table-cell>
          <table:table-cell office:value-type="percentage" office:value="0.20918">
            <text:p>20,92%</text:p>
          </table:table-cell>
          <table:table-cell office:value-type="float" office:value="0.689">
            <text:p>0,6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D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06.31">
            <text:p>106,31</text:p>
          </table:table-cell>
          <table:table-cell office:value-type="float" office:value="17.927488">
            <text:p>17,927488</text:p>
          </table:table-cell>
          <table:table-cell office:value-type="float" office:value="1.06177">
            <text:p>1,06177</text:p>
          </table:table-cell>
          <table:table-cell office:value-type="percentage" office:value="0.34952">
            <text:p>34,95%</text:p>
          </table:table-cell>
          <table:table-cell office:value-type="percentage" office:value="0.08732">
            <text:p>8,73%</text:p>
          </table:table-cell>
          <table:table-cell office:value-type="float" office:value="0.288">
            <text:p>0,28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TZ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48.21">
            <text:p>148,21</text:p>
          </table:table-cell>
          <table:table-cell office:value-type="float" office:value="15.438541">
            <text:p>15,438541</text:p>
          </table:table-cell>
          <table:table-cell office:value-type="float" office:value="1.33573">
            <text:p>1,33573</text:p>
          </table:table-cell>
          <table:table-cell office:value-type="percentage" office:value="0.37028">
            <text:p>37,03%</text:p>
          </table:table-cell>
          <table:table-cell office:value-type="percentage" office:value="0.22636999">
            <text:p>22,64%</text:p>
          </table:table-cell>
          <table:table-cell office:value-type="float" office:value="0.424">
            <text:p>0,42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PAY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343.99">
            <text:p>343,99</text:p>
          </table:table-cell>
          <table:table-cell office:value-type="float" office:value="20.6229">
            <text:p>20,6229</text:p>
          </table:table-cell>
          <table:table-cell office:value-type="float" office:value="2.71343">
            <text:p>2,71343</text:p>
          </table:table-cell>
          <table:table-cell office:value-type="percentage" office:value="0.5332">
            <text:p>53,32%</text:p>
          </table:table-cell>
          <table:table-cell office:value-type="percentage" office:value="0.32124">
            <text:p>32,12%</text:p>
          </table:table-cell>
          <table:table-cell office:value-type="float" office:value="0.816">
            <text:p>0,8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TVA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81.13">
            <text:p>81,13</text:p>
          </table:table-cell>
          <table:table-cell office:value-type="float" office:value="43.854053">
            <text:p>43,854053</text:p>
          </table:table-cell>
          <table:table-cell office:value-type="float" office:value="0.1364">
            <text:p>0,1364</text:p>
          </table:table-cell>
          <table:table-cell office:value-type="percentage" office:value="0.23148">
            <text:p>23,15%</text:p>
          </table:table-cell>
          <table:table-cell office:value-type="percentage" office:value="0.051370002">
            <text:p>5,14%</text:p>
          </table:table-cell>
          <table:table-cell office:value-type="float" office:value="0.593">
            <text:p>0,593</text:p>
          </table:table-cell>
          <table:table-cell table:number-columns-repeated="1013"/>
        </table:table-row>
        <table:table-row table:style-name="ro2">
          <table:table-cell office:value-type="string">
            <text:p>CRH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13.76">
            <text:p>113,76</text:p>
          </table:table-cell>
          <table:table-cell office:value-type="float" office:value="21.105753">
            <text:p>21,105753</text:p>
          </table:table-cell>
          <table:table-cell office:value-type="float" office:value="0.83227">
            <text:p>0,83227</text:p>
          </table:table-cell>
          <table:table-cell office:value-type="percentage" office:value="0.19923">
            <text:p>19,92%</text:p>
          </table:table-cell>
          <table:table-cell office:value-type="percentage" office:value="0.15812">
            <text:p>15,81%</text:p>
          </table:table-cell>
          <table:table-cell office:value-type="float" office:value="1.228">
            <text:p>1,228</text:p>
          </table:table-cell>
          <table:table-cell table:number-columns-repeated="1013"/>
        </table:table-row>
        <table:table-row table:style-name="ro2">
          <table:table-cell office:value-type="string">
            <text:p>CSX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4.83">
            <text:p>44,83</text:p>
          </table:table-cell>
          <table:table-cell office:value-type="float" office:value="27.503069">
            <text:p>27,503069</text:p>
          </table:table-cell>
          <table:table-cell office:value-type="float" office:value="1.4306">
            <text:p>1,4306</text:p>
          </table:table-cell>
          <table:table-cell office:value-type="percentage" office:value="0.46816003">
            <text:p>46,82%</text:p>
          </table:table-cell>
          <table:table-cell office:value-type="percentage" office:value="0.23684">
            <text:p>23,68%</text:p>
          </table:table-cell>
          <table:table-cell office:value-type="float" office:value="1.238">
            <text:p>1,23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ANG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88.7">
            <text:p>188,7</text:p>
          </table:table-cell>
          <table:table-cell office:value-type="float" office:value="192.55101">
            <text:p>192,55101</text:p>
          </table:table-cell>
          <table:table-cell office:value-type="float" office:value="0.32594">
            <text:p>0,32594</text:p>
          </table:table-cell>
          <table:table-cell office:value-type="percentage" office:value="0.70192003">
            <text:p>70,19%</text:p>
          </table:table-cell>
          <table:table-cell office:value-type="percentage" office:value="0.0047400002">
            <text:p>0,47%</text:p>
          </table:table-cell>
          <table:table-cell office:value-type="float" office:value="0.442">
            <text:p>0,442</text:p>
          </table:table-cell>
          <table:table-cell table:number-columns-repeated="1013"/>
        </table:table-row>
        <table:table-row table:style-name="ro2">
          <table:table-cell office:value-type="string">
            <text:p>D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61.89">
            <text:p>61,89</text:p>
          </table:table-cell>
          <table:table-cell office:value-type="float" office:value="18.256636">
            <text:p>18,256636</text:p>
          </table:table-cell>
          <table:table-cell office:value-type="float" office:value="1.54901">
            <text:p>1,54901</text:p>
          </table:table-cell>
          <table:table-cell office:value-type="percentage" office:value="0.47223">
            <text:p>47,22%</text:p>
          </table:table-cell>
          <table:table-cell office:value-type="percentage" office:value="0.09787">
            <text:p>9,79%</text:p>
          </table:table-cell>
          <table:table-cell office:value-type="float" office:value="0.636">
            <text:p>0,6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UK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24.17">
            <text:p>124,17</text:p>
          </table:table-cell>
          <table:table-cell office:value-type="float" office:value="19.132511">
            <text:p>19,132511</text:p>
          </table:table-cell>
          <table:table-cell office:value-type="float" office:value="1.61495">
            <text:p>1,61495</text:p>
          </table:table-cell>
          <table:table-cell office:value-type="percentage" office:value="0.50361997">
            <text:p>50,36%</text:p>
          </table:table-cell>
          <table:table-cell office:value-type="percentage" office:value="0.09661">
            <text:p>9,66%</text:p>
          </table:table-cell>
          <table:table-cell office:value-type="float" office:value="0.402">
            <text:p>0,40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D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49.76">
            <text:p>49,76</text:p>
          </table:table-cell>
          <table:table-cell office:value-type="float" office:value="130.94737">
            <text:p>130,94737</text:p>
          </table:table-cell>
          <table:table-cell office:value-type="float" office:value="0.22594">
            <text:p>0,22594</text:p>
          </table:table-cell>
          <table:table-cell office:value-type="percentage" office:value="0.22448999">
            <text:p>22,45%</text:p>
          </table:table-cell>
          <table:table-cell office:value-type="percentage" office:value="0.00896">
            <text:p>0,90%</text:p>
          </table:table-cell>
          <table:table-cell office:value-type="float" office:value="1.056">
            <text:p>1,056</text:p>
          </table:table-cell>
          <table:table-cell table:number-columns-repeated="1013"/>
        </table:table-row>
        <table:table-row table:style-name="ro2">
          <table:table-cell office:value-type="string">
            <text:p>ETN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01.51">
            <text:p>401,51</text:p>
          </table:table-cell>
          <table:table-cell office:value-type="float" office:value="39.20996">
            <text:p>39,20996</text:p>
          </table:table-cell>
          <table:table-cell office:value-type="float" office:value="1.10463">
            <text:p>1,10463</text:p>
          </table:table-cell>
          <table:table-cell office:value-type="percentage" office:value="0.22239">
            <text:p>22,24%</text:p>
          </table:table-cell>
          <table:table-cell office:value-type="percentage" office:value="0.20844999">
            <text:p>20,84%</text:p>
          </table:table-cell>
          <table:table-cell office:value-type="float" office:value="1.24">
            <text:p>1,2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BAY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07.69">
            <text:p>107,69</text:p>
          </table:table-cell>
          <table:table-cell office:value-type="float" office:value="24.87067">
            <text:p>24,87067</text:p>
          </table:table-cell>
          <table:table-cell office:value-type="float" office:value="1.63327">
            <text:p>1,63327</text:p>
          </table:table-cell>
          <table:table-cell office:value-type="percentage" office:value="0.24638">
            <text:p>24,64%</text:p>
          </table:table-cell>
          <table:table-cell office:value-type="percentage" office:value="0.42875">
            <text:p>42,88%</text:p>
          </table:table-cell>
          <table:table-cell office:value-type="float" office:value="1.385">
            <text:p>1,38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IX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68.95">
            <text:p>68,95</text:p>
          </table:table-cell>
          <table:table-cell office:value-type="float" office:value="7.494565">
            <text:p>7,494565</text:p>
          </table:table-cell>
          <table:table-cell office:value-type="float" office:value="2.26101">
            <text:p>2,26101</text:p>
          </table:table-cell>
          <table:table-cell office:value-type="percentage" office:value="0.4372">
            <text:p>43,72%</text:p>
          </table:table-cell>
          <table:table-cell office:value-type="percentage" office:value="0.18864">
            <text:p>18,86%</text:p>
          </table:table-cell>
          <table:table-cell office:value-type="float" office:value="0.675">
            <text:p>0,67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W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9.96">
            <text:p>79,96</text:p>
          </table:table-cell>
          <table:table-cell office:value-type="float" office:value="43.221622">
            <text:p>43,221622</text:p>
          </table:table-cell>
          <table:table-cell office:value-type="float" office:value="6.806">
            <text:p>6,806</text:p>
          </table:table-cell>
          <table:table-cell office:value-type="percentage" office:value="0.30199">
            <text:p>30,20%</text:p>
          </table:table-cell>
          <table:table-cell office:value-type="percentage" office:value="0.1046">
            <text:p>10,46%</text:p>
          </table:table-cell>
          <table:table-cell office:value-type="float" office:value="0.872">
            <text:p>0,87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TR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11.59">
            <text:p>111,59</text:p>
          </table:table-cell>
          <table:table-cell office:value-type="float" office:value="28.466835">
            <text:p>28,466835</text:p>
          </table:table-cell>
          <table:table-cell office:value-type="float" office:value="1.92883">
            <text:p>1,92883</text:p>
          </table:table-cell>
          <table:table-cell office:value-type="percentage" office:value="0.41319">
            <text:p>41,32%</text:p>
          </table:table-cell>
          <table:table-cell office:value-type="percentage" office:value="0.10751">
            <text:p>10,75%</text:p>
          </table:table-cell>
          <table:table-cell office:value-type="float" office:value="0.529">
            <text:p>0,52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FX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75.83">
            <text:p>175,83</text:p>
          </table:table-cell>
          <table:table-cell office:value-type="float" office:value="30.955988">
            <text:p>30,955988</text:p>
          </table:table-cell>
          <table:table-cell office:value-type="float" office:value="1.13353">
            <text:p>1,13353</text:p>
          </table:table-cell>
          <table:table-cell office:value-type="percentage" office:value="0.30708">
            <text:p>30,71%</text:p>
          </table:table-cell>
          <table:table-cell office:value-type="percentage" office:value="0.1437">
            <text:p>14,37%</text:p>
          </table:table-cell>
          <table:table-cell office:value-type="float" office:value="1.347">
            <text:p>1,3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QIX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072.08">
            <text:p>1072,08</text:p>
          </table:table-cell>
          <table:table-cell office:value-type="float" office:value="74.089836">
            <text:p>74,089836</text:p>
          </table:table-cell>
          <table:table-cell office:value-type="float" office:value="1.62961">
            <text:p>1,62961</text:p>
          </table:table-cell>
          <table:table-cell office:value-type="percentage" office:value="0.44951">
            <text:p>44,95%</text:p>
          </table:table-cell>
          <table:table-cell office:value-type="percentage" office:value="0.10059">
            <text:p>10,06%</text:p>
          </table:table-cell>
          <table:table-cell office:value-type="float" office:value="0.997">
            <text:p>0,99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RIE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15.9">
            <text:p>215,9</text:p>
          </table:table-cell>
          <table:table-cell office:value-type="float" office:value="19.77106">
            <text:p>19,77106</text:p>
          </table:table-cell>
          <table:table-cell office:value-type="float" office:value="2.108">
            <text:p>2,108</text:p>
          </table:table-cell>
          <table:table-cell office:value-type="percentage" office:value="0.2022">
            <text:p>20,22%</text:p>
          </table:table-cell>
          <table:table-cell office:value-type="percentage" office:value="0.2585">
            <text:p>25,85%</text:p>
          </table:table-cell>
          <table:table-cell office:value-type="float" office:value="0.32">
            <text:p>0,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SS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263.55">
            <text:p>263,55</text:p>
          </table:table-cell>
          <table:table-cell office:value-type="float" office:value="29.679052">
            <text:p>29,679052</text:p>
          </table:table-cell>
          <table:table-cell office:value-type="float" office:value="1.21856">
            <text:p>1,21856</text:p>
          </table:table-cell>
          <table:table-cell office:value-type="percentage" office:value="0.65033996">
            <text:p>65,03%</text:p>
          </table:table-cell>
          <table:table-cell office:value-type="percentage" office:value="0.105579995">
            <text:p>10,56%</text:p>
          </table:table-cell>
          <table:table-cell office:value-type="float" office:value="0.727">
            <text:p>0,72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G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51.52">
            <text:p>351,52</text:p>
          </table:table-cell>
          <table:table-cell office:value-type="float" office:value="7.157809">
            <text:p>7,157809</text:p>
          </table:table-cell>
          <table:table-cell office:value-type="float" office:value="0.23471">
            <text:p>0,23471</text:p>
          </table:table-cell>
          <table:table-cell office:value-type="percentage" office:value="0">
            <text:p>0,00%</text:p>
          </table:table-cell>
          <table:table-cell office:value-type="percentage" office:value="0.13822">
            <text:p>13,82%</text:p>
          </table:table-cell>
          <table:table-cell office:value-type="float" office:value="0.341">
            <text:p>0,341</text:p>
          </table:table-cell>
          <table:table-cell table:number-columns-repeated="1013"/>
        </table:table-row>
        <table:table-row table:style-name="ro2">
          <table:table-cell office:value-type="string">
            <text:p>EVRG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81.78">
            <text:p>81,78</text:p>
          </table:table-cell>
          <table:table-cell office:value-type="float" office:value="21.75">
            <text:p>21,75</text:p>
          </table:table-cell>
          <table:table-cell office:value-type="float" office:value="1.55555">
            <text:p>1,55555</text:p>
          </table:table-cell>
          <table:table-cell office:value-type="percentage" office:value="0.46195">
            <text:p>46,20%</text:p>
          </table:table-cell>
          <table:table-cell office:value-type="percentage" office:value="0.08866999">
            <text:p>8,87%</text:p>
          </table:table-cell>
          <table:table-cell/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XC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3.91">
            <text:p>43,91</text:p>
          </table:table-cell>
          <table:table-cell office:value-type="float" office:value="16.08425">
            <text:p>16,08425</text:p>
          </table:table-cell>
          <table:table-cell office:value-type="float" office:value="1.74794">
            <text:p>1,74794</text:p>
          </table:table-cell>
          <table:table-cell office:value-type="percentage" office:value="0.33280998">
            <text:p>33,28%</text:p>
          </table:table-cell>
          <table:table-cell office:value-type="percentage" office:value="0.09764">
            <text:p>9,76%</text:p>
          </table:table-cell>
          <table:table-cell office:value-type="float" office:value="0.416">
            <text:p>0,4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FIV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354.03">
            <text:p>354,03</text:p>
          </table:table-cell>
          <table:table-cell office:value-type="float" office:value="29.066502">
            <text:p>29,066502</text:p>
          </table:table-cell>
          <table:table-cell office:value-type="float" office:value="7.12">
            <text:p>7,12</text:p>
          </table:table-cell>
          <table:table-cell office:value-type="percentage" office:value="0.28006">
            <text:p>28,01%</text:p>
          </table:table-cell>
          <table:table-cell office:value-type="percentage" office:value="0.2034">
            <text:p>20,34%</text:p>
          </table:table-cell>
          <table:table-cell office:value-type="float" office:value="1.001">
            <text:p>1,0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RT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15.68">
            <text:p>115,68</text:p>
          </table:table-cell>
          <table:table-cell office:value-type="float" office:value="20.048527">
            <text:p>20,048527</text:p>
          </table:table-cell>
          <table:table-cell office:value-type="float" office:value="1.38432">
            <text:p>1,38432</text:p>
          </table:table-cell>
          <table:table-cell office:value-type="percentage" office:value="0.63687">
            <text:p>63,69%</text:p>
          </table:table-cell>
          <table:table-cell office:value-type="percentage" office:value="0.14783">
            <text:p>14,78%</text:p>
          </table:table-cell>
          <table:table-cell office:value-type="float" office:value="0.928">
            <text:p>0,92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IS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3.49">
            <text:p>43,49</text:p>
          </table:table-cell>
          <table:table-cell office:value-type="float" office:value="59.575344">
            <text:p>59,575344</text:p>
          </table:table-cell>
          <table:table-cell office:value-type="float" office:value="1.32328">
            <text:p>1,32328</text:p>
          </table:table-cell>
          <table:table-cell office:value-type="percentage" office:value="0.28916">
            <text:p>28,92%</text:p>
          </table:table-cell>
          <table:table-cell office:value-type="percentage" office:value="0.17225">
            <text:p>17,23%</text:p>
          </table:table-cell>
          <table:table-cell office:value-type="float" office:value="0.83">
            <text:p>0,8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SLR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219.95">
            <text:p>219,95</text:p>
          </table:table-cell>
          <table:table-cell office:value-type="float" office:value="14.208656">
            <text:p>14,208656</text:p>
          </table:table-cell>
          <table:table-cell office:value-type="float" office:value="5.943">
            <text:p>5,943</text:p>
          </table:table-cell>
          <table:table-cell office:value-type="percentage" office:value="0.41939">
            <text:p>41,94%</text:p>
          </table:table-cell>
          <table:table-cell office:value-type="percentage" office:value="0.18436001">
            <text:p>18,44%</text:p>
          </table:table-cell>
          <table:table-cell office:value-type="float" office:value="1.564">
            <text:p>1,56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RMN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40.09">
            <text:p>240,09</text:p>
          </table:table-cell>
          <table:table-cell office:value-type="float" office:value="26.79576">
            <text:p>26,79576</text:p>
          </table:table-cell>
          <table:table-cell office:value-type="float" office:value="2.331">
            <text:p>2,331</text:p>
          </table:table-cell>
          <table:table-cell office:value-type="percentage" office:value="0.29026">
            <text:p>29,03%</text:p>
          </table:table-cell>
          <table:table-cell office:value-type="percentage" office:value="0.19899">
            <text:p>19,90%</text:p>
          </table:table-cell>
          <table:table-cell office:value-type="float" office:value="0.956">
            <text:p>0,95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T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58.65">
            <text:p>158,65</text:p>
          </table:table-cell>
          <table:table-cell office:value-type="float" office:value="15.676877">
            <text:p>15,676877</text:p>
          </table:table-cell>
          <table:table-cell office:value-type="float" office:value="52.9341">
            <text:p>52,9341</text:p>
          </table:table-cell>
          <table:table-cell office:value-type="percentage" office:value="0.20650999">
            <text:p>20,65%</text:p>
          </table:table-cell>
          <table:table-cell office:value-type="percentage" office:value="0.94878">
            <text:p>94,88%</text:p>
          </table:table-cell>
          <table:table-cell office:value-type="float" office:value="0.909">
            <text:p>0,9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E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297.15">
            <text:p>297,15</text:p>
          </table:table-cell>
          <table:table-cell office:value-type="float" office:value="36.91304">
            <text:p>36,91304</text:p>
          </table:table-cell>
          <table:table-cell office:value-type="float" office:value="1.16527">
            <text:p>1,16527</text:p>
          </table:table-cell>
          <table:table-cell office:value-type="percentage" office:value="0.22845">
            <text:p>22,85%</text:p>
          </table:table-cell>
          <table:table-cell office:value-type="percentage" office:value="0.45428002">
            <text:p>45,43%</text:p>
          </table:table-cell>
          <table:table-cell office:value-type="float" office:value="1.352">
            <text:p>1,35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EHC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63.47">
            <text:p>63,47</text:p>
          </table:table-cell>
          <table:table-cell office:value-type="float" office:value="15.220624">
            <text:p>15,220624</text:p>
          </table:table-cell>
          <table:table-cell office:value-type="float" office:value="0.97055">
            <text:p>0,97055</text:p>
          </table:table-cell>
          <table:table-cell office:value-type="percentage" office:value="0.16788">
            <text:p>16,79%</text:p>
          </table:table-cell>
          <table:table-cell office:value-type="percentage" office:value="0.19462">
            <text:p>19,46%</text:p>
          </table:table-cell>
          <table:table-cell office:value-type="float" office:value="0.868">
            <text:p>0,868</text:p>
          </table:table-cell>
          <table:table-cell table:number-columns-repeated="1013"/>
        </table:table-row>
        <table:table-row table:style-name="ro2">
          <table:table-cell office:value-type="string">
            <text:p>GEV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WEAKENING</text:p>
          </table:table-cell>
          <table:table-cell office:value-type="float" office:value="1040.15">
            <text:p>1040,15</text:p>
          </table:table-cell>
          <table:table-cell office:value-type="float" office:value="30.395967">
            <text:p>30,395967</text:p>
          </table:table-cell>
          <table:table-cell office:value-type="float" office:value="0.24925">
            <text:p>0,24925</text:p>
          </table:table-cell>
          <table:table-cell office:value-type="percentage" office:value="0.08673">
            <text:p>8,67%</text:p>
          </table:table-cell>
          <table:table-cell office:value-type="percentage" office:value="0.75708">
            <text:p>75,71%</text:p>
          </table:table-cell>
          <table:table-cell office:value-type="float" office:value="1.313">
            <text:p>1,313</text:p>
          </table:table-cell>
          <table:table-cell table:number-columns-repeated="1013"/>
        </table:table-row>
        <table:table-row table:style-name="ro2">
          <table:table-cell office:value-type="string">
            <text:p>GEN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22.68">
            <text:p>22,68</text:p>
          </table:table-cell>
          <table:table-cell office:value-type="float" office:value="14.44586">
            <text:p>14,44586</text:p>
          </table:table-cell>
          <table:table-cell office:value-type="float" office:value="3.13903">
            <text:p>3,13903</text:p>
          </table:table-cell>
          <table:table-cell office:value-type="percentage" office:value="0.52959996">
            <text:p>52,96%</text:p>
          </table:table-cell>
          <table:table-cell office:value-type="percentage" office:value="0.39876997">
            <text:p>39,88%</text:p>
          </table:table-cell>
          <table:table-cell office:value-type="float" office:value="1.094">
            <text:p>1,0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DDY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91.02">
            <text:p>91,02</text:p>
          </table:table-cell>
          <table:table-cell office:value-type="float" office:value="14.424723">
            <text:p>14,424723</text:p>
          </table:table-cell>
          <table:table-cell office:value-type="float" office:value="16.21618">
            <text:p>16,21618</text:p>
          </table:table-cell>
          <table:table-cell office:value-type="percentage" office:value="0.2611">
            <text:p>26,11%</text:p>
          </table:table-cell>
          <table:table-cell office:value-type="percentage" office:value="3.98215">
            <text:p>398,22%</text:p>
          </table:table-cell>
          <table:table-cell office:value-type="float" office:value="0.915">
            <text:p>0,91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ON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213.12">
            <text:p>213,12</text:p>
          </table:table-cell>
          <table:table-cell office:value-type="float" office:value="33.99043">
            <text:p>33,99043</text:p>
          </table:table-cell>
          <table:table-cell office:value-type="float" office:value="2.57387">
            <text:p>2,57387</text:p>
          </table:table-cell>
          <table:table-cell office:value-type="percentage" office:value="0.22639">
            <text:p>22,64%</text:p>
          </table:table-cell>
          <table:table-cell office:value-type="percentage" office:value="0.24264">
            <text:p>24,26%</text:p>
          </table:table-cell>
          <table:table-cell office:value-type="float" office:value="0.811">
            <text:p>0,8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BM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29.76">
            <text:p>229,76</text:p>
          </table:table-cell>
          <table:table-cell office:value-type="float" office:value="20.332743">
            <text:p>20,332743</text:p>
          </table:table-cell>
          <table:table-cell office:value-type="float" office:value="2.11169">
            <text:p>2,11169</text:p>
          </table:table-cell>
          <table:table-cell office:value-type="percentage" office:value="0.24104999">
            <text:p>24,10%</text:p>
          </table:table-cell>
          <table:table-cell office:value-type="percentage" office:value="0.35772">
            <text:p>35,77%</text:p>
          </table:table-cell>
          <table:table-cell office:value-type="float" office:value="0.581">
            <text:p>0,5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TW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54.76">
            <text:p>254,76</text:p>
          </table:table-cell>
          <table:table-cell office:value-type="float" office:value="23.632652">
            <text:p>23,632652</text:p>
          </table:table-cell>
          <table:table-cell office:value-type="float" office:value="2.8322">
            <text:p>2,8322</text:p>
          </table:table-cell>
          <table:table-cell office:value-type="percentage" office:value="0.29147">
            <text:p>29,15%</text:p>
          </table:table-cell>
          <table:table-cell office:value-type="percentage" office:value="0.96848">
            <text:p>96,85%</text:p>
          </table:table-cell>
          <table:table-cell office:value-type="float" office:value="1.055">
            <text:p>1,0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R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5.75">
            <text:p>75,75</text:p>
          </table:table-cell>
          <table:table-cell office:value-type="float" office:value="51.18243">
            <text:p>51,18243</text:p>
          </table:table-cell>
          <table:table-cell office:value-type="float" office:value="0.48353">
            <text:p>0,48353</text:p>
          </table:table-cell>
          <table:table-cell office:value-type="percentage" office:value="0.25983">
            <text:p>25,98%</text:p>
          </table:table-cell>
          <table:table-cell office:value-type="percentage" office:value="0.057150003">
            <text:p>5,72%</text:p>
          </table:table-cell>
          <table:table-cell office:value-type="float" office:value="1.247">
            <text:p>1,247</text:p>
          </table:table-cell>
          <table:table-cell table:number-columns-repeated="1013"/>
        </table:table-row>
        <table:table-row table:style-name="ro2">
          <table:table-cell office:value-type="string">
            <text:p>ISRG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50.06">
            <text:p>450,06</text:p>
          </table:table-cell>
          <table:table-cell office:value-type="float" office:value="54.618935">
            <text:p>54,618935</text:p>
          </table:table-cell>
          <table:table-cell/>
          <table:table-cell office:value-type="percentage" office:value="0.36719">
            <text:p>36,72%</text:p>
          </table:table-cell>
          <table:table-cell office:value-type="percentage" office:value="0.17232999">
            <text:p>17,23%</text:p>
          </table:table-cell>
          <table:table-cell office:value-type="float" office:value="1.509">
            <text:p>1,5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KHY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45.84">
            <text:p>145,84</text:p>
          </table:table-cell>
          <table:table-cell office:value-type="float" office:value="20.368715">
            <text:p>20,368715</text:p>
          </table:table-cell>
          <table:table-cell office:value-type="float" office:value="6.398">
            <text:p>6,398</text:p>
          </table:table-cell>
          <table:table-cell office:value-type="percentage" office:value="0.28438">
            <text:p>28,44%</text:p>
          </table:table-cell>
          <table:table-cell office:value-type="percentage" office:value="0.24892001">
            <text:p>24,89%</text:p>
          </table:table-cell>
          <table:table-cell office:value-type="float" office:value="0.629">
            <text:p>0,62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CI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39.52">
            <text:p>139,52</text:p>
          </table:table-cell>
          <table:table-cell office:value-type="float" office:value="42.797546">
            <text:p>42,797546</text:p>
          </table:table-cell>
          <table:table-cell office:value-type="float" office:value="0.70317">
            <text:p>0,70317</text:p>
          </table:table-cell>
          <table:table-cell office:value-type="percentage" office:value="0.17681">
            <text:p>17,68%</text:p>
          </table:table-cell>
          <table:table-cell office:value-type="percentage" office:value="0.13449">
            <text:p>13,45%</text:p>
          </table:table-cell>
          <table:table-cell office:value-type="float" office:value="1.386">
            <text:p>1,386</text:p>
          </table:table-cell>
          <table:table-cell table:number-columns-repeated="1013"/>
        </table:table-row>
        <table:table-row table:style-name="ro2">
          <table:table-cell office:value-type="string">
            <text:p>KMB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98.31">
            <text:p>98,31</text:p>
          </table:table-cell>
          <table:table-cell office:value-type="float" office:value="19.015472">
            <text:p>19,015472</text:p>
          </table:table-cell>
          <table:table-cell office:value-type="float" office:value="3.71264">
            <text:p>3,71264</text:p>
          </table:table-cell>
          <table:table-cell office:value-type="percentage" office:value="0.2024">
            <text:p>20,24%</text:p>
          </table:table-cell>
          <table:table-cell office:value-type="percentage" office:value="1.11727">
            <text:p>111,73%</text:p>
          </table:table-cell>
          <table:table-cell office:value-type="float" office:value="0.31">
            <text:p>0,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LAC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WEAKENING</text:p>
          </table:table-cell>
          <table:table-cell office:value-type="float" office:value="1869.19">
            <text:p>1869,19</text:p>
          </table:table-cell>
          <table:table-cell office:value-type="float" office:value="52.90659">
            <text:p>52,90659</text:p>
          </table:table-cell>
          <table:table-cell office:value-type="float" office:value="1.054">
            <text:p>1,054</text:p>
          </table:table-cell>
          <table:table-cell office:value-type="percentage" office:value="0.44669998">
            <text:p>44,67%</text:p>
          </table:table-cell>
          <table:table-cell office:value-type="percentage" office:value="0.94975996">
            <text:p>94,98%</text:p>
          </table:table-cell>
          <table:table-cell office:value-type="float" office:value="1.501">
            <text:p>1,5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VS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53.11">
            <text:p>53,11</text:p>
          </table:table-cell>
          <table:table-cell office:value-type="float" office:value="19.597786">
            <text:p>19,597786</text:p>
          </table:table-cell>
          <table:table-cell office:value-type="float" office:value="9.81405">
            <text:p>9,81405</text:p>
          </table:table-cell>
          <table:table-cell office:value-type="percentage" office:value="0.35153">
            <text:p>35,15%</text:p>
          </table:table-cell>
          <table:table-cell office:value-type="percentage" office:value="0.90455">
            <text:p>90,46%</text:p>
          </table:table-cell>
          <table:table-cell office:value-type="float" office:value="0.842">
            <text:p>0,84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II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521.25">
            <text:p>521,25</text:p>
          </table:table-cell>
          <table:table-cell office:value-type="float" office:value="23.146091">
            <text:p>23,146091</text:p>
          </table:table-cell>
          <table:table-cell office:value-type="float" office:value="1.61043">
            <text:p>1,61043</text:p>
          </table:table-cell>
          <table:table-cell office:value-type="percentage" office:value="0.21945">
            <text:p>21,95%</text:p>
          </table:table-cell>
          <table:table-cell office:value-type="percentage" office:value="0.76791">
            <text:p>76,79%</text:p>
          </table:table-cell>
          <table:table-cell office:value-type="float" office:value="1.227">
            <text:p>1,22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LY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948.45">
            <text:p>948,45</text:p>
          </table:table-cell>
          <table:table-cell office:value-type="float" office:value="33.668797">
            <text:p>33,668797</text:p>
          </table:table-cell>
          <table:table-cell office:value-type="float" office:value="1.39015">
            <text:p>1,39015</text:p>
          </table:table-cell>
          <table:table-cell office:value-type="percentage" office:value="0.50125">
            <text:p>50,13%</text:p>
          </table:table-cell>
          <table:table-cell office:value-type="percentage" office:value="1.07459">
            <text:p>107,46%</text:p>
          </table:table-cell>
          <table:table-cell office:value-type="float" office:value="0.481">
            <text:p>0,4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ITE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WEAKENING</text:p>
          </table:table-cell>
          <table:table-cell office:value-type="float" office:value="903.8">
            <text:p>903,8</text:p>
          </table:table-cell>
          <table:table-cell office:value-type="float" office:value="158.84007">
            <text:p>158,84007</text:p>
          </table:table-cell>
          <table:table-cell office:value-type="float" office:value="1.11445">
            <text:p>1,11445</text:p>
          </table:table-cell>
          <table:table-cell office:value-type="percentage" office:value="0.20447001">
            <text:p>20,45%</text:p>
          </table:table-cell>
          <table:table-cell office:value-type="percentage" office:value="0.22834998">
            <text:p>22,83%</text:p>
          </table:table-cell>
          <table:table-cell office:value-type="float" office:value="1.533">
            <text:p>1,5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RSH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63.25">
            <text:p>163,25</text:p>
          </table:table-cell>
          <table:table-cell office:value-type="float" office:value="20.40625">
            <text:p>20,40625</text:p>
          </table:table-cell>
          <table:table-cell office:value-type="float" office:value="1.51634">
            <text:p>1,51634</text:p>
          </table:table-cell>
          <table:table-cell office:value-type="percentage" office:value="0.27736">
            <text:p>27,74%</text:p>
          </table:table-cell>
          <table:table-cell office:value-type="percentage" office:value="0.27571">
            <text:p>27,57%</text:p>
          </table:table-cell>
          <table:table-cell office:value-type="float" office:value="0.637">
            <text:p>0,6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A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95.48">
            <text:p>495,48</text:p>
          </table:table-cell>
          <table:table-cell office:value-type="float" office:value="28.657026">
            <text:p>28,657026</text:p>
          </table:table-cell>
          <table:table-cell office:value-type="float" office:value="2.82059">
            <text:p>2,82059</text:p>
          </table:table-cell>
          <table:table-cell office:value-type="percentage" office:value="0.62987">
            <text:p>62,99%</text:p>
          </table:table-cell>
          <table:table-cell office:value-type="percentage" office:value="2.32076">
            <text:p>232,08%</text:p>
          </table:table-cell>
          <table:table-cell office:value-type="float" office:value="0.759">
            <text:p>0,75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KC</text:p>
          </table:table-cell>
          <table:table-cell office:value-type="string">
            <text:p>Consumer Defensive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8.32">
            <text:p>48,32</text:p>
          </table:table-cell>
          <table:table-cell office:value-type="float" office:value="7.9213114">
            <text:p>7,9213114</text:p>
          </table:table-cell>
          <table:table-cell office:value-type="float" office:value="0.65158">
            <text:p>0,65158</text:p>
          </table:table-cell>
          <table:table-cell office:value-type="percentage" office:value="0.19094999">
            <text:p>19,09%</text:p>
          </table:table-cell>
          <table:table-cell office:value-type="percentage" office:value="0.25347">
            <text:p>25,35%</text:p>
          </table:table-cell>
          <table:table-cell office:value-type="float" office:value="0.67">
            <text:p>0,67</text:p>
          </table:table-cell>
          <table:table-cell table:number-columns-repeated="1013"/>
        </table:table-row>
        <table:table-row table:style-name="ro2">
          <table:table-cell office:value-type="string">
            <text:p>MRK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11.38">
            <text:p>111,38</text:p>
          </table:table-cell>
          <table:table-cell office:value-type="float" office:value="31.374647">
            <text:p>31,374647</text:p>
          </table:table-cell>
          <table:table-cell office:value-type="float" office:value="1.06936">
            <text:p>1,06936</text:p>
          </table:table-cell>
          <table:table-cell office:value-type="percentage" office:value="0.4488">
            <text:p>44,88%</text:p>
          </table:table-cell>
          <table:table-cell office:value-type="percentage" office:value="0.18944">
            <text:p>18,94%</text:p>
          </table:table-cell>
          <table:table-cell office:value-type="float" office:value="0.195">
            <text:p>0,1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NST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86.29">
            <text:p>86,29</text:p>
          </table:table-cell>
          <table:table-cell office:value-type="float" office:value="41.685993">
            <text:p>41,685993</text:p>
          </table:table-cell>
          <table:table-cell office:value-type="float" office:value="1.082">
            <text:p>1,082</text:p>
          </table:table-cell>
          <table:table-cell office:value-type="percentage" office:value="0.32096002">
            <text:p>32,10%</text:p>
          </table:table-cell>
          <table:table-cell office:value-type="percentage" office:value="0.26654">
            <text:p>26,65%</text:p>
          </table:table-cell>
          <table:table-cell office:value-type="float" office:value="0.501">
            <text:p>0,50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CO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51.32">
            <text:p>451,32</text:p>
          </table:table-cell>
          <table:table-cell office:value-type="float" office:value="32.352688">
            <text:p>32,352688</text:p>
          </table:table-cell>
          <table:table-cell office:value-type="float" office:value="2.35539">
            <text:p>2,35539</text:p>
          </table:table-cell>
          <table:table-cell office:value-type="percentage" office:value="0.48444">
            <text:p>48,44%</text:p>
          </table:table-cell>
          <table:table-cell office:value-type="percentage" office:value="0.71361">
            <text:p>71,36%</text:p>
          </table:table-cell>
          <table:table-cell office:value-type="float" office:value="1.37">
            <text:p>1,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SI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83.99">
            <text:p>383,99</text:p>
          </table:table-cell>
          <table:table-cell office:value-type="float" office:value="30.966936">
            <text:p>30,966936</text:p>
          </table:table-cell>
          <table:table-cell office:value-type="float" office:value="3.74132">
            <text:p>3,74132</text:p>
          </table:table-cell>
          <table:table-cell office:value-type="percentage" office:value="0.29441">
            <text:p>29,44%</text:p>
          </table:table-cell>
          <table:table-cell office:value-type="percentage" office:value="0.99289">
            <text:p>99,29%</text:p>
          </table:table-cell>
          <table:table-cell office:value-type="float" office:value="0.935">
            <text:p>0,9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TAP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18">
            <text:p>118</text:p>
          </table:table-cell>
          <table:table-cell office:value-type="float" office:value="19.798658">
            <text:p>19,798658</text:p>
          </table:table-cell>
          <table:table-cell office:value-type="float" office:value="2.36097">
            <text:p>2,36097</text:p>
          </table:table-cell>
          <table:table-cell office:value-type="percentage" office:value="0.26099002">
            <text:p>26,10%</text:p>
          </table:table-cell>
          <table:table-cell office:value-type="percentage" office:value="1.12587">
            <text:p>112,59%</text:p>
          </table:table-cell>
          <table:table-cell office:value-type="float" office:value="1.267">
            <text:p>1,26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EE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93.1">
            <text:p>93,1</text:p>
          </table:table-cell>
          <table:table-cell office:value-type="float" office:value="23.62944">
            <text:p>23,62944</text:p>
          </table:table-cell>
          <table:table-cell office:value-type="float" office:value="1.56686">
            <text:p>1,56686</text:p>
          </table:table-cell>
          <table:table-cell office:value-type="percentage" office:value="0.50811">
            <text:p>50,81%</text:p>
          </table:table-cell>
          <table:table-cell office:value-type="percentage" office:value="0.10325">
            <text:p>10,33%</text:p>
          </table:table-cell>
          <table:table-cell office:value-type="float" office:value="0.721">
            <text:p>0,7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I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6.72">
            <text:p>46,72</text:p>
          </table:table-cell>
          <table:table-cell office:value-type="float" office:value="23.243782">
            <text:p>23,243782</text:p>
          </table:table-cell>
          <table:table-cell office:value-type="float" office:value="1.40908">
            <text:p>1,40908</text:p>
          </table:table-cell>
          <table:table-cell office:value-type="percentage" office:value="0.43721">
            <text:p>43,72%</text:p>
          </table:table-cell>
          <table:table-cell office:value-type="percentage" office:value="0.091120005">
            <text:p>9,11%</text:p>
          </table:table-cell>
          <table:table-cell office:value-type="float" office:value="0.568">
            <text:p>0,5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SC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12.01">
            <text:p>312,01</text:p>
          </table:table-cell>
          <table:table-cell office:value-type="float" office:value="26.307758">
            <text:p>26,307758</text:p>
          </table:table-cell>
          <table:table-cell office:value-type="float" office:value="1.11586">
            <text:p>1,11586</text:p>
          </table:table-cell>
          <table:table-cell office:value-type="percentage" office:value="0.45851">
            <text:p>45,85%</text:p>
          </table:table-cell>
          <table:table-cell office:value-type="percentage" office:value="0.17615">
            <text:p>17,62%</text:p>
          </table:table-cell>
          <table:table-cell office:value-type="float" office:value="1.295">
            <text:p>1,2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VDA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WEAKENING</text:p>
          </table:table-cell>
          <table:table-cell office:value-type="float" office:value="215.2">
            <text:p>215,2</text:p>
          </table:table-cell>
          <table:table-cell office:value-type="float" office:value="43.828922">
            <text:p>43,828922</text:p>
          </table:table-cell>
          <table:table-cell office:value-type="float" office:value="7.255">
            <text:p>7,255</text:p>
          </table:table-cell>
          <table:table-cell office:value-type="percentage" office:value="0.61698">
            <text:p>61,70%</text:p>
          </table:table-cell>
          <table:table-cell office:value-type="percentage" office:value="1.01485">
            <text:p>101,49%</text:p>
          </table:table-cell>
          <table:table-cell office:value-type="float" office:value="2.244">
            <text:p>2,24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XPI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294.75">
            <text:p>294,75</text:p>
          </table:table-cell>
          <table:table-cell office:value-type="float" office:value="28.178776">
            <text:p>28,178776</text:p>
          </table:table-cell>
          <table:table-cell office:value-type="float" office:value="1.03991">
            <text:p>1,03991</text:p>
          </table:table-cell>
          <table:table-cell office:value-type="percentage" office:value="0.37955">
            <text:p>37,96%</text:p>
          </table:table-cell>
          <table:table-cell office:value-type="percentage" office:value="0.25812998">
            <text:p>25,81%</text:p>
          </table:table-cell>
          <table:table-cell office:value-type="float" office:value="1.776">
            <text:p>1,77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KE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85.16">
            <text:p>85,16</text:p>
          </table:table-cell>
          <table:table-cell office:value-type="float" office:value="15.180036">
            <text:p>15,180036</text:p>
          </table:table-cell>
          <table:table-cell office:value-type="float" office:value="1.49644">
            <text:p>1,49644</text:p>
          </table:table-cell>
          <table:table-cell office:value-type="percentage" office:value="0.21324">
            <text:p>21,32%</text:p>
          </table:table-cell>
          <table:table-cell office:value-type="percentage" office:value="0.15903">
            <text:p>15,90%</text:p>
          </table:table-cell>
          <table:table-cell office:value-type="float" office:value="0.762">
            <text:p>0,7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RCL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95.95">
            <text:p>195,95</text:p>
          </table:table-cell>
          <table:table-cell office:value-type="float" office:value="35.242805">
            <text:p>35,242805</text:p>
          </table:table-cell>
          <table:table-cell office:value-type="float" office:value="4.15265">
            <text:p>4,15265</text:p>
          </table:table-cell>
          <table:table-cell office:value-type="percentage" office:value="0.42826">
            <text:p>42,83%</text:p>
          </table:table-cell>
          <table:table-cell office:value-type="percentage" office:value="0.57572">
            <text:p>57,57%</text:p>
          </table:table-cell>
          <table:table-cell office:value-type="float" office:value="1.544">
            <text:p>1,54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CAR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14.31">
            <text:p>114,31</text:p>
          </table:table-cell>
          <table:table-cell office:value-type="float" office:value="24.321278">
            <text:p>24,321278</text:p>
          </table:table-cell>
          <table:table-cell office:value-type="float" office:value="0.76163">
            <text:p>0,76163</text:p>
          </table:table-cell>
          <table:table-cell office:value-type="percentage" office:value="0.11598">
            <text:p>11,60%</text:p>
          </table:table-cell>
          <table:table-cell office:value-type="percentage" office:value="0.13108">
            <text:p>13,11%</text:p>
          </table:table-cell>
          <table:table-cell office:value-type="float" office:value="1.03">
            <text:p>1,03</text:p>
          </table:table-cell>
          <table:table-cell table:number-columns-repeated="1013"/>
        </table:table-row>
        <table:table-row table:style-name="ro2">
          <table:table-cell office:value-type="string">
            <text:p>PLTR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37.8">
            <text:p>137,8</text:p>
          </table:table-cell>
          <table:table-cell office:value-type="float" office:value="153.11111">
            <text:p>153,11111</text:p>
          </table:table-cell>
          <table:table-cell office:value-type="float" office:value="2.477">
            <text:p>2,477</text:p>
          </table:table-cell>
          <table:table-cell office:value-type="percentage" office:value="0.38633">
            <text:p>38,63%</text:p>
          </table:table-cell>
          <table:table-cell office:value-type="percentage" office:value="0.32587">
            <text:p>32,59%</text:p>
          </table:table-cell>
          <table:table-cell office:value-type="float" office:value="1.521">
            <text:p>1,5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YPL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5.37">
            <text:p>45,37</text:p>
          </table:table-cell>
          <table:table-cell office:value-type="float" office:value="8.512195">
            <text:p>8,512195</text:p>
          </table:table-cell>
          <table:table-cell office:value-type="float" office:value="0.5828">
            <text:p>0,5828</text:p>
          </table:table-cell>
          <table:table-cell office:value-type="percentage" office:value="0.19482">
            <text:p>19,48%</text:p>
          </table:table-cell>
          <table:table-cell office:value-type="percentage" office:value="0.25120002">
            <text:p>25,12%</text:p>
          </table:table-cell>
          <table:table-cell office:value-type="float" office:value="1.395">
            <text:p>1,395</text:p>
          </table:table-cell>
          <table:table-cell table:number-columns-repeated="1013"/>
        </table:table-row>
        <table:table-row table:style-name="ro2">
          <table:table-cell office:value-type="string">
            <text:p>PCG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6.07">
            <text:p>16,07</text:p>
          </table:table-cell>
          <table:table-cell office:value-type="float" office:value="12.457364">
            <text:p>12,457364</text:p>
          </table:table-cell>
          <table:table-cell office:value-type="float" office:value="1.87872">
            <text:p>1,87872</text:p>
          </table:table-cell>
          <table:table-cell office:value-type="percentage" office:value="0.39922002">
            <text:p>39,92%</text:p>
          </table:table-cell>
          <table:table-cell office:value-type="percentage" office:value="0.08826999">
            <text:p>8,83%</text:p>
          </table:table-cell>
          <table:table-cell office:value-type="float" office:value="0.289">
            <text:p>0,28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NW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99.25">
            <text:p>99,25</text:p>
          </table:table-cell>
          <table:table-cell office:value-type="float" office:value="18.51679">
            <text:p>18,51679</text:p>
          </table:table-cell>
          <table:table-cell office:value-type="float" office:value="2.12957">
            <text:p>2,12957</text:p>
          </table:table-cell>
          <table:table-cell office:value-type="percentage" office:value="0.39101002">
            <text:p>39,10%</text:p>
          </table:table-cell>
          <table:table-cell office:value-type="percentage" office:value="0.09559">
            <text:p>9,56%</text:p>
          </table:table-cell>
          <table:table-cell office:value-type="float" office:value="0.455">
            <text:p>0,4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PG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09.61">
            <text:p>109,61</text:p>
          </table:table-cell>
          <table:table-cell office:value-type="float" office:value="15.703439">
            <text:p>15,703439</text:p>
          </table:table-cell>
          <table:table-cell office:value-type="float" office:value="0.93736">
            <text:p>0,93736</text:p>
          </table:table-cell>
          <table:table-cell office:value-type="percentage" office:value="0.16823">
            <text:p>16,82%</text:p>
          </table:table-cell>
          <table:table-cell office:value-type="percentage" office:value="0.20748">
            <text:p>20,75%</text:p>
          </table:table-cell>
          <table:table-cell office:value-type="float" office:value="1.053">
            <text:p>1,053</text:p>
          </table:table-cell>
          <table:table-cell table:number-columns-repeated="1013"/>
        </table:table-row>
        <table:table-row table:style-name="ro2">
          <table:table-cell office:value-type="string">
            <text:p>PPL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5.91">
            <text:p>35,91</text:p>
          </table:table-cell>
          <table:table-cell office:value-type="float" office:value="22.030674">
            <text:p>22,030674</text:p>
          </table:table-cell>
          <table:table-cell office:value-type="float" office:value="1.35116">
            <text:p>1,35116</text:p>
          </table:table-cell>
          <table:table-cell office:value-type="percentage" office:value="0.39218">
            <text:p>39,22%</text:p>
          </table:table-cell>
          <table:table-cell office:value-type="percentage" office:value="0.08316">
            <text:p>8,32%</text:p>
          </table:table-cell>
          <table:table-cell office:value-type="float" office:value="0.619">
            <text:p>0,61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EG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7.13">
            <text:p>77,13</text:p>
          </table:table-cell>
          <table:table-cell office:value-type="float" office:value="17.06416">
            <text:p>17,06416</text:p>
          </table:table-cell>
          <table:table-cell office:value-type="float" office:value="1.4101">
            <text:p>1,4101</text:p>
          </table:table-cell>
          <table:table-cell office:value-type="percentage" office:value="0.37479">
            <text:p>37,48%</text:p>
          </table:table-cell>
          <table:table-cell office:value-type="percentage" office:value="0.13441">
            <text:p>13,44%</text:p>
          </table:table-cell>
          <table:table-cell office:value-type="float" office:value="0.55">
            <text:p>0,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SA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11.04">
            <text:p>311,04</text:p>
          </table:table-cell>
          <table:table-cell office:value-type="float" office:value="32.165462">
            <text:p>32,165462</text:p>
          </table:table-cell>
          <table:table-cell office:value-type="float" office:value="1.07646">
            <text:p>1,07646</text:p>
          </table:table-cell>
          <table:table-cell office:value-type="percentage" office:value="0.70512">
            <text:p>70,51%</text:p>
          </table:table-cell>
          <table:table-cell office:value-type="percentage" office:value="0.20175">
            <text:p>20,18%</text:p>
          </table:table-cell>
          <table:table-cell office:value-type="float" office:value="0.981">
            <text:p>0,9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GX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87.39">
            <text:p>187,39</text:p>
          </table:table-cell>
          <table:table-cell office:value-type="float" office:value="20.706078">
            <text:p>20,706078</text:p>
          </table:table-cell>
          <table:table-cell office:value-type="float" office:value="0.82737">
            <text:p>0,82737</text:p>
          </table:table-cell>
          <table:table-cell office:value-type="percentage" office:value="0.19738">
            <text:p>19,74%</text:p>
          </table:table-cell>
          <table:table-cell office:value-type="percentage" office:value="0.14538999">
            <text:p>14,54%</text:p>
          </table:table-cell>
          <table:table-cell office:value-type="float" office:value="0.595">
            <text:p>0,595</text:p>
          </table:table-cell>
          <table:table-cell table:number-columns-repeated="1013"/>
        </table:table-row>
        <table:table-row table:style-name="ro2">
          <table:table-cell office:value-type="string">
            <text:p>RL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58.45">
            <text:p>358,45</text:p>
          </table:table-cell>
          <table:table-cell office:value-type="float" office:value="24.384356">
            <text:p>24,384356</text:p>
          </table:table-cell>
          <table:table-cell office:value-type="float" office:value="0.98972">
            <text:p>0,98972</text:p>
          </table:table-cell>
          <table:table-cell office:value-type="percentage" office:value="0.17455">
            <text:p>17,46%</text:p>
          </table:table-cell>
          <table:table-cell office:value-type="percentage" office:value="0.33846">
            <text:p>33,85%</text:p>
          </table:table-cell>
          <table:table-cell office:value-type="float" office:value="1.387">
            <text:p>1,387</text:p>
          </table:table-cell>
          <table:table-cell table:number-columns-repeated="1013"/>
        </table:table-row>
        <table:table-row table:style-name="ro2">
          <table:table-cell office:value-type="string">
            <text:p>RJF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54.33">
            <text:p>154,33</text:p>
          </table:table-cell>
          <table:table-cell office:value-type="float" office:value="14.573182">
            <text:p>14,573182</text:p>
          </table:table-cell>
          <table:table-cell office:value-type="float" office:value="0.48477">
            <text:p>0,48477</text:p>
          </table:table-cell>
          <table:table-cell office:value-type="percentage" office:value="0">
            <text:p>0,00%</text:p>
          </table:table-cell>
          <table:table-cell office:value-type="percentage" office:value="0.17289">
            <text:p>17,29%</text:p>
          </table:table-cell>
          <table:table-cell office:value-type="float" office:value="0.995">
            <text:p>0,995</text:p>
          </table:table-cell>
          <table:table-cell table:number-columns-repeated="1013"/>
        </table:table-row>
        <table:table-row table:style-name="ro2">
          <table:table-cell office:value-type="string">
            <text:p>RTX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76.09">
            <text:p>176,09</text:p>
          </table:table-cell>
          <table:table-cell office:value-type="float" office:value="32.975655">
            <text:p>32,975655</text:p>
          </table:table-cell>
          <table:table-cell office:value-type="float" office:value="0.57229">
            <text:p>0,57229</text:p>
          </table:table-cell>
          <table:table-cell office:value-type="percentage" office:value="0.16889">
            <text:p>16,89%</text:p>
          </table:table-cell>
          <table:table-cell office:value-type="percentage" office:value="0.11571">
            <text:p>11,57%</text:p>
          </table:table-cell>
          <table:table-cell office:value-type="float" office:value="0.301">
            <text:p>0,301</text:p>
          </table:table-cell>
          <table:table-cell table:number-columns-repeated="1013"/>
        </table:table-row>
        <table:table-row table:style-name="ro2">
          <table:table-cell office:value-type="string">
            <text:p>REGN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14.89">
            <text:p>714,89</text:p>
          </table:table-cell>
          <table:table-cell office:value-type="float" office:value="17.45337">
            <text:p>17,45337</text:p>
          </table:table-cell>
          <table:table-cell office:value-type="float" office:value="8.612">
            <text:p>8,612</text:p>
          </table:table-cell>
          <table:table-cell office:value-type="percentage" office:value="0.29376">
            <text:p>29,38%</text:p>
          </table:table-cell>
          <table:table-cell office:value-type="percentage" office:value="0.14548">
            <text:p>14,55%</text:p>
          </table:table-cell>
          <table:table-cell office:value-type="float" office:value="0.296">
            <text:p>0,29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SG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00.02">
            <text:p>200,02</text:p>
          </table:table-cell>
          <table:table-cell office:value-type="float" office:value="28.738506">
            <text:p>28,738506</text:p>
          </table:table-cell>
          <table:table-cell office:value-type="float" office:value="1.17578">
            <text:p>1,17578</text:p>
          </table:table-cell>
          <table:table-cell office:value-type="percentage" office:value="0.31117">
            <text:p>31,12%</text:p>
          </table:table-cell>
          <table:table-cell office:value-type="percentage" office:value="0.18346001">
            <text:p>18,35%</text:p>
          </table:table-cell>
          <table:table-cell office:value-type="float" office:value="0.438">
            <text:p>0,43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OK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453.89">
            <text:p>453,89</text:p>
          </table:table-cell>
          <table:table-cell office:value-type="float" office:value="47.181915">
            <text:p>47,181915</text:p>
          </table:table-cell>
          <table:table-cell office:value-type="float" office:value="1.13367">
            <text:p>1,13367</text:p>
          </table:table-cell>
          <table:table-cell office:value-type="percentage" office:value="0.22365">
            <text:p>22,37%</text:p>
          </table:table-cell>
          <table:table-cell office:value-type="percentage" office:value="0.27183">
            <text:p>27,18%</text:p>
          </table:table-cell>
          <table:table-cell office:value-type="float" office:value="1.557">
            <text:p>1,5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OST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25.81">
            <text:p>225,81</text:p>
          </table:table-cell>
          <table:table-cell office:value-type="float" office:value="34.11027">
            <text:p>34,11027</text:p>
          </table:table-cell>
          <table:table-cell office:value-type="float" office:value="0.84241">
            <text:p>0,84241</text:p>
          </table:table-cell>
          <table:table-cell office:value-type="percentage" office:value="0.14139">
            <text:p>14,14%</text:p>
          </table:table-cell>
          <table:table-cell office:value-type="percentage" office:value="0.36678">
            <text:p>36,68%</text:p>
          </table:table-cell>
          <table:table-cell office:value-type="float" office:value="0.875">
            <text:p>0,875</text:p>
          </table:table-cell>
          <table:table-cell table:number-columns-repeated="1013"/>
        </table:table-row>
        <table:table-row table:style-name="ro2">
          <table:table-cell office:value-type="string">
            <text:p>RCL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275.24">
            <text:p>275,24</text:p>
          </table:table-cell>
          <table:table-cell office:value-type="float" office:value="16.80342">
            <text:p>16,80342</text:p>
          </table:table-cell>
          <table:table-cell office:value-type="float" office:value="2.17312">
            <text:p>2,17312</text:p>
          </table:table-cell>
          <table:table-cell office:value-type="percentage" office:value="0.37535">
            <text:p>37,54%</text:p>
          </table:table-cell>
          <table:table-cell office:value-type="percentage" office:value="0.49576">
            <text:p>49,58%</text:p>
          </table:table-cell>
          <table:table-cell office:value-type="float" office:value="1.777">
            <text:p>1,7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NDK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562.34">
            <text:p>1562,34</text:p>
          </table:table-cell>
          <table:table-cell office:value-type="float" office:value="53.468174">
            <text:p>53,468174</text:p>
          </table:table-cell>
          <table:table-cell office:value-type="float" office:value="1.503">
            <text:p>1,503</text:p>
          </table:table-cell>
          <table:table-cell office:value-type="percentage" office:value="0.42718">
            <text:p>42,72%</text:p>
          </table:table-cell>
          <table:table-cell office:value-type="percentage" office:value="0.39297">
            <text:p>39,30%</text:p>
          </table:table-cell>
          <table:table-cell/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TX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782.64">
            <text:p>782,64</text:p>
          </table:table-cell>
          <table:table-cell office:value-type="float" office:value="74.043526">
            <text:p>74,043526</text:p>
          </table:table-cell>
          <table:table-cell office:value-type="float" office:value="3.81553">
            <text:p>3,81553</text:p>
          </table:table-cell>
          <table:table-cell office:value-type="percentage" office:value="0.31916">
            <text:p>31,92%</text:p>
          </table:table-cell>
          <table:table-cell office:value-type="percentage" office:value="17.8797">
            <text:p>1787,97%</text:p>
          </table:table-cell>
          <table:table-cell office:value-type="float" office:value="2.009">
            <text:p>2,0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PG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02.12">
            <text:p>202,12</text:p>
          </table:table-cell>
          <table:table-cell office:value-type="float" office:value="14.263938">
            <text:p>14,263938</text:p>
          </table:table-cell>
          <table:table-cell office:value-type="float" office:value="4.35463">
            <text:p>4,35463</text:p>
          </table:table-cell>
          <table:table-cell office:value-type="percentage" office:value="0.73903">
            <text:p>73,90%</text:p>
          </table:table-cell>
          <table:table-cell office:value-type="percentage" office:value="1.04109">
            <text:p>104,11%</text:p>
          </table:table-cell>
          <table:table-cell office:value-type="float" office:value="1.363">
            <text:p>1,36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O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91.8">
            <text:p>91,8</text:p>
          </table:table-cell>
          <table:table-cell office:value-type="float" office:value="23.478262">
            <text:p>23,478262</text:p>
          </table:table-cell>
          <table:table-cell office:value-type="float" office:value="1.90431">
            <text:p>1,90431</text:p>
          </table:table-cell>
          <table:table-cell office:value-type="percentage" office:value="0.46310002">
            <text:p>46,31%</text:p>
          </table:table-cell>
          <table:table-cell office:value-type="percentage" office:value="0.109910004">
            <text:p>10,99%</text:p>
          </table:table-cell>
          <table:table-cell office:value-type="float" office:value="0.357">
            <text:p>0,3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MUS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93.63">
            <text:p>193,63</text:p>
          </table:table-cell>
          <table:table-cell office:value-type="float" office:value="20.577047">
            <text:p>20,577047</text:p>
          </table:table-cell>
          <table:table-cell office:value-type="float" office:value="2.18569">
            <text:p>2,18569</text:p>
          </table:table-cell>
          <table:table-cell office:value-type="percentage" office:value="0.36800998">
            <text:p>36,80%</text:p>
          </table:table-cell>
          <table:table-cell office:value-type="percentage" office:value="0.18024999">
            <text:p>18,02%</text:p>
          </table:table-cell>
          <table:table-cell office:value-type="float" office:value="0.32">
            <text:p>0,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ROW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05.33">
            <text:p>105,33</text:p>
          </table:table-cell>
          <table:table-cell office:value-type="float" office:value="11.301503">
            <text:p>11,301503</text:p>
          </table:table-cell>
          <table:table-cell office:value-type="float" office:value="3.87">
            <text:p>3,87</text:p>
          </table:table-cell>
          <table:table-cell office:value-type="percentage" office:value="0.39533">
            <text:p>39,53%</text:p>
          </table:table-cell>
          <table:table-cell office:value-type="percentage" office:value="0.18688999">
            <text:p>18,69%</text:p>
          </table:table-cell>
          <table:table-cell office:value-type="float" office:value="1.532">
            <text:p>1,53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PR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33.48">
            <text:p>133,48</text:p>
          </table:table-cell>
          <table:table-cell office:value-type="float" office:value="40.69512">
            <text:p>40,69512</text:p>
          </table:table-cell>
          <table:table-cell office:value-type="float" office:value="5.74912">
            <text:p>5,74912</text:p>
          </table:table-cell>
          <table:table-cell office:value-type="percentage" office:value="0.25098">
            <text:p>25,10%</text:p>
          </table:table-cell>
          <table:table-cell office:value-type="percentage" office:value="0.60914004">
            <text:p>60,91%</text:p>
          </table:table-cell>
          <table:table-cell office:value-type="float" office:value="1.469">
            <text:p>1,46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RGP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48.12">
            <text:p>248,12</text:p>
          </table:table-cell>
          <table:table-cell office:value-type="float" office:value="25.318367">
            <text:p>25,318367</text:p>
          </table:table-cell>
          <table:table-cell office:value-type="float" office:value="5.85249">
            <text:p>5,85249</text:p>
          </table:table-cell>
          <table:table-cell office:value-type="percentage" office:value="0.31503">
            <text:p>31,50%</text:p>
          </table:table-cell>
          <table:table-cell office:value-type="percentage" office:value="0.74097997">
            <text:p>74,10%</text:p>
          </table:table-cell>
          <table:table-cell office:value-type="float" office:value="0.744">
            <text:p>0,74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ER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WEAKENING</text:p>
          </table:table-cell>
          <table:table-cell office:value-type="float" office:value="359.77">
            <text:p>359,77</text:p>
          </table:table-cell>
          <table:table-cell office:value-type="float" office:value="66.62407">
            <text:p>66,62407</text:p>
          </table:table-cell>
          <table:table-cell office:value-type="float" office:value="2.621">
            <text:p>2,621</text:p>
          </table:table-cell>
          <table:table-cell office:value-type="percentage" office:value="0.30671">
            <text:p>30,67%</text:p>
          </table:table-cell>
          <table:table-cell office:value-type="percentage" office:value="0.2875">
            <text:p>28,75%</text:p>
          </table:table-cell>
          <table:table-cell office:value-type="float" office:value="1.793">
            <text:p>1,7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PL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394.2">
            <text:p>394,2</text:p>
          </table:table-cell>
          <table:table-cell office:value-type="float" office:value="54.074078">
            <text:p>54,074078</text:p>
          </table:table-cell>
          <table:table-cell office:value-type="float" office:value="1.173">
            <text:p>1,173</text:p>
          </table:table-cell>
          <table:table-cell office:value-type="percentage" office:value="0.82268">
            <text:p>82,27%</text:p>
          </table:table-cell>
          <table:table-cell office:value-type="percentage" office:value="0.36466">
            <text:p>36,47%</text:p>
          </table:table-cell>
          <table:table-cell office:value-type="float" office:value="0.677">
            <text:p>0,6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T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466.17">
            <text:p>466,17</text:p>
          </table:table-cell>
          <table:table-cell office:value-type="float" office:value="35.585495">
            <text:p>35,585495</text:p>
          </table:table-cell>
          <table:table-cell office:value-type="float" office:value="0.53597">
            <text:p>0,53597</text:p>
          </table:table-cell>
          <table:table-cell office:value-type="percentage" office:value="0.19597">
            <text:p>19,60%</text:p>
          </table:table-cell>
          <table:table-cell office:value-type="percentage" office:value="0.36630002">
            <text:p>36,63%</text:p>
          </table:table-cell>
          <table:table-cell office:value-type="float" office:value="1.257">
            <text:p>1,257</text:p>
          </table:table-cell>
          <table:table-cell table:number-columns-repeated="1013"/>
        </table:table-row>
        <table:table-row table:style-name="ro2">
          <table:table-cell office:value-type="string">
            <text:p>UDR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36.91">
            <text:p>36,91</text:p>
          </table:table-cell>
          <table:table-cell office:value-type="float" office:value="25.108843">
            <text:p>25,108843</text:p>
          </table:table-cell>
          <table:table-cell office:value-type="float" office:value="1.42368">
            <text:p>1,42368</text:p>
          </table:table-cell>
          <table:table-cell office:value-type="percentage" office:value="0.59189">
            <text:p>59,19%</text:p>
          </table:table-cell>
          <table:table-cell office:value-type="percentage" office:value="0.123500004">
            <text:p>12,35%</text:p>
          </table:table-cell>
          <table:table-cell office:value-type="float" office:value="0.717">
            <text:p>0,71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LTA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521.58">
            <text:p>521,58</text:p>
          </table:table-cell>
          <table:table-cell office:value-type="float" office:value="20.32658">
            <text:p>20,32658</text:p>
          </table:table-cell>
          <table:table-cell office:value-type="float" office:value="0.77835">
            <text:p>0,77835</text:p>
          </table:table-cell>
          <table:table-cell office:value-type="percentage" office:value="0.14795">
            <text:p>14,80%</text:p>
          </table:table-cell>
          <table:table-cell office:value-type="percentage" office:value="0.43595">
            <text:p>43,60%</text:p>
          </table:table-cell>
          <table:table-cell office:value-type="float" office:value="0.891">
            <text:p>0,891</text:p>
          </table:table-cell>
          <table:table-cell table:number-columns-repeated="1013"/>
        </table:table-row>
        <table:table-row table:style-name="ro2">
          <table:table-cell office:value-type="string">
            <text:p>UNP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64.65">
            <text:p>264,65</text:p>
          </table:table-cell>
          <table:table-cell office:value-type="float" office:value="21.781893">
            <text:p>21,781893</text:p>
          </table:table-cell>
          <table:table-cell office:value-type="float" office:value="1.62246">
            <text:p>1,62246</text:p>
          </table:table-cell>
          <table:table-cell office:value-type="percentage" office:value="0.50955003">
            <text:p>50,96%</text:p>
          </table:table-cell>
          <table:table-cell office:value-type="percentage" office:value="0.40686">
            <text:p>40,69%</text:p>
          </table:table-cell>
          <table:table-cell office:value-type="float" office:value="0.994">
            <text:p>0,9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RI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WEAKENING</text:p>
          </table:table-cell>
          <table:table-cell office:value-type="float" office:value="937">
            <text:p>937</text:p>
          </table:table-cell>
          <table:table-cell office:value-type="float" office:value="23.92137">
            <text:p>23,92137</text:p>
          </table:table-cell>
          <table:table-cell office:value-type="float" office:value="1.67473">
            <text:p>1,67473</text:p>
          </table:table-cell>
          <table:table-cell office:value-type="percentage" office:value="0.27785">
            <text:p>27,79%</text:p>
          </table:table-cell>
          <table:table-cell office:value-type="percentage" office:value="0.28237">
            <text:p>28,24%</text:p>
          </table:table-cell>
          <table:table-cell office:value-type="float" office:value="1.831">
            <text:p>1,83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HS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69.96">
            <text:p>169,96</text:p>
          </table:table-cell>
          <table:table-cell office:value-type="float" office:value="7.096451">
            <text:p>7,096451</text:p>
          </table:table-cell>
          <table:table-cell office:value-type="float" office:value="0.67405">
            <text:p>0,67405</text:p>
          </table:table-cell>
          <table:table-cell office:value-type="percentage" office:value="0.15022">
            <text:p>15,02%</text:p>
          </table:table-cell>
          <table:table-cell office:value-type="percentage" office:value="0.21369">
            <text:p>21,37%</text:p>
          </table:table-cell>
          <table:table-cell office:value-type="float" office:value="1.13">
            <text:p>1,13</text:p>
          </table:table-cell>
          <table:table-cell table:number-columns-repeated="1013"/>
        </table:table-row>
        <table:table-row table:style-name="ro2">
          <table:table-cell office:value-type="string">
            <text:p>VEEV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166.34">
            <text:p>166,34</text:p>
          </table:table-cell>
          <table:table-cell office:value-type="float" office:value="30.577206">
            <text:p>30,577206</text:p>
          </table:table-cell>
          <table:table-cell office:value-type="float" office:value="1.329">
            <text:p>1,329</text:p>
          </table:table-cell>
          <table:table-cell office:value-type="percentage" office:value="0.30825">
            <text:p>30,83%</text:p>
          </table:table-cell>
          <table:table-cell office:value-type="percentage" office:value="0.13933">
            <text:p>13,93%</text:p>
          </table:table-cell>
          <table:table-cell office:value-type="float" office:value="0.924">
            <text:p>0,92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Z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IMPROVING</text:p>
          </table:table-cell>
          <table:table-cell office:value-type="float" office:value="47.22">
            <text:p>47,22</text:p>
          </table:table-cell>
          <table:table-cell office:value-type="float" office:value="11.517074">
            <text:p>11,517074</text:p>
          </table:table-cell>
          <table:table-cell office:value-type="float" office:value="1.92045">
            <text:p>1,92045</text:p>
          </table:table-cell>
          <table:table-cell office:value-type="percentage" office:value="0.36725">
            <text:p>36,73%</text:p>
          </table:table-cell>
          <table:table-cell office:value-type="percentage" office:value="0.17198">
            <text:p>17,20%</text:p>
          </table:table-cell>
          <table:table-cell office:value-type="float" office:value="0.224">
            <text:p>0,22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ST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47.72">
            <text:p>147,72</text:p>
          </table:table-cell>
          <table:table-cell office:value-type="float" office:value="24.702341">
            <text:p>24,702341</text:p>
          </table:table-cell>
          <table:table-cell office:value-type="float" office:value="3.55187">
            <text:p>3,55187</text:p>
          </table:table-cell>
          <table:table-cell office:value-type="percentage" office:value="0.34919">
            <text:p>34,92%</text:p>
          </table:table-cell>
          <table:table-cell office:value-type="percentage" office:value="0.42898">
            <text:p>42,90%</text:p>
          </table:table-cell>
          <table:table-cell office:value-type="float" office:value="1.447">
            <text:p>1,4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WW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5">
            <text:p>5</text:p>
          </table:table-cell>
          <table:table-cell table:style-name="ce2" office:value-type="string">
            <text:p>LEADING</text:p>
          </table:table-cell>
          <table:table-cell office:value-type="float" office:value="1233.71">
            <text:p>1233,71</text:p>
          </table:table-cell>
          <table:table-cell office:value-type="float" office:value="33.22677">
            <text:p>33,22677</text:p>
          </table:table-cell>
          <table:table-cell office:value-type="float" office:value="0.64034">
            <text:p>0,64034</text:p>
          </table:table-cell>
          <table:table-cell office:value-type="percentage" office:value="0.16785999">
            <text:p>16,79%</text:p>
          </table:table-cell>
          <table:table-cell office:value-type="percentage" office:value="0.46129">
            <text:p>46,13%</text:p>
          </table:table-cell>
          <table:table-cell office:value-type="float" office:value="1.042">
            <text:p>1,042</text:p>
          </table:table-cell>
          <table:table-cell table:number-columns-repeated="1013"/>
        </table:table-row>
        <table:table-row table:style-name="ro2">
          <table:table-cell office:value-type="string">
            <text:p>WM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215.37">
            <text:p>215,37</text:p>
          </table:table-cell>
          <table:table-cell office:value-type="float" office:value="31.167873">
            <text:p>31,167873</text:p>
          </table:table-cell>
          <table:table-cell office:value-type="float" office:value="2.28408">
            <text:p>2,28408</text:p>
          </table:table-cell>
          <table:table-cell office:value-type="percentage" office:value="0.3015">
            <text:p>30,15%</text:p>
          </table:table-cell>
          <table:table-cell office:value-type="percentage" office:value="0.29936">
            <text:p>29,94%</text:p>
          </table:table-cell>
          <table:table-cell office:value-type="float" office:value="0.495">
            <text:p>0,49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EC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111.66">
            <text:p>111,66</text:p>
          </table:table-cell>
          <table:table-cell office:value-type="float" office:value="22.376755">
            <text:p>22,376755</text:p>
          </table:table-cell>
          <table:table-cell office:value-type="float" office:value="1.53184">
            <text:p>1,53184</text:p>
          </table:table-cell>
          <table:table-cell office:value-type="percentage" office:value="0.38994">
            <text:p>38,99%</text:p>
          </table:table-cell>
          <table:table-cell office:value-type="percentage" office:value="0.11679">
            <text:p>11,68%</text:p>
          </table:table-cell>
          <table:table-cell office:value-type="float" office:value="0.493">
            <text:p>0,4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MB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1.96">
            <text:p>71,96</text:p>
          </table:table-cell>
          <table:table-cell office:value-type="float" office:value="31.561403">
            <text:p>31,561403</text:p>
          </table:table-cell>
          <table:table-cell office:value-type="float" office:value="1.99855">
            <text:p>1,99855</text:p>
          </table:table-cell>
          <table:table-cell office:value-type="percentage" office:value="0.5633">
            <text:p>56,33%</text:p>
          </table:table-cell>
          <table:table-cell office:value-type="percentage" office:value="0.19656">
            <text:p>19,66%</text:p>
          </table:table-cell>
          <table:table-cell office:value-type="float" office:value="0.633">
            <text:p>0,6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XEL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79.39">
            <text:p>79,39</text:p>
          </table:table-cell>
          <table:table-cell office:value-type="float" office:value="22.878962">
            <text:p>22,878962</text:p>
          </table:table-cell>
          <table:table-cell office:value-type="float" office:value="1.64845">
            <text:p>1,64845</text:p>
          </table:table-cell>
          <table:table-cell office:value-type="percentage" office:value="0.4099">
            <text:p>40,99%</text:p>
          </table:table-cell>
          <table:table-cell office:value-type="percentage" office:value="0.0959">
            <text:p>9,59%</text:p>
          </table:table-cell>
          <table:table-cell office:value-type="float" office:value="0.421">
            <text:p>0,4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ZTS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5">
            <text:p>5</text:p>
          </table:table-cell>
          <table:table-cell table:style-name="ce2" office:value-type="string">
            <text:p>LAGGING</text:p>
          </table:table-cell>
          <table:table-cell office:value-type="float" office:value="82.83">
            <text:p>82,83</text:p>
          </table:table-cell>
          <table:table-cell office:value-type="float" office:value="13.578689">
            <text:p>13,578689</text:p>
          </table:table-cell>
          <table:table-cell office:value-type="float" office:value="2.86236">
            <text:p>2,86236</text:p>
          </table:table-cell>
          <table:table-cell office:value-type="percentage" office:value="0.42745">
            <text:p>42,75%</text:p>
          </table:table-cell>
          <table:table-cell office:value-type="percentage" office:value="0.67748">
            <text:p>67,75%</text:p>
          </table:table-cell>
          <table:table-cell office:value-type="float" office:value="0.863">
            <text:p>0,86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D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EADING</text:p>
          </table:table-cell>
          <table:table-cell office:value-type="float" office:value="455.19">
            <text:p>455,19</text:p>
          </table:table-cell>
          <table:table-cell office:value-type="float" office:value="151.73">
            <text:p>151,73</text:p>
          </table:table-cell>
          <table:table-cell office:value-type="float" office:value="6.005">
            <text:p>6,005</text:p>
          </table:table-cell>
          <table:table-cell office:value-type="percentage" office:value="0.19838">
            <text:p>19,84%</text:p>
          </table:table-cell>
          <table:table-cell office:value-type="percentage" office:value="0.08063">
            <text:p>8,06%</text:p>
          </table:table-cell>
          <table:table-cell office:value-type="float" office:value="2.399">
            <text:p>2,39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MP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465.56">
            <text:p>465,56</text:p>
          </table:table-cell>
          <table:table-cell office:value-type="float" office:value="11.601295">
            <text:p>11,601295</text:p>
          </table:table-cell>
          <table:table-cell office:value-type="float" office:value="0.56246">
            <text:p>0,56246</text:p>
          </table:table-cell>
          <table:table-cell office:value-type="percentage" office:value="0">
            <text:p>0,00%</text:p>
          </table:table-cell>
          <table:table-cell office:value-type="percentage" office:value="0.66936">
            <text:p>66,94%</text:p>
          </table:table-cell>
          <table:table-cell office:value-type="float" office:value="1.201">
            <text:p>1,201</text:p>
          </table:table-cell>
          <table:table-cell table:number-columns-repeated="1013"/>
        </table:table-row>
        <table:table-row table:style-name="ro2">
          <table:table-cell office:value-type="string">
            <text:p>AIZ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239.67">
            <text:p>239,67</text:p>
          </table:table-cell>
          <table:table-cell office:value-type="float" office:value="12.28447">
            <text:p>12,28447</text:p>
          </table:table-cell>
          <table:table-cell office:value-type="float" office:value="0.3761">
            <text:p>0,3761</text:p>
          </table:table-cell>
          <table:table-cell office:value-type="percentage" office:value="0.12453">
            <text:p>12,45%</text:p>
          </table:table-cell>
          <table:table-cell office:value-type="percentage" office:value="0.18016">
            <text:p>18,02%</text:p>
          </table:table-cell>
          <table:table-cell office:value-type="float" office:value="0.556">
            <text:p>0,556</text:p>
          </table:table-cell>
          <table:table-cell table:number-columns-repeated="1013"/>
        </table:table-row>
        <table:table-row table:style-name="ro2">
          <table:table-cell office:value-type="string">
            <text:p>BDX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149.43">
            <text:p>149,43</text:p>
          </table:table-cell>
          <table:table-cell office:value-type="float" office:value="26.124126">
            <text:p>26,124126</text:p>
          </table:table-cell>
          <table:table-cell office:value-type="float" office:value="0.71599">
            <text:p>0,71599</text:p>
          </table:table-cell>
          <table:table-cell office:value-type="percentage" office:value="0.27701">
            <text:p>27,70%</text:p>
          </table:table-cell>
          <table:table-cell office:value-type="percentage" office:value="0.06672">
            <text:p>6,67%</text:p>
          </table:table-cell>
          <table:table-cell office:value-type="float" office:value="0.285">
            <text:p>0,285</text:p>
          </table:table-cell>
          <table:table-cell table:number-columns-repeated="1013"/>
        </table:table-row>
        <table:table-row table:style-name="ro2">
          <table:table-cell office:value-type="string">
            <text:p>BX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123.77">
            <text:p>123,77</text:p>
          </table:table-cell>
          <table:table-cell office:value-type="float" office:value="31.735895">
            <text:p>31,735895</text:p>
          </table:table-cell>
          <table:table-cell office:value-type="float" office:value="0.72022">
            <text:p>0,72022</text:p>
          </table:table-cell>
          <table:table-cell office:value-type="percentage" office:value="0">
            <text:p>0,00%</text:p>
          </table:table-cell>
          <table:table-cell office:value-type="percentage" office:value="0.29533002">
            <text:p>29,53%</text:p>
          </table:table-cell>
          <table:table-cell office:value-type="float" office:value="1.634">
            <text:p>1,634</text:p>
          </table:table-cell>
          <table:table-cell table:number-columns-repeated="1013"/>
        </table:table-row>
        <table:table-row table:style-name="ro2">
          <table:table-cell office:value-type="string">
            <text:p>SCHW</text:p>
          </table:table-cell>
          <table:table-cell office:value-type="string">
            <text:p>Financial Service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88.61">
            <text:p>88,61</text:p>
          </table:table-cell>
          <table:table-cell office:value-type="float" office:value="17.616302">
            <text:p>17,616302</text:p>
          </table:table-cell>
          <table:table-cell office:value-type="float" office:value="0.67073">
            <text:p>0,67073</text:p>
          </table:table-cell>
          <table:table-cell office:value-type="percentage" office:value="0">
            <text:p>0,00%</text:p>
          </table:table-cell>
          <table:table-cell office:value-type="percentage" office:value="0.1909">
            <text:p>19,09%</text:p>
          </table:table-cell>
          <table:table-cell office:value-type="float" office:value="0.797">
            <text:p>0,797</text:p>
          </table:table-cell>
          <table:table-cell table:number-columns-repeated="1013"/>
        </table:table-row>
        <table:table-row table:style-name="ro2">
          <table:table-cell office:value-type="string">
            <text:p>CMG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32.49">
            <text:p>32,49</text:p>
          </table:table-cell>
          <table:table-cell office:value-type="float" office:value="29.80734">
            <text:p>29,80734</text:p>
          </table:table-cell>
          <table:table-cell office:value-type="float" office:value="2.17885">
            <text:p>2,17885</text:p>
          </table:table-cell>
          <table:table-cell office:value-type="percentage" office:value="0.18981001">
            <text:p>18,98%</text:p>
          </table:table-cell>
          <table:table-cell office:value-type="percentage" office:value="0.49231997">
            <text:p>49,23%</text:p>
          </table:table-cell>
          <table:table-cell office:value-type="float" office:value="1.03">
            <text:p>1,0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LX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92.16">
            <text:p>92,16</text:p>
          </table:table-cell>
          <table:table-cell office:value-type="float" office:value="14.985366">
            <text:p>14,985366</text:p>
          </table:table-cell>
          <table:table-cell office:value-type="float" office:value="48.76087">
            <text:p>48,76087</text:p>
          </table:table-cell>
          <table:table-cell office:value-type="percentage" office:value="0.18846">
            <text:p>18,85%</text:p>
          </table:table-cell>
          <table:table-cell office:value-type="percentage" office:value="5.46099">
            <text:p>546,10%</text:p>
          </table:table-cell>
          <table:table-cell office:value-type="float" office:value="0.575">
            <text:p>0,57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TSH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51.68">
            <text:p>51,68</text:p>
          </table:table-cell>
          <table:table-cell office:value-type="float" office:value="11.210412">
            <text:p>11,210412</text:p>
          </table:table-cell>
          <table:table-cell office:value-type="float" office:value="7.247">
            <text:p>7,247</text:p>
          </table:table-cell>
          <table:table-cell office:value-type="percentage" office:value="0.18177">
            <text:p>18,18%</text:p>
          </table:table-cell>
          <table:table-cell office:value-type="percentage" office:value="0.14876">
            <text:p>14,88%</text:p>
          </table:table-cell>
          <table:table-cell office:value-type="float" office:value="0.803">
            <text:p>0,80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OHR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WEAKENING</text:p>
          </table:table-cell>
          <table:table-cell office:value-type="float" office:value="335.26">
            <text:p>335,26</text:p>
          </table:table-cell>
          <table:table-cell office:value-type="float" office:value="158.891">
            <text:p>158,891</text:p>
          </table:table-cell>
          <table:table-cell office:value-type="float" office:value="0.31093">
            <text:p>0,31093</text:p>
          </table:table-cell>
          <table:table-cell office:value-type="percentage" office:value="0.19899">
            <text:p>19,90%</text:p>
          </table:table-cell>
          <table:table-cell office:value-type="percentage" office:value="0.04718">
            <text:p>4,72%</text:p>
          </table:table-cell>
          <table:table-cell office:value-type="float" office:value="2.053">
            <text:p>2,053</text:p>
          </table:table-cell>
          <table:table-cell table:number-columns-repeated="1013"/>
        </table:table-row>
        <table:table-row table:style-name="ro2">
          <table:table-cell office:value-type="string">
            <text:p>DRI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196.23">
            <text:p>196,23</text:p>
          </table:table-cell>
          <table:table-cell office:value-type="float" office:value="20.655788">
            <text:p>20,655788</text:p>
          </table:table-cell>
          <table:table-cell office:value-type="float" office:value="3.87681">
            <text:p>3,87681</text:p>
          </table:table-cell>
          <table:table-cell office:value-type="percentage" office:value="0.15737">
            <text:p>15,74%</text:p>
          </table:table-cell>
          <table:table-cell office:value-type="percentage" office:value="0.51539004">
            <text:p>51,54%</text:p>
          </table:table-cell>
          <table:table-cell office:value-type="float" office:value="0.594">
            <text:p>0,5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E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574.84">
            <text:p>574,84</text:p>
          </table:table-cell>
          <table:table-cell office:value-type="float" office:value="32.4585">
            <text:p>32,4585</text:p>
          </table:table-cell>
          <table:table-cell office:value-type="float" office:value="3.76022">
            <text:p>3,76022</text:p>
          </table:table-cell>
          <table:table-cell office:value-type="percentage" office:value="0.18378">
            <text:p>18,38%</text:p>
          </table:table-cell>
          <table:table-cell office:value-type="percentage" office:value="0.19566">
            <text:p>19,57%</text:p>
          </table:table-cell>
          <table:table-cell office:value-type="float" office:value="0.969">
            <text:p>0,96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ME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LEADING</text:p>
          </table:table-cell>
          <table:table-cell office:value-type="float" office:value="921.64">
            <text:p>921,64</text:p>
          </table:table-cell>
          <table:table-cell office:value-type="float" office:value="30.958683">
            <text:p>30,958683</text:p>
          </table:table-cell>
          <table:table-cell office:value-type="float" office:value="0.13355">
            <text:p>0,13355</text:p>
          </table:table-cell>
          <table:table-cell office:value-type="percentage" office:value="0.10429">
            <text:p>10,43%</text:p>
          </table:table-cell>
          <table:table-cell office:value-type="percentage" office:value="0.39229">
            <text:p>39,23%</text:p>
          </table:table-cell>
          <table:table-cell office:value-type="float" office:value="1.169">
            <text:p>1,169</text:p>
          </table:table-cell>
          <table:table-cell table:number-columns-repeated="1013"/>
        </table:table-row>
        <table:table-row table:style-name="ro2">
          <table:table-cell office:value-type="string">
            <text:p>EXPE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229.98">
            <text:p>229,98</text:p>
          </table:table-cell>
          <table:table-cell office:value-type="float" office:value="20.298323">
            <text:p>20,298323</text:p>
          </table:table-cell>
          <table:table-cell office:value-type="float" office:value="2.56536">
            <text:p>2,56536</text:p>
          </table:table-cell>
          <table:table-cell office:value-type="percentage" office:value="0.17118">
            <text:p>17,12%</text:p>
          </table:table-cell>
          <table:table-cell office:value-type="percentage" office:value="0.71494">
            <text:p>71,49%</text:p>
          </table:table-cell>
          <table:table-cell office:value-type="float" office:value="1.3">
            <text:p>1,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XPD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156.69">
            <text:p>156,69</text:p>
          </table:table-cell>
          <table:table-cell office:value-type="float" office:value="25.31341">
            <text:p>25,31341</text:p>
          </table:table-cell>
          <table:table-cell office:value-type="float" office:value="0.24708">
            <text:p>0,24708</text:p>
          </table:table-cell>
          <table:table-cell office:value-type="percentage" office:value="0.1017">
            <text:p>10,17%</text:p>
          </table:table-cell>
          <table:table-cell office:value-type="percentage" office:value="0.36641">
            <text:p>36,64%</text:p>
          </table:table-cell>
          <table:table-cell office:value-type="float" office:value="1.033">
            <text:p>1,033</text:p>
          </table:table-cell>
          <table:table-cell table:number-columns-repeated="1013"/>
        </table:table-row>
        <table:table-row table:style-name="ro2">
          <table:table-cell office:value-type="string">
            <text:p>XOM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144.57">
            <text:p>144,57</text:p>
          </table:table-cell>
          <table:table-cell office:value-type="float" office:value="24.338385">
            <text:p>24,338385</text:p>
          </table:table-cell>
          <table:table-cell office:value-type="float" office:value="0.18261">
            <text:p>0,18261</text:p>
          </table:table-cell>
          <table:table-cell office:value-type="percentage" office:value="0.1718">
            <text:p>17,18%</text:p>
          </table:table-cell>
          <table:table-cell office:value-type="percentage" office:value="0.09873">
            <text:p>9,87%</text:p>
          </table:table-cell>
          <table:table-cell office:value-type="float" office:value="0.183">
            <text:p>0,183</text:p>
          </table:table-cell>
          <table:table-cell table:number-columns-repeated="1013"/>
        </table:table-row>
        <table:table-row table:style-name="ro2">
          <table:table-cell office:value-type="string">
            <text:p>GIS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34.68">
            <text:p>34,68</text:p>
          </table:table-cell>
          <table:table-cell office:value-type="float" office:value="8.479218">
            <text:p>8,479218</text:p>
          </table:table-cell>
          <table:table-cell office:value-type="float" office:value="2.17629">
            <text:p>2,17629</text:p>
          </table:table-cell>
          <table:table-cell office:value-type="percentage" office:value="0.18061">
            <text:p>18,06%</text:p>
          </table:table-cell>
          <table:table-cell office:value-type="percentage" office:value="0.23591">
            <text:p>23,59%</text:p>
          </table:table-cell>
          <table:table-cell office:value-type="float" office:value="-0.034">
            <text:p>-0,03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PN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69.19">
            <text:p>69,19</text:p>
          </table:table-cell>
          <table:table-cell office:value-type="float" office:value="28.709543">
            <text:p>28,709543</text:p>
          </table:table-cell>
          <table:table-cell office:value-type="float" office:value="0.95593">
            <text:p>0,95593</text:p>
          </table:table-cell>
          <table:table-cell office:value-type="percentage" office:value="0.4427">
            <text:p>44,27%</text:p>
          </table:table-cell>
          <table:table-cell office:value-type="percentage" office:value="0.02935">
            <text:p>2,94%</text:p>
          </table:table-cell>
          <table:table-cell office:value-type="float" office:value="0.757">
            <text:p>0,757</text:p>
          </table:table-cell>
          <table:table-cell table:number-columns-repeated="1013"/>
        </table:table-row>
        <table:table-row table:style-name="ro2">
          <table:table-cell office:value-type="string">
            <text:p>HSY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185.94">
            <text:p>185,94</text:p>
          </table:table-cell>
          <table:table-cell office:value-type="float" office:value="34.625698">
            <text:p>34,625698</text:p>
          </table:table-cell>
          <table:table-cell office:value-type="float" office:value="1.20011">
            <text:p>1,20011</text:p>
          </table:table-cell>
          <table:table-cell office:value-type="percentage" office:value="0.18853001">
            <text:p>18,85%</text:p>
          </table:table-cell>
          <table:table-cell office:value-type="percentage" office:value="0.23234">
            <text:p>23,23%</text:p>
          </table:table-cell>
          <table:table-cell office:value-type="float" office:value="0.066">
            <text:p>0,0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D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317.45">
            <text:p>317,45</text:p>
          </table:table-cell>
          <table:table-cell office:value-type="float" office:value="22.324192">
            <text:p>22,324192</text:p>
          </table:table-cell>
          <table:table-cell office:value-type="float" office:value="5.14392">
            <text:p>5,14392</text:p>
          </table:table-cell>
          <table:table-cell office:value-type="percentage" office:value="0.15187">
            <text:p>15,19%</text:p>
          </table:table-cell>
          <table:table-cell office:value-type="percentage" office:value="1.45541">
            <text:p>145,54%</text:p>
          </table:table-cell>
          <table:table-cell office:value-type="float" office:value="0.999">
            <text:p>0,99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FF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EADING</text:p>
          </table:table-cell>
          <table:table-cell office:value-type="float" office:value="81.05">
            <text:p>81,05</text:p>
          </table:table-cell>
          <table:table-cell office:value-type="float" office:value="25.09288">
            <text:p>25,09288</text:p>
          </table:table-cell>
          <table:table-cell office:value-type="float" office:value="0.45467">
            <text:p>0,45467</text:p>
          </table:table-cell>
          <table:table-cell office:value-type="percentage" office:value="0.17417999">
            <text:p>17,42%</text:p>
          </table:table-cell>
          <table:table-cell office:value-type="percentage" office:value="0.060510002">
            <text:p>6,05%</text:p>
          </table:table-cell>
          <table:table-cell office:value-type="float" office:value="0.943">
            <text:p>0,943</text:p>
          </table:table-cell>
          <table:table-cell table:number-columns-repeated="1013"/>
        </table:table-row>
        <table:table-row table:style-name="ro2">
          <table:table-cell office:value-type="string">
            <text:p>IQV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178.71">
            <text:p>178,71</text:p>
          </table:table-cell>
          <table:table-cell office:value-type="float" office:value="22.227613">
            <text:p>22,227613</text:p>
          </table:table-cell>
          <table:table-cell office:value-type="float" office:value="2.55426">
            <text:p>2,55426</text:p>
          </table:table-cell>
          <table:table-cell office:value-type="percentage" office:value="0.18044001">
            <text:p>18,04%</text:p>
          </table:table-cell>
          <table:table-cell office:value-type="percentage" office:value="0.22490999">
            <text:p>22,49%</text:p>
          </table:table-cell>
          <table:table-cell office:value-type="float" office:value="1.179">
            <text:p>1,17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BHT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WEAKENING</text:p>
          </table:table-cell>
          <table:table-cell office:value-type="float" office:value="245.4">
            <text:p>245,4</text:p>
          </table:table-cell>
          <table:table-cell office:value-type="float" office:value="38.164852">
            <text:p>38,164852</text:p>
          </table:table-cell>
          <table:table-cell office:value-type="float" office:value="0.43622">
            <text:p>0,43622</text:p>
          </table:table-cell>
          <table:table-cell office:value-type="percentage" office:value="0.13253">
            <text:p>13,25%</text:p>
          </table:table-cell>
          <table:table-cell office:value-type="percentage" office:value="0.16676001">
            <text:p>16,68%</text:p>
          </table:table-cell>
          <table:table-cell office:value-type="float" office:value="1.286">
            <text:p>1,286</text:p>
          </table:table-cell>
          <table:table-cell table:number-columns-repeated="1013"/>
        </table:table-row>
        <table:table-row table:style-name="ro2">
          <table:table-cell office:value-type="string">
            <text:p>LHX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299.64">
            <text:p>299,64</text:p>
          </table:table-cell>
          <table:table-cell office:value-type="float" office:value="32.56957">
            <text:p>32,56957</text:p>
          </table:table-cell>
          <table:table-cell office:value-type="float" office:value="0.34574">
            <text:p>0,34574</text:p>
          </table:table-cell>
          <table:table-cell office:value-type="percentage" office:value="0.16693">
            <text:p>16,69%</text:p>
          </table:table-cell>
          <table:table-cell/>
          <table:table-cell office:value-type="float" office:value="0.746">
            <text:p>0,746</text:p>
          </table:table-cell>
          <table:table-cell table:number-columns-repeated="1013"/>
        </table:table-row>
        <table:table-row table:style-name="ro2">
          <table:table-cell office:value-type="string">
            <text:p>LDOS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130.11">
            <text:p>130,11</text:p>
          </table:table-cell>
          <table:table-cell office:value-type="float" office:value="11.903934">
            <text:p>11,903934</text:p>
          </table:table-cell>
          <table:table-cell office:value-type="float" office:value="1.37125">
            <text:p>1,37125</text:p>
          </table:table-cell>
          <table:table-cell office:value-type="percentage" office:value="0.13873">
            <text:p>13,87%</text:p>
          </table:table-cell>
          <table:table-cell office:value-type="percentage" office:value="0.30579">
            <text:p>30,58%</text:p>
          </table:table-cell>
          <table:table-cell office:value-type="float" office:value="0.57">
            <text:p>0,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AS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WEAKENING</text:p>
          </table:table-cell>
          <table:table-cell office:value-type="float" office:value="71.74">
            <text:p>71,74</text:p>
          </table:table-cell>
          <table:table-cell office:value-type="float" office:value="17.757425">
            <text:p>17,757425</text:p>
          </table:table-cell>
          <table:table-cell office:value-type="float" office:value="122.2963">
            <text:p>122,2963</text:p>
          </table:table-cell>
          <table:table-cell office:value-type="percentage" office:value="0.18857001">
            <text:p>18,86%</text:p>
          </table:table-cell>
          <table:table-cell office:value-type="percentage" office:value="84.57143">
            <text:p>8457,14%</text:p>
          </table:table-cell>
          <table:table-cell office:value-type="float" office:value="1.338">
            <text:p>1,33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CHP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EADING</text:p>
          </table:table-cell>
          <table:table-cell office:value-type="float" office:value="99.09">
            <text:p>99,09</text:p>
          </table:table-cell>
          <table:table-cell office:value-type="float" office:value="450.4091">
            <text:p>450,4091</text:p>
          </table:table-cell>
          <table:table-cell office:value-type="float" office:value="0.85449">
            <text:p>0,85449</text:p>
          </table:table-cell>
          <table:table-cell office:value-type="percentage" office:value="0.26292">
            <text:p>26,29%</text:p>
          </table:table-cell>
          <table:table-cell office:value-type="percentage" office:value="0.03405">
            <text:p>3,41%</text:p>
          </table:table-cell>
          <table:table-cell office:value-type="float" office:value="1.737">
            <text:p>1,737</text:p>
          </table:table-cell>
          <table:table-cell table:number-columns-repeated="1013"/>
        </table:table-row>
        <table:table-row table:style-name="ro2">
          <table:table-cell office:value-type="string">
            <text:p>MOS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22.19">
            <text:p>22,19</text:p>
          </table:table-cell>
          <table:table-cell office:value-type="float" office:value="13.052941">
            <text:p>13,052941</text:p>
          </table:table-cell>
          <table:table-cell office:value-type="float" office:value="0.43154">
            <text:p>0,43154</text:p>
          </table:table-cell>
          <table:table-cell office:value-type="percentage" office:value="0.18737">
            <text:p>18,74%</text:p>
          </table:table-cell>
          <table:table-cell office:value-type="percentage" office:value="0.048249997">
            <text:p>4,82%</text:p>
          </table:table-cell>
          <table:table-cell office:value-type="float" office:value="0.797">
            <text:p>0,797</text:p>
          </table:table-cell>
          <table:table-cell table:number-columns-repeated="1013"/>
        </table:table-row>
        <table:table-row table:style-name="ro2">
          <table:table-cell office:value-type="string">
            <text:p>NOC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549.52">
            <text:p>549,52</text:p>
          </table:table-cell>
          <table:table-cell office:value-type="float" office:value="17.210148">
            <text:p>17,210148</text:p>
          </table:table-cell>
          <table:table-cell office:value-type="float" office:value="1.02682">
            <text:p>1,02682</text:p>
          </table:table-cell>
          <table:table-cell office:value-type="percentage" office:value="0.17247">
            <text:p>17,25%</text:p>
          </table:table-cell>
          <table:table-cell office:value-type="percentage" office:value="0.28511998">
            <text:p>28,51%</text:p>
          </table:table-cell>
          <table:table-cell office:value-type="float" office:value="-0.113">
            <text:p>-0,11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UE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WEAKENING</text:p>
          </table:table-cell>
          <table:table-cell office:value-type="float" office:value="227.5">
            <text:p>227,5</text:p>
          </table:table-cell>
          <table:table-cell office:value-type="float" office:value="22.569445">
            <text:p>22,569445</text:p>
          </table:table-cell>
          <table:table-cell office:value-type="float" office:value="0.31595">
            <text:p>0,31595</text:p>
          </table:table-cell>
          <table:table-cell office:value-type="percentage" office:value="0.14502">
            <text:p>14,50%</text:p>
          </table:table-cell>
          <table:table-cell office:value-type="percentage" office:value="0.12285">
            <text:p>12,29%</text:p>
          </table:table-cell>
          <table:table-cell office:value-type="float" office:value="1.884">
            <text:p>1,884</text:p>
          </table:table-cell>
          <table:table-cell table:number-columns-repeated="1013"/>
        </table:table-row>
        <table:table-row table:style-name="ro2">
          <table:table-cell office:value-type="string">
            <text:p>PANW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EADING</text:p>
          </table:table-cell>
          <table:table-cell office:value-type="float" office:value="207.88">
            <text:p>207,88</text:p>
          </table:table-cell>
          <table:table-cell office:value-type="float" office:value="114.85084">
            <text:p>114,85084</text:p>
          </table:table-cell>
          <table:table-cell office:value-type="float" office:value="4.887">
            <text:p>4,887</text:p>
          </table:table-cell>
          <table:table-cell office:value-type="percentage" office:value="0.15529999">
            <text:p>15,53%</text:p>
          </table:table-cell>
          <table:table-cell office:value-type="percentage" office:value="0.16259001">
            <text:p>16,26%</text:p>
          </table:table-cell>
          <table:table-cell office:value-type="float" office:value="0.77">
            <text:p>0,7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EP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154.62">
            <text:p>154,62</text:p>
          </table:table-cell>
          <table:table-cell office:value-type="float" office:value="24.273155">
            <text:p>24,273155</text:p>
          </table:table-cell>
          <table:table-cell office:value-type="float" office:value="2.44837">
            <text:p>2,44837</text:p>
          </table:table-cell>
          <table:table-cell office:value-type="percentage" office:value="0.19587">
            <text:p>19,59%</text:p>
          </table:table-cell>
          <table:table-cell office:value-type="percentage" office:value="0.43879002">
            <text:p>43,88%</text:p>
          </table:table-cell>
          <table:table-cell office:value-type="float" office:value="0.394">
            <text:p>0,3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HW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316.82">
            <text:p>316,82</text:p>
          </table:table-cell>
          <table:table-cell office:value-type="float" office:value="30.404991">
            <text:p>30,404991</text:p>
          </table:table-cell>
          <table:table-cell office:value-type="float" office:value="3.29521">
            <text:p>3,29521</text:p>
          </table:table-cell>
          <table:table-cell office:value-type="percentage" office:value="0.1904">
            <text:p>19,04%</text:p>
          </table:table-cell>
          <table:table-cell office:value-type="percentage" office:value="0.60723">
            <text:p>60,72%</text:p>
          </table:table-cell>
          <table:table-cell office:value-type="float" office:value="1.155">
            <text:p>1,1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OLV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EADING</text:p>
          </table:table-cell>
          <table:table-cell office:value-type="float" office:value="73.38">
            <text:p>73,38</text:p>
          </table:table-cell>
          <table:table-cell office:value-type="float" office:value="8.98164">
            <text:p>8,98164</text:p>
          </table:table-cell>
          <table:table-cell office:value-type="float" office:value="1.0646">
            <text:p>1,0646</text:p>
          </table:table-cell>
          <table:table-cell office:value-type="percentage" office:value="0.13604">
            <text:p>13,60%</text:p>
          </table:table-cell>
          <table:table-cell office:value-type="percentage" office:value="0.34794998">
            <text:p>34,79%</text:p>
          </table:table-cell>
          <table:table-cell office:value-type="float" office:value="0.655">
            <text:p>0,6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TLD</text:p>
          </table:table-cell>
          <table:table-cell office:value-type="string">
            <text:p>Basic Materials</text:p>
          </table:table-cell>
          <table:table-cell table:style-name="ce1" office:value-type="string">
            <text:p>SI (Quality)</text:p>
          </table:table-cell>
          <table:table-cell office:value-type="float" office:value="4.5">
            <text:p>4,5</text:p>
          </table:table-cell>
          <table:table-cell table:style-name="ce2" office:value-type="string">
            <text:p>WEAKENING</text:p>
          </table:table-cell>
          <table:table-cell office:value-type="float" office:value="235.1">
            <text:p>235,1</text:p>
          </table:table-cell>
          <table:table-cell office:value-type="float" office:value="25.198286">
            <text:p>25,198286</text:p>
          </table:table-cell>
          <table:table-cell office:value-type="float" office:value="0.45994">
            <text:p>0,45994</text:p>
          </table:table-cell>
          <table:table-cell office:value-type="percentage" office:value="0.121800005">
            <text:p>12,18%</text:p>
          </table:table-cell>
          <table:table-cell office:value-type="percentage" office:value="0.15247">
            <text:p>15,25%</text:p>
          </table:table-cell>
          <table:table-cell office:value-type="float" office:value="1.493">
            <text:p>1,493</text:p>
          </table:table-cell>
          <table:table-cell table:number-columns-repeated="1013"/>
        </table:table-row>
        <table:table-row table:style-name="ro2">
          <table:table-cell office:value-type="string">
            <text:p>TSLA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EADING</text:p>
          </table:table-cell>
          <table:table-cell office:value-type="float" office:value="428.35">
            <text:p>428,35</text:p>
          </table:table-cell>
          <table:table-cell office:value-type="float" office:value="400.3271">
            <text:p>400,3271</text:p>
          </table:table-cell>
          <table:table-cell office:value-type="float" office:value="0.18738">
            <text:p>0,18738</text:p>
          </table:table-cell>
          <table:table-cell office:value-type="percentage" office:value="0.11334">
            <text:p>11,33%</text:p>
          </table:table-cell>
          <table:table-cell office:value-type="percentage" office:value="0.04901">
            <text:p>4,90%</text:p>
          </table:table-cell>
          <table:table-cell office:value-type="float" office:value="1.793">
            <text:p>1,793</text:p>
          </table:table-cell>
          <table:table-cell table:number-columns-repeated="1013"/>
        </table:table-row>
        <table:table-row table:style-name="ro2">
          <table:table-cell office:value-type="string">
            <text:p>TJX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153.36">
            <text:p>153,36</text:p>
          </table:table-cell>
          <table:table-cell office:value-type="float" office:value="31.42623">
            <text:p>31,42623</text:p>
          </table:table-cell>
          <table:table-cell office:value-type="float" office:value="1.32375">
            <text:p>1,32375</text:p>
          </table:table-cell>
          <table:table-cell office:value-type="percentage" office:value="0.13955">
            <text:p>13,96%</text:p>
          </table:table-cell>
          <table:table-cell office:value-type="percentage" office:value="0.59129">
            <text:p>59,13%</text:p>
          </table:table-cell>
          <table:table-cell office:value-type="float" office:value="0.637">
            <text:p>0,63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KO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186.79">
            <text:p>186,79</text:p>
          </table:table-cell>
          <table:table-cell office:value-type="float" office:value="69.43866">
            <text:p>69,43866</text:p>
          </table:table-cell>
          <table:table-cell office:value-type="float" office:value="0.58229">
            <text:p>0,58229</text:p>
          </table:table-cell>
          <table:table-cell office:value-type="percentage" office:value="0.28448">
            <text:p>28,45%</text:p>
          </table:table-cell>
          <table:table-cell office:value-type="percentage" office:value="0.06736">
            <text:p>6,74%</text:p>
          </table:table-cell>
          <table:table-cell office:value-type="float" office:value="0.599">
            <text:p>0,599</text:p>
          </table:table-cell>
          <table:table-cell table:number-columns-repeated="1013"/>
        </table:table-row>
        <table:table-row table:style-name="ro2">
          <table:table-cell office:value-type="string">
            <text:p>TYL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LAGGING</text:p>
          </table:table-cell>
          <table:table-cell office:value-type="float" office:value="324.58">
            <text:p>324,58</text:p>
          </table:table-cell>
          <table:table-cell office:value-type="float" office:value="44.83149">
            <text:p>44,83149</text:p>
          </table:table-cell>
          <table:table-cell office:value-type="float" office:value="1.348">
            <text:p>1,348</text:p>
          </table:table-cell>
          <table:table-cell office:value-type="percentage" office:value="0.18895">
            <text:p>18,90%</text:p>
          </table:table-cell>
          <table:table-cell office:value-type="percentage" office:value="0.08930001">
            <text:p>8,93%</text:p>
          </table:table-cell>
          <table:table-cell office:value-type="float" office:value="0.864">
            <text:p>0,86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TR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87.26">
            <text:p>87,26</text:p>
          </table:table-cell>
          <table:table-cell office:value-type="float" office:value="158.65454">
            <text:p>158,65454</text:p>
          </table:table-cell>
          <table:table-cell office:value-type="float" office:value="0.93736">
            <text:p>0,93736</text:p>
          </table:table-cell>
          <table:table-cell office:value-type="percentage" office:value="0.37435">
            <text:p>37,44%</text:p>
          </table:table-cell>
          <table:table-cell office:value-type="percentage" office:value="0.0214">
            <text:p>2,14%</text:p>
          </table:table-cell>
          <table:table-cell office:value-type="float" office:value="0.763">
            <text:p>0,763</text:p>
          </table:table-cell>
          <table:table-cell table:number-columns-repeated="1013"/>
        </table:table-row>
        <table:table-row table:style-name="ro2">
          <table:table-cell office:value-type="string">
            <text:p>WDAY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.5">
            <text:p>4,5</text:p>
          </table:table-cell>
          <table:table-cell table:style-name="ce2" office:value-type="string">
            <text:p>IMPROVING</text:p>
          </table:table-cell>
          <table:table-cell office:value-type="float" office:value="127.83">
            <text:p>127,83</text:p>
          </table:table-cell>
          <table:table-cell office:value-type="float" office:value="49.355213">
            <text:p>49,355213</text:p>
          </table:table-cell>
          <table:table-cell office:value-type="float" office:value="0.48956">
            <text:p>0,48956</text:p>
          </table:table-cell>
          <table:table-cell office:value-type="percentage" office:value="0.14353">
            <text:p>14,35%</text:p>
          </table:table-cell>
          <table:table-cell office:value-type="percentage" office:value="0.08231">
            <text:p>8,23%</text:p>
          </table:table-cell>
          <table:table-cell office:value-type="float" office:value="1.035">
            <text:p>1,035</text:p>
          </table:table-cell>
          <table:table-cell table:number-columns-repeated="1013"/>
        </table:table-row>
        <table:table-row table:style-name="ro2">
          <table:table-cell office:value-type="string">
            <text:p>MO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68.12">
            <text:p>68,12</text:p>
          </table:table-cell>
          <table:table-cell office:value-type="float" office:value="14.221295">
            <text:p>14,221295</text:p>
          </table:table-cell>
          <table:table-cell/>
          <table:table-cell office:value-type="percentage" office:value="0.77476">
            <text:p>77,48%</text:p>
          </table:table-cell>
          <table:table-cell/>
          <table:table-cell office:value-type="float" office:value="0.519">
            <text:p>0,51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XP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316.03">
            <text:p>316,03</text:p>
          </table:table-cell>
          <table:table-cell office:value-type="float" office:value="19.727215">
            <text:p>19,727215</text:p>
          </table:table-cell>
          <table:table-cell office:value-type="float" office:value="1.77847">
            <text:p>1,77847</text:p>
          </table:table-cell>
          <table:table-cell office:value-type="percentage" office:value="0">
            <text:p>0,00%</text:p>
          </table:table-cell>
          <table:table-cell office:value-type="percentage" office:value="0.34419">
            <text:p>34,42%</text:p>
          </table:table-cell>
          <table:table-cell office:value-type="float" office:value="1.084">
            <text:p>1,08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DM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77.66">
            <text:p>77,66</text:p>
          </table:table-cell>
          <table:table-cell office:value-type="float" office:value="34.669643">
            <text:p>34,669643</text:p>
          </table:table-cell>
          <table:table-cell office:value-type="float" office:value="0.46128">
            <text:p>0,46128</text:p>
          </table:table-cell>
          <table:table-cell office:value-type="percentage" office:value="0.03151">
            <text:p>3,15%</text:p>
          </table:table-cell>
          <table:table-cell office:value-type="percentage" office:value="0.047659997">
            <text:p>4,77%</text:p>
          </table:table-cell>
          <table:table-cell office:value-type="float" office:value="0.578">
            <text:p>0,578</text:p>
          </table:table-cell>
          <table:table-cell table:number-columns-repeated="1013"/>
        </table:table-row>
        <table:table-row table:style-name="ro2">
          <table:table-cell office:value-type="string">
            <text:p>AZO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3496.19">
            <text:p>3496,19</text:p>
          </table:table-cell>
          <table:table-cell office:value-type="float" office:value="24.510586">
            <text:p>24,510586</text:p>
          </table:table-cell>
          <table:table-cell/>
          <table:table-cell office:value-type="percentage" office:value="0.21371001">
            <text:p>21,37%</text:p>
          </table:table-cell>
          <table:table-cell/>
          <table:table-cell office:value-type="float" office:value="0.436">
            <text:p>0,4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AC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51.31">
            <text:p>51,31</text:p>
          </table:table-cell>
          <table:table-cell office:value-type="float" office:value="12.73201">
            <text:p>12,73201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0644">
            <text:p>10,64%</text:p>
          </table:table-cell>
          <table:table-cell office:value-type="float" office:value="1.221">
            <text:p>1,2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XYZ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WEAKENING</text:p>
          </table:table-cell>
          <table:table-cell office:value-type="float" office:value="74.85">
            <text:p>74,85</text:p>
          </table:table-cell>
          <table:table-cell office:value-type="float" office:value="58.476562">
            <text:p>58,476562</text:p>
          </table:table-cell>
          <table:table-cell office:value-type="float" office:value="0.37514">
            <text:p>0,37514</text:p>
          </table:table-cell>
          <table:table-cell office:value-type="percentage" office:value="0.06437">
            <text:p>6,44%</text:p>
          </table:table-cell>
          <table:table-cell office:value-type="percentage" office:value="0.03743">
            <text:p>3,74%</text:p>
          </table:table-cell>
          <table:table-cell office:value-type="float" office:value="2.57">
            <text:p>2,57</text:p>
          </table:table-cell>
          <table:table-cell table:number-columns-repeated="1013"/>
        </table:table-row>
        <table:table-row table:style-name="ro2">
          <table:table-cell office:value-type="string">
            <text:p>BK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30.5">
            <text:p>130,5</text:p>
          </table:table-cell>
          <table:table-cell office:value-type="float" office:value="16.191067">
            <text:p>16,191067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3472">
            <text:p>13,47%</text:p>
          </table:table-cell>
          <table:table-cell office:value-type="float" office:value="1.068">
            <text:p>1,06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KNG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65.93">
            <text:p>165,93</text:p>
          </table:table-cell>
          <table:table-cell office:value-type="float" office:value="21.890501">
            <text:p>21,890501</text:p>
          </table:table-cell>
          <table:table-cell/>
          <table:table-cell office:value-type="percentage" office:value="0.37483">
            <text:p>37,48%</text:p>
          </table:table-cell>
          <table:table-cell/>
          <table:table-cell office:value-type="float" office:value="1.102">
            <text:p>1,10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OF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89.48">
            <text:p>189,48</text:p>
          </table:table-cell>
          <table:table-cell office:value-type="float" office:value="58.1227">
            <text:p>58,1227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03259">
            <text:p>3,26%</text:p>
          </table:table-cell>
          <table:table-cell office:value-type="float" office:value="1.05">
            <text:p>1,0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RR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66.83">
            <text:p>66,83</text:p>
          </table:table-cell>
          <table:table-cell office:value-type="float" office:value="44.553333">
            <text:p>44,553333</text:p>
          </table:table-cell>
          <table:table-cell office:value-type="float" office:value="0.91102">
            <text:p>0,91102</text:p>
          </table:table-cell>
          <table:table-cell office:value-type="percentage" office:value="0.14362">
            <text:p>14,36%</text:p>
          </table:table-cell>
          <table:table-cell office:value-type="percentage" office:value="0.09907">
            <text:p>9,91%</text:p>
          </table:table-cell>
          <table:table-cell office:value-type="float" office:value="1.377">
            <text:p>1,377</text:p>
          </table:table-cell>
          <table:table-cell table:number-columns-repeated="1013"/>
        </table:table-row>
        <table:table-row table:style-name="ro2">
          <table:table-cell office:value-type="string">
            <text:p>CIEN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WEAKENING</text:p>
          </table:table-cell>
          <table:table-cell office:value-type="float" office:value="548.11">
            <text:p>548,11</text:p>
          </table:table-cell>
          <table:table-cell office:value-type="float" office:value="344.72327">
            <text:p>344,72327</text:p>
          </table:table-cell>
          <table:table-cell office:value-type="float" office:value="0.56931">
            <text:p>0,56931</text:p>
          </table:table-cell>
          <table:table-cell office:value-type="percentage" office:value="0.11133">
            <text:p>11,13%</text:p>
          </table:table-cell>
          <table:table-cell office:value-type="percentage" office:value="0.08201">
            <text:p>8,20%</text:p>
          </table:table-cell>
          <table:table-cell office:value-type="float" office:value="1.245">
            <text:p>1,245</text:p>
          </table:table-cell>
          <table:table-cell table:number-columns-repeated="1013"/>
        </table:table-row>
        <table:table-row table:style-name="ro2">
          <table:table-cell office:value-type="string">
            <text:p>C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25.55">
            <text:p>125,55</text:p>
          </table:table-cell>
          <table:table-cell office:value-type="float" office:value="15.519159">
            <text:p>15,519159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07649">
            <text:p>7,65%</text:p>
          </table:table-cell>
          <table:table-cell office:value-type="float" office:value="1.124">
            <text:p>1,12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FG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63.73">
            <text:p>63,73</text:p>
          </table:table-cell>
          <table:table-cell office:value-type="float" office:value="15.101896">
            <text:p>15,101896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07739">
            <text:p>7,74%</text:p>
          </table:table-cell>
          <table:table-cell office:value-type="float" office:value="1.041">
            <text:p>1,04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CI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90.57">
            <text:p>90,57</text:p>
          </table:table-cell>
          <table:table-cell office:value-type="float" office:value="38.21519">
            <text:p>38,21519</text:p>
          </table:table-cell>
          <table:table-cell/>
          <table:table-cell office:value-type="percentage" office:value="0.64799005">
            <text:p>64,80%</text:p>
          </table:table-cell>
          <table:table-cell/>
          <table:table-cell office:value-type="float" office:value="0.949">
            <text:p>0,94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MI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4">
            <text:p>4</text:p>
          </table:table-cell>
          <table:table-cell table:style-name="ce2" office:value-type="string">
            <text:p>WEAKENING</text:p>
          </table:table-cell>
          <table:table-cell office:value-type="float" office:value="679.55">
            <text:p>679,55</text:p>
          </table:table-cell>
          <table:table-cell office:value-type="float" office:value="35.338013">
            <text:p>35,338013</text:p>
          </table:table-cell>
          <table:table-cell office:value-type="float" office:value="0.61621">
            <text:p>0,61621</text:p>
          </table:table-cell>
          <table:table-cell office:value-type="percentage" office:value="0.14764">
            <text:p>14,76%</text:p>
          </table:table-cell>
          <table:table-cell office:value-type="percentage" office:value="0.21993999">
            <text:p>21,99%</text:p>
          </table:table-cell>
          <table:table-cell office:value-type="float" office:value="1.268">
            <text:p>1,268</text:p>
          </table:table-cell>
          <table:table-cell table:number-columns-repeated="1013"/>
        </table:table-row>
        <table:table-row table:style-name="ro2">
          <table:table-cell office:value-type="string">
            <text:p>DDOG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200.16">
            <text:p>200,16</text:p>
          </table:table-cell>
          <table:table-cell office:value-type="float" office:value="526.7369">
            <text:p>526,7369</text:p>
          </table:table-cell>
          <table:table-cell office:value-type="float" office:value="0.32221">
            <text:p>0,32221</text:p>
          </table:table-cell>
          <table:table-cell office:value-type="percentage" office:value="0.009430001">
            <text:p>0,94%</text:p>
          </table:table-cell>
          <table:table-cell office:value-type="percentage" office:value="0.039300002">
            <text:p>3,93%</text:p>
          </table:table-cell>
          <table:table-cell office:value-type="float" office:value="1.295">
            <text:p>1,295</text:p>
          </table:table-cell>
          <table:table-cell table:number-columns-repeated="1013"/>
        </table:table-row>
        <table:table-row table:style-name="ro2">
          <table:table-cell office:value-type="string">
            <text:p>DVA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198.65">
            <text:p>198,65</text:p>
          </table:table-cell>
          <table:table-cell office:value-type="float" office:value="19.119345">
            <text:p>19,119345</text:p>
          </table:table-cell>
          <table:table-cell office:value-type="float" office:value="12.61331">
            <text:p>12,61331</text:p>
          </table:table-cell>
          <table:table-cell office:value-type="percentage" office:value="0.20186001">
            <text:p>20,19%</text:p>
          </table:table-cell>
          <table:table-cell office:value-type="percentage" office:value="0.80981004">
            <text:p>80,98%</text:p>
          </table:table-cell>
          <table:table-cell office:value-type="float" office:value="0.836">
            <text:p>0,8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PZ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323.48">
            <text:p>323,48</text:p>
          </table:table-cell>
          <table:table-cell office:value-type="float" office:value="18.622913">
            <text:p>18,622913</text:p>
          </table:table-cell>
          <table:table-cell/>
          <table:table-cell office:value-type="percentage" office:value="0.20523001">
            <text:p>20,52%</text:p>
          </table:table-cell>
          <table:table-cell/>
          <table:table-cell office:value-type="float" office:value="1.02">
            <text:p>1,0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ASH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63.93">
            <text:p>163,93</text:p>
          </table:table-cell>
          <table:table-cell office:value-type="float" office:value="77.69194">
            <text:p>77,69194</text:p>
          </table:table-cell>
          <table:table-cell office:value-type="float" office:value="0.32194">
            <text:p>0,32194</text:p>
          </table:table-cell>
          <table:table-cell office:value-type="percentage" office:value="0.091709994">
            <text:p>9,17%</text:p>
          </table:table-cell>
          <table:table-cell office:value-type="percentage" office:value="0.09922">
            <text:p>9,92%</text:p>
          </table:table-cell>
          <table:table-cell office:value-type="float" office:value="1.871">
            <text:p>1,871</text:p>
          </table:table-cell>
          <table:table-cell table:number-columns-repeated="1013"/>
        </table:table-row>
        <table:table-row table:style-name="ro2">
          <table:table-cell office:value-type="string">
            <text:p>DTE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40.6">
            <text:p>140,6</text:p>
          </table:table-cell>
          <table:table-cell office:value-type="float" office:value="23.163097">
            <text:p>23,163097</text:p>
          </table:table-cell>
          <table:table-cell office:value-type="float" office:value="2.18787">
            <text:p>2,18787</text:p>
          </table:table-cell>
          <table:table-cell office:value-type="percentage" office:value="0.21476999">
            <text:p>21,48%</text:p>
          </table:table-cell>
          <table:table-cell office:value-type="percentage" office:value="0.10423">
            <text:p>10,42%</text:p>
          </table:table-cell>
          <table:table-cell office:value-type="float" office:value="0.413">
            <text:p>0,41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S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66.51">
            <text:p>66,51</text:p>
          </table:table-cell>
          <table:table-cell office:value-type="float" office:value="14.24197">
            <text:p>14,24197</text:p>
          </table:table-cell>
          <table:table-cell office:value-type="float" office:value="1.84946">
            <text:p>1,84946</text:p>
          </table:table-cell>
          <table:table-cell office:value-type="percentage" office:value="0.34872">
            <text:p>34,87%</text:p>
          </table:table-cell>
          <table:table-cell/>
          <table:table-cell office:value-type="float" office:value="0.749">
            <text:p>0,74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ICO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1126">
            <text:p>1126</text:p>
          </table:table-cell>
          <table:table-cell office:value-type="float" office:value="35.71202">
            <text:p>35,71202</text:p>
          </table:table-cell>
          <table:table-cell/>
          <table:table-cell office:value-type="percentage" office:value="0.51557">
            <text:p>51,56%</text:p>
          </table:table-cell>
          <table:table-cell/>
          <table:table-cell office:value-type="float" office:value="1.23">
            <text:p>1,2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ITB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49.33">
            <text:p>49,33</text:p>
          </table:table-cell>
          <table:table-cell office:value-type="float" office:value="16.609428">
            <text:p>16,609428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07969">
            <text:p>7,97%</text:p>
          </table:table-cell>
          <table:table-cell office:value-type="float" office:value="0.955">
            <text:p>0,9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E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44.33">
            <text:p>44,33</text:p>
          </table:table-cell>
          <table:table-cell office:value-type="float" office:value="24.092392">
            <text:p>24,092392</text:p>
          </table:table-cell>
          <table:table-cell office:value-type="float" office:value="1.98922">
            <text:p>1,98922</text:p>
          </table:table-cell>
          <table:table-cell office:value-type="percentage" office:value="0.33707002">
            <text:p>33,71%</text:p>
          </table:table-cell>
          <table:table-cell office:value-type="percentage" office:value="0.094610006">
            <text:p>9,46%</text:p>
          </table:table-cell>
          <table:table-cell office:value-type="float" office:value="0.472">
            <text:p>0,47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NRC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269.41">
            <text:p>269,41</text:p>
          </table:table-cell>
          <table:table-cell office:value-type="float" office:value="83.92835">
            <text:p>83,92835</text:p>
          </table:table-cell>
          <table:table-cell office:value-type="float" office:value="0.52086">
            <text:p>0,52086</text:p>
          </table:table-cell>
          <table:table-cell office:value-type="percentage" office:value="0.121929996">
            <text:p>12,19%</text:p>
          </table:table-cell>
          <table:table-cell office:value-type="percentage" office:value="0.07388">
            <text:p>7,39%</text:p>
          </table:table-cell>
          <table:table-cell office:value-type="float" office:value="1.937">
            <text:p>1,937</text:p>
          </table:table-cell>
          <table:table-cell table:number-columns-repeated="1013"/>
        </table:table-row>
        <table:table-row table:style-name="ro2">
          <table:table-cell office:value-type="string">
            <text:p>GS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936.48">
            <text:p>936,48</text:p>
          </table:table-cell>
          <table:table-cell office:value-type="float" office:value="17.095291">
            <text:p>17,095291</text:p>
          </table:table-cell>
          <table:table-cell office:value-type="float" office:value="6.78596">
            <text:p>6,78596</text:p>
          </table:table-cell>
          <table:table-cell office:value-type="percentage" office:value="0">
            <text:p>0,00%</text:p>
          </table:table-cell>
          <table:table-cell office:value-type="percentage" office:value="0.14548">
            <text:p>14,55%</text:p>
          </table:table-cell>
          <table:table-cell office:value-type="float" office:value="1.274">
            <text:p>1,27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AL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39.83">
            <text:p>39,83</text:p>
          </table:table-cell>
          <table:table-cell office:value-type="float" office:value="22.005527">
            <text:p>22,005527</text:p>
          </table:table-cell>
          <table:table-cell office:value-type="float" office:value="0.74651">
            <text:p>0,74651</text:p>
          </table:table-cell>
          <table:table-cell office:value-type="percentage" office:value="0.18597999">
            <text:p>18,60%</text:p>
          </table:table-cell>
          <table:table-cell office:value-type="percentage" office:value="0.14626999">
            <text:p>14,63%</text:p>
          </table:table-cell>
          <table:table-cell office:value-type="float" office:value="0.742">
            <text:p>0,742</text:p>
          </table:table-cell>
          <table:table-cell table:number-columns-repeated="1013"/>
        </table:table-row>
        <table:table-row table:style-name="ro2">
          <table:table-cell office:value-type="string">
            <text:p>HCA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435.19">
            <text:p>435,19</text:p>
          </table:table-cell>
          <table:table-cell office:value-type="float" office:value="14.991043">
            <text:p>14,991043</text:p>
          </table:table-cell>
          <table:table-cell/>
          <table:table-cell office:value-type="percentage" office:value="0.20378">
            <text:p>20,38%</text:p>
          </table:table-cell>
          <table:table-cell/>
          <table:table-cell office:value-type="float" office:value="1.19">
            <text:p>1,1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OC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19.64">
            <text:p>19,64</text:p>
          </table:table-cell>
          <table:table-cell office:value-type="float" office:value="61.375">
            <text:p>61,375</text:p>
          </table:table-cell>
          <table:table-cell office:value-type="float" office:value="1.18243">
            <text:p>1,18243</text:p>
          </table:table-cell>
          <table:table-cell office:value-type="percentage" office:value="0.53742003">
            <text:p>53,74%</text:p>
          </table:table-cell>
          <table:table-cell office:value-type="percentage" office:value="0.027999999">
            <text:p>2,80%</text:p>
          </table:table-cell>
          <table:table-cell office:value-type="float" office:value="0.979">
            <text:p>0,97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LT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316.78">
            <text:p>316,78</text:p>
          </table:table-cell>
          <table:table-cell office:value-type="float" office:value="48.289635">
            <text:p>48,289635</text:p>
          </table:table-cell>
          <table:table-cell/>
          <table:table-cell office:value-type="percentage" office:value="0.59219">
            <text:p>59,22%</text:p>
          </table:table-cell>
          <table:table-cell/>
          <table:table-cell office:value-type="float" office:value="1.066">
            <text:p>1,06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BAN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6.12">
            <text:p>16,12</text:p>
          </table:table-cell>
          <table:table-cell office:value-type="float" office:value="12.400002">
            <text:p>12,400002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083859995">
            <text:p>8,39%</text:p>
          </table:table-cell>
          <table:table-cell office:value-type="float" office:value="0.98">
            <text:p>0,9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BKR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84.42">
            <text:p>84,42</text:p>
          </table:table-cell>
          <table:table-cell office:value-type="float" office:value="36.231762">
            <text:p>36,231762</text:p>
          </table:table-cell>
          <table:table-cell office:value-type="float" office:value="1.52192">
            <text:p>1,52192</text:p>
          </table:table-cell>
          <table:table-cell office:value-type="percentage" office:value="0">
            <text:p>0,00%</text:p>
          </table:table-cell>
          <table:table-cell office:value-type="percentage" office:value="0.2356">
            <text:p>23,56%</text:p>
          </table:table-cell>
          <table:table-cell office:value-type="float" office:value="1.322">
            <text:p>1,32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PM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302.1">
            <text:p>302,1</text:p>
          </table:table-cell>
          <table:table-cell office:value-type="float" office:value="14.468391">
            <text:p>14,468391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6465001">
            <text:p>16,47%</text:p>
          </table:table-cell>
          <table:table-cell office:value-type="float" office:value="1.023">
            <text:p>1,02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EY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1.6">
            <text:p>21,6</text:p>
          </table:table-cell>
          <table:table-cell office:value-type="float" office:value="13.251534">
            <text:p>13,251534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09977">
            <text:p>9,98%</text:p>
          </table:table-cell>
          <table:table-cell office:value-type="float" office:value="1.055">
            <text:p>1,0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H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54.12">
            <text:p>254,12</text:p>
          </table:table-cell>
          <table:table-cell office:value-type="float" office:value="22.528368">
            <text:p>22,528368</text:p>
          </table:table-cell>
          <table:table-cell office:value-type="float" office:value="0.83407">
            <text:p>0,83407</text:p>
          </table:table-cell>
          <table:table-cell office:value-type="percentage" office:value="0.15929">
            <text:p>15,93%</text:p>
          </table:table-cell>
          <table:table-cell office:value-type="percentage" office:value="0.11047">
            <text:p>11,05%</text:p>
          </table:table-cell>
          <table:table-cell office:value-type="float" office:value="0.883">
            <text:p>0,883</text:p>
          </table:table-cell>
          <table:table-cell table:number-columns-repeated="1013"/>
        </table:table-row>
        <table:table-row table:style-name="ro2">
          <table:table-cell office:value-type="string">
            <text:p>LEN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88.38">
            <text:p>88,38</text:p>
          </table:table-cell>
          <table:table-cell office:value-type="float" office:value="12.716547">
            <text:p>12,716547</text:p>
          </table:table-cell>
          <table:table-cell office:value-type="float" office:value="0.24992">
            <text:p>0,24992</text:p>
          </table:table-cell>
          <table:table-cell office:value-type="percentage" office:value="0.07484">
            <text:p>7,48%</text:p>
          </table:table-cell>
          <table:table-cell office:value-type="percentage" office:value="0.08076">
            <text:p>8,08%</text:p>
          </table:table-cell>
          <table:table-cell office:value-type="float" office:value="1.422">
            <text:p>1,422</text:p>
          </table:table-cell>
          <table:table-cell table:number-columns-repeated="1013"/>
        </table:table-row>
        <table:table-row table:style-name="ro2">
          <table:table-cell office:value-type="string">
            <text:p>MTB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12.14">
            <text:p>212,14</text:p>
          </table:table-cell>
          <table:table-cell office:value-type="float" office:value="11.904602">
            <text:p>11,904602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02910005">
            <text:p>10,29%</text:p>
          </table:table-cell>
          <table:table-cell office:value-type="float" office:value="0.591">
            <text:p>0,59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AR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353.18">
            <text:p>353,18</text:p>
          </table:table-cell>
          <table:table-cell office:value-type="float" office:value="37.020966">
            <text:p>37,020966</text:p>
          </table:table-cell>
          <table:table-cell/>
          <table:table-cell office:value-type="percentage" office:value="0.65910006">
            <text:p>65,91%</text:p>
          </table:table-cell>
          <table:table-cell/>
          <table:table-cell office:value-type="float" office:value="1.107">
            <text:p>1,1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CD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75.75">
            <text:p>275,75</text:p>
          </table:table-cell>
          <table:table-cell office:value-type="float" office:value="22.732893">
            <text:p>22,732893</text:p>
          </table:table-cell>
          <table:table-cell/>
          <table:table-cell office:value-type="percentage" office:value="0.54175">
            <text:p>54,18%</text:p>
          </table:table-cell>
          <table:table-cell/>
          <table:table-cell office:value-type="float" office:value="0.436">
            <text:p>0,43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TD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124.46">
            <text:p>1124,46</text:p>
          </table:table-cell>
          <table:table-cell office:value-type="float" office:value="26.383389">
            <text:p>26,383389</text:p>
          </table:table-cell>
          <table:table-cell/>
          <table:table-cell office:value-type="percentage" office:value="0.29771">
            <text:p>29,77%</text:p>
          </table:table-cell>
          <table:table-cell/>
          <table:table-cell office:value-type="float" office:value="1.312">
            <text:p>1,31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DLZ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61.55">
            <text:p>61,55</text:p>
          </table:table-cell>
          <table:table-cell office:value-type="float" office:value="30.470297">
            <text:p>30,470297</text:p>
          </table:table-cell>
          <table:table-cell office:value-type="float" office:value="0.83793">
            <text:p>0,83793</text:p>
          </table:table-cell>
          <table:table-cell office:value-type="percentage" office:value="0.13271">
            <text:p>13,27%</text:p>
          </table:table-cell>
          <table:table-cell office:value-type="percentage" office:value="0.101610005">
            <text:p>10,16%</text:p>
          </table:table-cell>
          <table:table-cell office:value-type="float" office:value="0.404">
            <text:p>0,404</text:p>
          </table:table-cell>
          <table:table-cell table:number-columns-repeated="1013"/>
        </table:table-row>
        <table:table-row table:style-name="ro2">
          <table:table-cell office:value-type="string">
            <text:p>MS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WEAKENING</text:p>
          </table:table-cell>
          <table:table-cell office:value-type="float" office:value="193.09">
            <text:p>193,09</text:p>
          </table:table-cell>
          <table:table-cell office:value-type="float" office:value="17.490036">
            <text:p>17,490036</text:p>
          </table:table-cell>
          <table:table-cell office:value-type="float" office:value="5.02246">
            <text:p>5,02246</text:p>
          </table:table-cell>
          <table:table-cell office:value-type="percentage" office:value="0">
            <text:p>0,00%</text:p>
          </table:table-cell>
          <table:table-cell office:value-type="percentage" office:value="0.16388">
            <text:p>16,39%</text:p>
          </table:table-cell>
          <table:table-cell office:value-type="float" office:value="1.207">
            <text:p>1,2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SCI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585.42">
            <text:p>585,42</text:p>
          </table:table-cell>
          <table:table-cell office:value-type="float" office:value="33.45257">
            <text:p>33,45257</text:p>
          </table:table-cell>
          <table:table-cell/>
          <table:table-cell office:value-type="percentage" office:value="0.58621">
            <text:p>58,62%</text:p>
          </table:table-cell>
          <table:table-cell/>
          <table:table-cell office:value-type="float" office:value="1.235">
            <text:p>1,2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TRS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60.41">
            <text:p>160,41</text:p>
          </table:table-cell>
          <table:table-cell office:value-type="float" office:value="16.814466">
            <text:p>16,814466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4462">
            <text:p>14,46%</text:p>
          </table:table-cell>
          <table:table-cell office:value-type="float" office:value="1.286">
            <text:p>1,2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CLH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7.08">
            <text:p>17,08</text:p>
          </table:table-cell>
          <table:table-cell office:value-type="float" office:value="13.774194">
            <text:p>13,774194</text:p>
          </table:table-cell>
          <table:table-cell office:value-type="float" office:value="6.61444">
            <text:p>6,61444</text:p>
          </table:table-cell>
          <table:table-cell office:value-type="percentage" office:value="0.26117">
            <text:p>26,12%</text:p>
          </table:table-cell>
          <table:table-cell office:value-type="percentage" office:value="0.29533002">
            <text:p>29,53%</text:p>
          </table:table-cell>
          <table:table-cell office:value-type="float" office:value="1.921">
            <text:p>1,9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ORLY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92.96">
            <text:p>92,96</text:p>
          </table:table-cell>
          <table:table-cell office:value-type="float" office:value="30.28013">
            <text:p>30,28013</text:p>
          </table:table-cell>
          <table:table-cell/>
          <table:table-cell office:value-type="percentage" office:value="0.22438999">
            <text:p>22,44%</text:p>
          </table:table-cell>
          <table:table-cell/>
          <table:table-cell office:value-type="float" office:value="0.584">
            <text:p>0,58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AYX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93.93">
            <text:p>93,93</text:p>
          </table:table-cell>
          <table:table-cell office:value-type="float" office:value="20.735098">
            <text:p>20,735098</text:p>
          </table:table-cell>
          <table:table-cell office:value-type="float" office:value="1.2491">
            <text:p>1,2491</text:p>
          </table:table-cell>
          <table:table-cell office:value-type="percentage" office:value="0.40523997">
            <text:p>40,52%</text:p>
          </table:table-cell>
          <table:table-cell table:number-columns-repeated="2"/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M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170.99">
            <text:p>170,99</text:p>
          </table:table-cell>
          <table:table-cell office:value-type="float" office:value="24.0831">
            <text:p>24,0831</text:p>
          </table:table-cell>
          <table:table-cell/>
          <table:table-cell office:value-type="percentage" office:value="0.44812">
            <text:p>44,81%</text:p>
          </table:table-cell>
          <table:table-cell/>
          <table:table-cell office:value-type="float" office:value="0.393">
            <text:p>0,3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NC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16.85">
            <text:p>216,85</text:p>
          </table:table-cell>
          <table:table-cell office:value-type="float" office:value="12.5929165">
            <text:p>12,5929165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2104">
            <text:p>12,10%</text:p>
          </table:table-cell>
          <table:table-cell office:value-type="float" office:value="0.93">
            <text:p>0,9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RF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7.63">
            <text:p>27,63</text:p>
          </table:table-cell>
          <table:table-cell office:value-type="float" office:value="11.464729">
            <text:p>11,464729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1895">
            <text:p>11,90%</text:p>
          </table:table-cell>
          <table:table-cell office:value-type="float" office:value="1.033">
            <text:p>1,0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OOD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77.03">
            <text:p>77,03</text:p>
          </table:table-cell>
          <table:table-cell office:value-type="float" office:value="37.393204">
            <text:p>37,393204</text:p>
          </table:table-cell>
          <table:table-cell office:value-type="float" office:value="1.40483">
            <text:p>1,40483</text:p>
          </table:table-cell>
          <table:table-cell office:value-type="percentage" office:value="0">
            <text:p>0,00%</text:p>
          </table:table-cell>
          <table:table-cell office:value-type="percentage" office:value="0.21461001">
            <text:p>21,46%</text:p>
          </table:table-cell>
          <table:table-cell office:value-type="float" office:value="2.294">
            <text:p>2,29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BAC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WEAKENING</text:p>
          </table:table-cell>
          <table:table-cell office:value-type="float" office:value="218.17">
            <text:p>218,17</text:p>
          </table:table-cell>
          <table:table-cell office:value-type="float" office:value="22.989464">
            <text:p>22,989464</text:p>
          </table:table-cell>
          <table:table-cell/>
          <table:table-cell office:value-type="percentage" office:value="0.64034">
            <text:p>64,03%</text:p>
          </table:table-cell>
          <table:table-cell/>
          <table:table-cell office:value-type="float" office:value="1.024">
            <text:p>1,02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W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41.55">
            <text:p>41,55</text:p>
          </table:table-cell>
          <table:table-cell office:value-type="float" office:value="57.70833">
            <text:p>57,70833</text:p>
          </table:table-cell>
          <table:table-cell office:value-type="float" office:value="0.78831">
            <text:p>0,78831</text:p>
          </table:table-cell>
          <table:table-cell office:value-type="percentage" office:value="0.15271">
            <text:p>15,27%</text:p>
          </table:table-cell>
          <table:table-cell office:value-type="percentage" office:value="0.02113">
            <text:p>2,11%</text:p>
          </table:table-cell>
          <table:table-cell office:value-type="float" office:value="0.939">
            <text:p>0,939</text:p>
          </table:table-cell>
          <table:table-cell table:number-columns-repeated="1013"/>
        </table:table-row>
        <table:table-row table:style-name="ro2">
          <table:table-cell office:value-type="string">
            <text:p>SWK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81.07">
            <text:p>81,07</text:p>
          </table:table-cell>
          <table:table-cell office:value-type="float" office:value="33.22541">
            <text:p>33,22541</text:p>
          </table:table-cell>
          <table:table-cell office:value-type="float" office:value="0.77606">
            <text:p>0,77606</text:p>
          </table:table-cell>
          <table:table-cell office:value-type="percentage" office:value="0.10973">
            <text:p>10,97%</text:p>
          </table:table-cell>
          <table:table-cell office:value-type="percentage" office:value="0.04165">
            <text:p>4,17%</text:p>
          </table:table-cell>
          <table:table-cell office:value-type="float" office:value="1.201">
            <text:p>1,201</text:p>
          </table:table-cell>
          <table:table-cell table:number-columns-repeated="1013"/>
        </table:table-row>
        <table:table-row table:style-name="ro2">
          <table:table-cell office:value-type="string">
            <text:p>STT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WEAKENING</text:p>
          </table:table-cell>
          <table:table-cell office:value-type="float" office:value="149.49">
            <text:p>149,49</text:p>
          </table:table-cell>
          <table:table-cell office:value-type="float" office:value="15.17665">
            <text:p>15,17665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1261">
            <text:p>11,26%</text:p>
          </table:table-cell>
          <table:table-cell office:value-type="float" office:value="1.46">
            <text:p>1,4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YF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73.14">
            <text:p>73,14</text:p>
          </table:table-cell>
          <table:table-cell office:value-type="float" office:value="7.571429">
            <text:p>7,571429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2178">
            <text:p>21,78%</text:p>
          </table:table-cell>
          <table:table-cell office:value-type="float" office:value="1.362">
            <text:p>1,3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XT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91.01">
            <text:p>91,01</text:p>
          </table:table-cell>
          <table:table-cell office:value-type="float" office:value="17.368322">
            <text:p>17,368322</text:p>
          </table:table-cell>
          <table:table-cell office:value-type="float" office:value="0.52674">
            <text:p>0,52674</text:p>
          </table:table-cell>
          <table:table-cell office:value-type="percentage" office:value="0.11088">
            <text:p>11,09%</text:p>
          </table:table-cell>
          <table:table-cell office:value-type="percentage" office:value="0.12254">
            <text:p>12,25%</text:p>
          </table:table-cell>
          <table:table-cell office:value-type="float" office:value="0.934">
            <text:p>0,934</text:p>
          </table:table-cell>
          <table:table-cell table:number-columns-repeated="1013"/>
        </table:table-row>
        <table:table-row table:style-name="ro2">
          <table:table-cell office:value-type="string">
            <text:p>TDG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1215.08">
            <text:p>1215,08</text:p>
          </table:table-cell>
          <table:table-cell office:value-type="float" office:value="37.876556">
            <text:p>37,876556</text:p>
          </table:table-cell>
          <table:table-cell/>
          <table:table-cell office:value-type="percentage" office:value="0.51047003">
            <text:p>51,05%</text:p>
          </table:table-cell>
          <table:table-cell/>
          <table:table-cell office:value-type="float" office:value="0.879">
            <text:p>0,87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FC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49.11">
            <text:p>49,11</text:p>
          </table:table-cell>
          <table:table-cell office:value-type="float" office:value="12.155941">
            <text:p>12,155941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08579001">
            <text:p>8,58%</text:p>
          </table:table-cell>
          <table:table-cell office:value-type="float" office:value="0.906">
            <text:p>0,90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SN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IMPROVING</text:p>
          </table:table-cell>
          <table:table-cell office:value-type="float" office:value="68.38">
            <text:p>68,38</text:p>
          </table:table-cell>
          <table:table-cell office:value-type="float" office:value="53.842518">
            <text:p>53,842518</text:p>
          </table:table-cell>
          <table:table-cell office:value-type="float" office:value="0.4441">
            <text:p>0,4441</text:p>
          </table:table-cell>
          <table:table-cell office:value-type="percentage" office:value="0.048639998">
            <text:p>4,86%</text:p>
          </table:table-cell>
          <table:table-cell office:value-type="percentage" office:value="0.02619">
            <text:p>2,62%</text:p>
          </table:table-cell>
          <table:table-cell office:value-type="float" office:value="0.394">
            <text:p>0,394</text:p>
          </table:table-cell>
          <table:table-cell table:number-columns-repeated="1013"/>
        </table:table-row>
        <table:table-row table:style-name="ro2">
          <table:table-cell office:value-type="string">
            <text:p>USB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55.53">
            <text:p>55,53</text:p>
          </table:table-cell>
          <table:table-cell office:value-type="float" office:value="11.641509">
            <text:p>11,641509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23500004">
            <text:p>12,35%</text:p>
          </table:table-cell>
          <table:table-cell office:value-type="float" office:value="1.016">
            <text:p>1,01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LO</text:p>
          </table:table-cell>
          <table:table-cell office:value-type="string">
            <text:p>Energy</text:p>
          </table:table-cell>
          <table:table-cell table:style-name="ce1" office:value-type="string">
            <text:p>SI (Quality)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41.06">
            <text:p>241,06</text:p>
          </table:table-cell>
          <table:table-cell office:value-type="float" office:value="17.608473">
            <text:p>17,608473</text:p>
          </table:table-cell>
          <table:table-cell office:value-type="float" office:value="0.42664">
            <text:p>0,42664</text:p>
          </table:table-cell>
          <table:table-cell office:value-type="percentage" office:value="0.078099996">
            <text:p>7,81%</text:p>
          </table:table-cell>
          <table:table-cell office:value-type="percentage" office:value="0.1585">
            <text:p>15,85%</text:p>
          </table:table-cell>
          <table:table-cell office:value-type="float" office:value="0.571">
            <text:p>0,571</text:p>
          </table:table-cell>
          <table:table-cell table:number-columns-repeated="1013"/>
        </table:table-row>
        <table:table-row table:style-name="ro2">
          <table:table-cell office:value-type="string">
            <text:p>VRSN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EADING</text:p>
          </table:table-cell>
          <table:table-cell office:value-type="float" office:value="288.21">
            <text:p>288,21</text:p>
          </table:table-cell>
          <table:table-cell office:value-type="float" office:value="31.846407">
            <text:p>31,846407</text:p>
          </table:table-cell>
          <table:table-cell/>
          <table:table-cell office:value-type="percentage" office:value="0.69635004">
            <text:p>69,64%</text:p>
          </table:table-cell>
          <table:table-cell/>
          <table:table-cell office:value-type="float" office:value="0.681">
            <text:p>0,68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RSK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71.87">
            <text:p>171,87</text:p>
          </table:table-cell>
          <table:table-cell office:value-type="float" office:value="26.159817">
            <text:p>26,159817</text:p>
          </table:table-cell>
          <table:table-cell/>
          <table:table-cell office:value-type="percentage" office:value="0.48612">
            <text:p>48,61%</text:p>
          </table:table-cell>
          <table:table-cell/>
          <table:table-cell office:value-type="float" office:value="0.726">
            <text:p>0,72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FC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75.64">
            <text:p>75,64</text:p>
          </table:table-cell>
          <table:table-cell office:value-type="float" office:value="11.690882">
            <text:p>11,690882</text:p>
          </table:table-cell>
          <table:table-cell/>
          <table:table-cell office:value-type="percentage" office:value="0">
            <text:p>0,00%</text:p>
          </table:table-cell>
          <table:table-cell office:value-type="percentage" office:value="0.12028">
            <text:p>12,03%</text:p>
          </table:table-cell>
          <table:table-cell office:value-type="float" office:value="0.96">
            <text:p>0,9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Y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3.53">
            <text:p>23,53</text:p>
          </table:table-cell>
          <table:table-cell office:value-type="float" office:value="42.017857">
            <text:p>42,017857</text:p>
          </table:table-cell>
          <table:table-cell office:value-type="float" office:value="0.57729">
            <text:p>0,57729</text:p>
          </table:table-cell>
          <table:table-cell office:value-type="percentage" office:value="0.101619996">
            <text:p>10,16%</text:p>
          </table:table-cell>
          <table:table-cell office:value-type="percentage" office:value="0.04161">
            <text:p>4,16%</text:p>
          </table:table-cell>
          <table:table-cell office:value-type="float" office:value="0.913">
            <text:p>0,913</text:p>
          </table:table-cell>
          <table:table-cell table:number-columns-repeated="1013"/>
        </table:table-row>
        <table:table-row table:style-name="ro2">
          <table:table-cell office:value-type="string">
            <text:p>YUM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151.95">
            <text:p>151,95</text:p>
          </table:table-cell>
          <table:table-cell office:value-type="float" office:value="24.508064">
            <text:p>24,508064</text:p>
          </table:table-cell>
          <table:table-cell/>
          <table:table-cell office:value-type="percentage" office:value="0.3527">
            <text:p>35,27%</text:p>
          </table:table-cell>
          <table:table-cell/>
          <table:table-cell office:value-type="float" office:value="0.604">
            <text:p>0,6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ZBRA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4">
            <text:p>4</text:p>
          </table:table-cell>
          <table:table-cell table:style-name="ce2" office:value-type="string">
            <text:p>LAGGING</text:p>
          </table:table-cell>
          <table:table-cell office:value-type="float" office:value="226.03">
            <text:p>226,03</text:p>
          </table:table-cell>
          <table:table-cell office:value-type="float" office:value="27.632029">
            <text:p>27,632029</text:p>
          </table:table-cell>
          <table:table-cell office:value-type="float" office:value="0.75167">
            <text:p>0,75167</text:p>
          </table:table-cell>
          <table:table-cell office:value-type="percentage" office:value="0.18254">
            <text:p>18,25%</text:p>
          </table:table-cell>
          <table:table-cell office:value-type="percentage" office:value="0.116809994">
            <text:p>11,68%</text:p>
          </table:table-cell>
          <table:table-cell office:value-type="float" office:value="1.624">
            <text:p>1,624</text:p>
          </table:table-cell>
          <table:table-cell table:number-columns-repeated="1013"/>
        </table:table-row>
        <table:table-row table:style-name="ro2">
          <table:table-cell office:value-type="string">
            <text:p>AMCR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39.93">
            <text:p>39,93</text:p>
          </table:table-cell>
          <table:table-cell office:value-type="float" office:value="31.944">
            <text:p>31,944</text:p>
          </table:table-cell>
          <table:table-cell office:value-type="float" office:value="1.4374">
            <text:p>1,4374</text:p>
          </table:table-cell>
          <table:table-cell office:value-type="percentage" office:value="0.14425">
            <text:p>14,43%</text:p>
          </table:table-cell>
          <table:table-cell office:value-type="percentage" office:value="0.08737001">
            <text:p>8,74%</text:p>
          </table:table-cell>
          <table:table-cell office:value-type="float" office:value="0.633">
            <text:p>0,63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PTV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57.94">
            <text:p>57,94</text:p>
          </table:table-cell>
          <table:table-cell office:value-type="float" office:value="34.488094">
            <text:p>34,488094</text:p>
          </table:table-cell>
          <table:table-cell office:value-type="float" office:value="1.03823">
            <text:p>1,03823</text:p>
          </table:table-cell>
          <table:table-cell office:value-type="percentage" office:value="0.15416999">
            <text:p>15,42%</text:p>
          </table:table-cell>
          <table:table-cell office:value-type="percentage" office:value="0.040799998">
            <text:p>4,08%</text:p>
          </table:table-cell>
          <table:table-cell office:value-type="float" office:value="1.308">
            <text:p>1,30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VY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163.51">
            <text:p>163,51</text:p>
          </table:table-cell>
          <table:table-cell office:value-type="float" office:value="18.413288">
            <text:p>18,413288</text:p>
          </table:table-cell>
          <table:table-cell office:value-type="float" office:value="1.64751">
            <text:p>1,64751</text:p>
          </table:table-cell>
          <table:table-cell office:value-type="percentage" office:value="0.16023001">
            <text:p>16,02%</text:p>
          </table:table-cell>
          <table:table-cell office:value-type="percentage" office:value="0.30857">
            <text:p>30,86%</text:p>
          </table:table-cell>
          <table:table-cell office:value-type="float" office:value="0.847">
            <text:p>0,8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XON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403.54">
            <text:p>403,54</text:p>
          </table:table-cell>
          <table:table-cell office:value-type="float" office:value="164.04065">
            <text:p>164,04065</text:p>
          </table:table-cell>
          <table:table-cell office:value-type="float" office:value="0.52074">
            <text:p>0,52074</text:p>
          </table:table-cell>
          <table:table-cell office:value-type="percentage" office:value="0.034479998">
            <text:p>3,45%</text:p>
          </table:table-cell>
          <table:table-cell office:value-type="percentage" office:value="0.06765">
            <text:p>6,77%</text:p>
          </table:table-cell>
          <table:table-cell office:value-type="float" office:value="1.435">
            <text:p>1,435</text:p>
          </table:table-cell>
          <table:table-cell table:number-columns-repeated="1013"/>
        </table:table-row>
        <table:table-row table:style-name="ro2">
          <table:table-cell office:value-type="string">
            <text:p>BALL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58.52">
            <text:p>58,52</text:p>
          </table:table-cell>
          <table:table-cell office:value-type="float" office:value="17.061224">
            <text:p>17,061224</text:p>
          </table:table-cell>
          <table:table-cell office:value-type="float" office:value="1.45542">
            <text:p>1,45542</text:p>
          </table:table-cell>
          <table:table-cell office:value-type="percentage" office:value="0.15022">
            <text:p>15,02%</text:p>
          </table:table-cell>
          <table:table-cell office:value-type="percentage" office:value="0.16785999">
            <text:p>16,79%</text:p>
          </table:table-cell>
          <table:table-cell office:value-type="float" office:value="1.065">
            <text:p>1,06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G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124.94">
            <text:p>124,94</text:p>
          </table:table-cell>
          <table:table-cell office:value-type="float" office:value="32.87895">
            <text:p>32,87895</text:p>
          </table:table-cell>
          <table:table-cell office:value-type="float" office:value="0.93214">
            <text:p>0,93214</text:p>
          </table:table-cell>
          <table:table-cell office:value-type="percentage" office:value="0.02774">
            <text:p>2,77%</text:p>
          </table:table-cell>
          <table:table-cell office:value-type="percentage" office:value="0.04933">
            <text:p>4,93%</text:p>
          </table:table-cell>
          <table:table-cell office:value-type="float" office:value="0.627">
            <text:p>0,627</text:p>
          </table:table-cell>
          <table:table-cell table:number-columns-repeated="1013"/>
        </table:table-row>
        <table:table-row table:style-name="ro2">
          <table:table-cell office:value-type="string">
            <text:p>CHRW</text:p>
          </table:table-cell>
          <table:table-cell office:value-type="string">
            <text:p>Industrials</text:p>
          </table:table-cell>
          <table:table-cell table:style-name="ce1" office:value-type="string">
            <text:p>SI (Quality)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171.39">
            <text:p>171,39</text:p>
          </table:table-cell>
          <table:table-cell office:value-type="float" office:value="34.764706">
            <text:p>34,764706</text:p>
          </table:table-cell>
          <table:table-cell office:value-type="float" office:value="0.96501">
            <text:p>0,96501</text:p>
          </table:table-cell>
          <table:table-cell office:value-type="percentage" office:value="0.054780003">
            <text:p>5,48%</text:p>
          </table:table-cell>
          <table:table-cell office:value-type="percentage" office:value="0.34838">
            <text:p>34,84%</text:p>
          </table:table-cell>
          <table:table-cell office:value-type="float" office:value="0.943">
            <text:p>0,943</text:p>
          </table:table-cell>
          <table:table-cell table:number-columns-repeated="1013"/>
        </table:table-row>
        <table:table-row table:style-name="ro2">
          <table:table-cell office:value-type="string">
            <text:p>CPB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20.84">
            <text:p>20,84</text:p>
          </table:table-cell>
          <table:table-cell office:value-type="float" office:value="11.326087">
            <text:p>11,326087</text:p>
          </table:table-cell>
          <table:table-cell office:value-type="float" office:value="1.85001">
            <text:p>1,85001</text:p>
          </table:table-cell>
          <table:table-cell office:value-type="percentage" office:value="0.17406">
            <text:p>17,41%</text:p>
          </table:table-cell>
          <table:table-cell office:value-type="percentage" office:value="0.13891">
            <text:p>13,89%</text:p>
          </table:table-cell>
          <table:table-cell office:value-type="float" office:value="-0.005">
            <text:p>-0,00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VNA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WEAKENING</text:p>
          </table:table-cell>
          <table:table-cell office:value-type="float" office:value="77.94">
            <text:p>77,94</text:p>
          </table:table-cell>
          <table:table-cell office:value-type="float" office:value="45.313953">
            <text:p>45,313953</text:p>
          </table:table-cell>
          <table:table-cell office:value-type="float" office:value="1.21351">
            <text:p>1,21351</text:p>
          </table:table-cell>
          <table:table-cell office:value-type="percentage" office:value="0.10399">
            <text:p>10,40%</text:p>
          </table:table-cell>
          <table:table-cell office:value-type="percentage" office:value="0.60172004">
            <text:p>60,17%</text:p>
          </table:table-cell>
          <table:table-cell office:value-type="float" office:value="3.55">
            <text:p>3,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SY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3.5">
            <text:p>3,5</text:p>
          </table:table-cell>
          <table:table-cell table:style-name="ce2" office:value-type="string">
            <text:p>LEADING</text:p>
          </table:table-cell>
          <table:table-cell office:value-type="float" office:value="859.49">
            <text:p>859,49</text:p>
          </table:table-cell>
          <table:table-cell office:value-type="float" office:value="49.25444">
            <text:p>49,25444</text:p>
          </table:table-cell>
          <table:table-cell office:value-type="float" office:value="0.75146">
            <text:p>0,75146</text:p>
          </table:table-cell>
          <table:table-cell office:value-type="percentage" office:value="0.08182">
            <text:p>8,18%</text:p>
          </table:table-cell>
          <table:table-cell office:value-type="percentage" office:value="0.17882">
            <text:p>17,88%</text:p>
          </table:table-cell>
          <table:table-cell office:value-type="float" office:value="0.65">
            <text:p>0,65</text:p>
          </table:table-cell>
          <table:table-cell table:number-columns-repeated="1013"/>
        </table:table-row>
        <table:table-row table:style-name="ro2">
          <table:table-cell office:value-type="string">
            <text:p>CI</text:p>
          </table:table-cell>
          <table:table-cell office:value-type="string">
            <text:p>Healthcare</text:p>
          </table:table-cell>
          <table:table-cell table:style-name="ce1" office:value-type="string">
            <text:p>SI (Quality)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288.06">
            <text:p>288,06</text:p>
          </table:table-cell>
          <table:table-cell office:value-type="float" office:value="11.849444">
            <text:p>11,849444</text:p>
          </table:table-cell>
          <table:table-cell office:value-type="float" office:value="0.72805">
            <text:p>0,72805</text:p>
          </table:table-cell>
          <table:table-cell office:value-type="percentage" office:value="0.04818">
            <text:p>4,82%</text:p>
          </table:table-cell>
          <table:table-cell office:value-type="percentage" office:value="0.16268998">
            <text:p>16,27%</text:p>
          </table:table-cell>
          <table:table-cell office:value-type="float" office:value="0.313">
            <text:p>0,313</text:p>
          </table:table-cell>
          <table:table-cell table:number-columns-repeated="1013"/>
        </table:table-row>
        <table:table-row table:style-name="ro2">
          <table:table-cell office:value-type="string">
            <text:p>COST</text:p>
          </table:table-cell>
          <table:table-cell office:value-type="string">
            <text:p>Consumer Defensive</text:p>
          </table:table-cell>
          <table:table-cell table:style-name="ce1" office:value-type="string">
            <text:p>SI (Quality)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1008.79">
            <text:p>1008,79</text:p>
          </table:table-cell>
          <table:table-cell office:value-type="float" office:value="52.350285">
            <text:p>52,350285</text:p>
          </table:table-cell>
          <table:table-cell office:value-type="float" office:value="0.60257">
            <text:p>0,60257</text:p>
          </table:table-cell>
          <table:table-cell office:value-type="percentage" office:value="0.047020003">
            <text:p>4,70%</text:p>
          </table:table-cell>
          <table:table-cell office:value-type="percentage" office:value="0.29650998">
            <text:p>29,65%</text:p>
          </table:table-cell>
          <table:table-cell office:value-type="float" office:value="0.908">
            <text:p>0,908</text:p>
          </table:table-cell>
          <table:table-cell table:number-columns-repeated="1013"/>
        </table:table-row>
        <table:table-row table:style-name="ro2">
          <table:table-cell office:value-type="string">
            <text:p>DAL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EADING</text:p>
          </table:table-cell>
          <table:table-cell office:value-type="float" office:value="73.33">
            <text:p>73,33</text:p>
          </table:table-cell>
          <table:table-cell office:value-type="float" office:value="10.70511">
            <text:p>10,70511</text:p>
          </table:table-cell>
          <table:table-cell office:value-type="float" office:value="1.05021">
            <text:p>1,05021</text:p>
          </table:table-cell>
          <table:table-cell office:value-type="percentage" office:value="0.11929">
            <text:p>11,93%</text:p>
          </table:table-cell>
          <table:table-cell office:value-type="percentage" office:value="0.2499">
            <text:p>24,99%</text:p>
          </table:table-cell>
          <table:table-cell office:value-type="float" office:value="1.252">
            <text:p>1,25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LTR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94.24">
            <text:p>94,24</text:p>
          </table:table-cell>
          <table:table-cell office:value-type="float" office:value="15.865319">
            <text:p>15,865319</text:p>
          </table:table-cell>
          <table:table-cell office:value-type="float" office:value="1.87904">
            <text:p>1,87904</text:p>
          </table:table-cell>
          <table:table-cell office:value-type="percentage" office:value="0.11906999">
            <text:p>11,91%</text:p>
          </table:table-cell>
          <table:table-cell office:value-type="percentage" office:value="0.31693">
            <text:p>31,69%</text:p>
          </table:table-cell>
          <table:table-cell office:value-type="float" office:value="0.609">
            <text:p>0,6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ELV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EADING</text:p>
          </table:table-cell>
          <table:table-cell office:value-type="float" office:value="378.07">
            <text:p>378,07</text:p>
          </table:table-cell>
          <table:table-cell office:value-type="float" office:value="16.026707">
            <text:p>16,026707</text:p>
          </table:table-cell>
          <table:table-cell office:value-type="float" office:value="0.72299">
            <text:p>0,72299</text:p>
          </table:table-cell>
          <table:table-cell office:value-type="percentage" office:value="0.04262">
            <text:p>4,26%</text:p>
          </table:table-cell>
          <table:table-cell office:value-type="percentage" office:value="0.12086">
            <text:p>12,09%</text:p>
          </table:table-cell>
          <table:table-cell office:value-type="float" office:value="0.671">
            <text:p>0,671</text:p>
          </table:table-cell>
          <table:table-cell table:number-columns-repeated="1013"/>
        </table:table-row>
        <table:table-row table:style-name="ro2">
          <table:table-cell office:value-type="string">
            <text:p>EPAM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99.23">
            <text:p>99,23</text:p>
          </table:table-cell>
          <table:table-cell office:value-type="float" office:value="14.257184">
            <text:p>14,257184</text:p>
          </table:table-cell>
          <table:table-cell office:value-type="float" office:value="8.391">
            <text:p>8,391</text:p>
          </table:table-cell>
          <table:table-cell office:value-type="percentage" office:value="0.13166">
            <text:p>13,17%</text:p>
          </table:table-cell>
          <table:table-cell office:value-type="percentage" office:value="0.10932">
            <text:p>10,93%</text:p>
          </table:table-cell>
          <table:table-cell office:value-type="float" office:value="1.453">
            <text:p>1,4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FDX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378.58">
            <text:p>378,58</text:p>
          </table:table-cell>
          <table:table-cell office:value-type="float" office:value="20.201708">
            <text:p>20,201708</text:p>
          </table:table-cell>
          <table:table-cell office:value-type="float" office:value="1.40994">
            <text:p>1,40994</text:p>
          </table:table-cell>
          <table:table-cell office:value-type="percentage" office:value="0.12574">
            <text:p>12,57%</text:p>
          </table:table-cell>
          <table:table-cell office:value-type="percentage" office:value="0.15869">
            <text:p>15,87%</text:p>
          </table:table-cell>
          <table:table-cell office:value-type="float" office:value="1.303">
            <text:p>1,30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SIC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70.82">
            <text:p>70,82</text:p>
          </table:table-cell>
          <table:table-cell office:value-type="float" office:value="21.395771">
            <text:p>21,395771</text:p>
          </table:table-cell>
          <table:table-cell office:value-type="float" office:value="0.77748">
            <text:p>0,77748</text:p>
          </table:table-cell>
          <table:table-cell office:value-type="percentage" office:value="0.0783">
            <text:p>7,83%</text:p>
          </table:table-cell>
          <table:table-cell office:value-type="percentage" office:value="0.08762">
            <text:p>8,76%</text:p>
          </table:table-cell>
          <table:table-cell office:value-type="float" office:value="0.822">
            <text:p>0,822</text:p>
          </table:table-cell>
          <table:table-cell table:number-columns-repeated="1013"/>
        </table:table-row>
        <table:table-row table:style-name="ro2">
          <table:table-cell office:value-type="string">
            <text:p>HUM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EADING</text:p>
          </table:table-cell>
          <table:table-cell office:value-type="float" office:value="274.96">
            <text:p>274,96</text:p>
          </table:table-cell>
          <table:table-cell office:value-type="float" office:value="29.31343">
            <text:p>29,31343</text:p>
          </table:table-cell>
          <table:table-cell office:value-type="float" office:value="0.77073">
            <text:p>0,77073</text:p>
          </table:table-cell>
          <table:table-cell office:value-type="percentage" office:value="0.024500001">
            <text:p>2,45%</text:p>
          </table:table-cell>
          <table:table-cell office:value-type="percentage" office:value="0.062800005">
            <text:p>6,28%</text:p>
          </table:table-cell>
          <table:table-cell office:value-type="float" office:value="0.683">
            <text:p>0,683</text:p>
          </table:table-cell>
          <table:table-cell table:number-columns-repeated="1013"/>
        </table:table-row>
        <table:table-row table:style-name="ro2">
          <table:table-cell office:value-type="string">
            <text:p>HII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316.28">
            <text:p>316,28</text:p>
          </table:table-cell>
          <table:table-cell office:value-type="float" office:value="20.537663">
            <text:p>20,537663</text:p>
          </table:table-cell>
          <table:table-cell office:value-type="float" office:value="0.56946">
            <text:p>0,56946</text:p>
          </table:table-cell>
          <table:table-cell office:value-type="percentage" office:value="0.08826">
            <text:p>8,83%</text:p>
          </table:table-cell>
          <table:table-cell office:value-type="percentage" office:value="0.12198">
            <text:p>12,20%</text:p>
          </table:table-cell>
          <table:table-cell office:value-type="float" office:value="0.287">
            <text:p>0,287</text:p>
          </table:table-cell>
          <table:table-cell table:number-columns-repeated="1013"/>
        </table:table-row>
        <table:table-row table:style-name="ro2">
          <table:table-cell office:value-type="string">
            <text:p>KKR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WEAKENING</text:p>
          </table:table-cell>
          <table:table-cell office:value-type="float" office:value="102.52">
            <text:p>102,52</text:p>
          </table:table-cell>
          <table:table-cell office:value-type="float" office:value="34.870747">
            <text:p>34,870747</text:p>
          </table:table-cell>
          <table:table-cell office:value-type="float" office:value="0.68611">
            <text:p>0,68611</text:p>
          </table:table-cell>
          <table:table-cell office:value-type="percentage" office:value="0">
            <text:p>0,00%</text:p>
          </table:table-cell>
          <table:table-cell/>
          <table:table-cell office:value-type="float" office:value="1.852">
            <text:p>1,852</text:p>
          </table:table-cell>
          <table:table-cell table:number-columns-repeated="1013"/>
        </table:table-row>
        <table:table-row table:style-name="ro2">
          <table:table-cell office:value-type="string">
            <text:p>LMT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506.51">
            <text:p>506,51</text:p>
          </table:table-cell>
          <table:table-cell office:value-type="float" office:value="24.504597">
            <text:p>24,504597</text:p>
          </table:table-cell>
          <table:table-cell office:value-type="float" office:value="2.76365">
            <text:p>2,76365</text:p>
          </table:table-cell>
          <table:table-cell office:value-type="percentage" office:value="0.10645001">
            <text:p>10,65%</text:p>
          </table:table-cell>
          <table:table-cell office:value-type="percentage" office:value="0.6764">
            <text:p>67,64%</text:p>
          </table:table-cell>
          <table:table-cell office:value-type="float" office:value="0.1">
            <text:p>0,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GM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38.79">
            <text:p>38,79</text:p>
          </table:table-cell>
          <table:table-cell office:value-type="float" office:value="53.136986">
            <text:p>53,136986</text:p>
          </table:table-cell>
          <table:table-cell office:value-type="float" office:value="9.51186">
            <text:p>9,51186</text:p>
          </table:table-cell>
          <table:table-cell office:value-type="percentage" office:value="0.12836">
            <text:p>12,84%</text:p>
          </table:table-cell>
          <table:table-cell office:value-type="percentage" office:value="0.13488">
            <text:p>13,49%</text:p>
          </table:table-cell>
          <table:table-cell office:value-type="float" office:value="1.285">
            <text:p>1,28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KE</text:p>
          </table:table-cell>
          <table:table-cell office:value-type="string">
            <text:p>Consumer Cyclical</text:p>
          </table:table-cell>
          <table:table-cell table:style-name="ce1" office:value-type="string">
            <text:p>SI (Quality)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44.14">
            <text:p>44,14</text:p>
          </table:table-cell>
          <table:table-cell office:value-type="float" office:value="29.039474">
            <text:p>29,039474</text:p>
          </table:table-cell>
          <table:table-cell office:value-type="float" office:value="0.79333">
            <text:p>0,79333</text:p>
          </table:table-cell>
          <table:table-cell office:value-type="percentage" office:value="0.08306">
            <text:p>8,31%</text:p>
          </table:table-cell>
          <table:table-cell office:value-type="percentage" office:value="0.16016">
            <text:p>16,02%</text:p>
          </table:table-cell>
          <table:table-cell office:value-type="float" office:value="1.124">
            <text:p>1,124</text:p>
          </table:table-cell>
          <table:table-cell table:number-columns-repeated="1013"/>
        </table:table-row>
        <table:table-row table:style-name="ro2">
          <table:table-cell office:value-type="string">
            <text:p>OTIS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74.82">
            <text:p>74,82</text:p>
          </table:table-cell>
          <table:table-cell office:value-type="float" office:value="19.898935">
            <text:p>19,898935</text:p>
          </table:table-cell>
          <table:table-cell/>
          <table:table-cell office:value-type="percentage" office:value="0.17021">
            <text:p>17,02%</text:p>
          </table:table-cell>
          <table:table-cell/>
          <table:table-cell office:value-type="float" office:value="0.943">
            <text:p>0,94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SX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171.56">
            <text:p>171,56</text:p>
          </table:table-cell>
          <table:table-cell office:value-type="float" office:value="16.95257">
            <text:p>16,95257</text:p>
          </table:table-cell>
          <table:table-cell office:value-type="float" office:value="0.91385">
            <text:p>0,91385</text:p>
          </table:table-cell>
          <table:table-cell office:value-type="percentage" office:value="0.05235">
            <text:p>5,24%</text:p>
          </table:table-cell>
          <table:table-cell office:value-type="percentage" office:value="0.14547">
            <text:p>14,55%</text:p>
          </table:table-cell>
          <table:table-cell office:value-type="float" office:value="0.693">
            <text:p>0,693</text:p>
          </table:table-cell>
          <table:table-cell table:number-columns-repeated="1013"/>
        </table:table-row>
        <table:table-row table:style-name="ro2">
          <table:table-cell office:value-type="string">
            <text:p>POOL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187.77">
            <text:p>187,77</text:p>
          </table:table-cell>
          <table:table-cell office:value-type="float" office:value="17.274149">
            <text:p>17,274149</text:p>
          </table:table-cell>
          <table:table-cell office:value-type="float" office:value="1.40423">
            <text:p>1,40423</text:p>
          </table:table-cell>
          <table:table-cell office:value-type="percentage" office:value="0.11908">
            <text:p>11,91%</text:p>
          </table:table-cell>
          <table:table-cell office:value-type="percentage" office:value="0.34241">
            <text:p>34,24%</text:p>
          </table:table-cell>
          <table:table-cell office:value-type="float" office:value="1.154">
            <text:p>1,15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WR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EADING</text:p>
          </table:table-cell>
          <table:table-cell office:value-type="float" office:value="745">
            <text:p>745</text:p>
          </table:table-cell>
          <table:table-cell office:value-type="float" office:value="102.054794">
            <text:p>102,054794</text:p>
          </table:table-cell>
          <table:table-cell office:value-type="float" office:value="0.69121">
            <text:p>0,69121</text:p>
          </table:table-cell>
          <table:table-cell office:value-type="percentage" office:value="0.08828">
            <text:p>8,83%</text:p>
          </table:table-cell>
          <table:table-cell office:value-type="percentage" office:value="0.13534">
            <text:p>13,53%</text:p>
          </table:table-cell>
          <table:table-cell office:value-type="float" office:value="1.244">
            <text:p>1,244</text:p>
          </table:table-cell>
          <table:table-cell table:number-columns-repeated="1013"/>
        </table:table-row>
        <table:table-row table:style-name="ro2">
          <table:table-cell office:value-type="string">
            <text:p>LUV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41.31">
            <text:p>41,31</text:p>
          </table:table-cell>
          <table:table-cell office:value-type="float" office:value="27.54">
            <text:p>27,54</text:p>
          </table:table-cell>
          <table:table-cell office:value-type="float" office:value="0.93033">
            <text:p>0,93033</text:p>
          </table:table-cell>
          <table:table-cell office:value-type="percentage" office:value="0.076620005">
            <text:p>7,66%</text:p>
          </table:table-cell>
          <table:table-cell office:value-type="percentage" office:value="0.10062">
            <text:p>10,06%</text:p>
          </table:table-cell>
          <table:table-cell office:value-type="float" office:value="1.113">
            <text:p>1,113</text:p>
          </table:table-cell>
          <table:table-cell table:number-columns-repeated="1013"/>
        </table:table-row>
        <table:table-row table:style-name="ro2">
          <table:table-cell office:value-type="string">
            <text:p>TSCO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30.65">
            <text:p>30,65</text:p>
          </table:table-cell>
          <table:table-cell office:value-type="float" office:value="15.098522">
            <text:p>15,098522</text:p>
          </table:table-cell>
          <table:table-cell office:value-type="float" office:value="2.54949">
            <text:p>2,54949</text:p>
          </table:table-cell>
          <table:table-cell office:value-type="percentage" office:value="0.12475">
            <text:p>12,48%</text:p>
          </table:table-cell>
          <table:table-cell office:value-type="percentage" office:value="0.45504">
            <text:p>45,50%</text:p>
          </table:table-cell>
          <table:table-cell office:value-type="float" office:value="0.503">
            <text:p>0,50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AL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IMPROVING</text:p>
          </table:table-cell>
          <table:table-cell office:value-type="float" office:value="99.58">
            <text:p>99,58</text:p>
          </table:table-cell>
          <table:table-cell office:value-type="float" office:value="8.906977">
            <text:p>8,906977</text:p>
          </table:table-cell>
          <table:table-cell office:value-type="float" office:value="1.95081">
            <text:p>1,95081</text:p>
          </table:table-cell>
          <table:table-cell office:value-type="percentage" office:value="0.13041">
            <text:p>13,04%</text:p>
          </table:table-cell>
          <table:table-cell office:value-type="percentage" office:value="0.25726998">
            <text:p>25,73%</text:p>
          </table:table-cell>
          <table:table-cell office:value-type="float" office:value="1.206">
            <text:p>1,20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PS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100.78">
            <text:p>100,78</text:p>
          </table:table-cell>
          <table:table-cell office:value-type="float" office:value="16.307444">
            <text:p>16,307444</text:p>
          </table:table-cell>
          <table:table-cell office:value-type="float" office:value="1.81508">
            <text:p>1,81508</text:p>
          </table:table-cell>
          <table:table-cell office:value-type="percentage" office:value="0.13399">
            <text:p>13,40%</text:p>
          </table:table-cell>
          <table:table-cell office:value-type="percentage" office:value="0.33353">
            <text:p>33,35%</text:p>
          </table:table-cell>
          <table:table-cell office:value-type="float" office:value="1.049">
            <text:p>1,04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UNH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3.5">
            <text:p>3,5</text:p>
          </table:table-cell>
          <table:table-cell table:style-name="ce2" office:value-type="string">
            <text:p>WEAKENING</text:p>
          </table:table-cell>
          <table:table-cell office:value-type="float" office:value="379.98">
            <text:p>379,98</text:p>
          </table:table-cell>
          <table:table-cell office:value-type="float" office:value="28.656109">
            <text:p>28,656109</text:p>
          </table:table-cell>
          <table:table-cell office:value-type="float" office:value="0.73982">
            <text:p>0,73982</text:p>
          </table:table-cell>
          <table:table-cell office:value-type="percentage" office:value="0.04773">
            <text:p>4,77%</text:p>
          </table:table-cell>
          <table:table-cell office:value-type="percentage" office:value="0.121759996">
            <text:p>12,18%</text:p>
          </table:table-cell>
          <table:table-cell office:value-type="float" office:value="0.646">
            <text:p>0,646</text:p>
          </table:table-cell>
          <table:table-cell table:number-columns-repeated="1013"/>
        </table:table-row>
        <table:table-row table:style-name="ro2">
          <table:table-cell office:value-type="string">
            <text:p>WMT</text:p>
          </table:table-cell>
          <table:table-cell office:value-type="string">
            <text:p>Consumer Defensive</text:p>
          </table:table-cell>
          <table:table-cell table:style-name="ce1" office:value-type="string">
            <text:p>SI (Quality)</text:p>
          </table:table-cell>
          <table:table-cell office:value-type="float" office:value="3.5">
            <text:p>3,5</text:p>
          </table:table-cell>
          <table:table-cell table:style-name="ce2" office:value-type="string">
            <text:p>LAGGING</text:p>
          </table:table-cell>
          <table:table-cell office:value-type="float" office:value="130.43">
            <text:p>130,43</text:p>
          </table:table-cell>
          <table:table-cell office:value-type="float" office:value="47.776554">
            <text:p>47,776554</text:p>
          </table:table-cell>
          <table:table-cell office:value-type="float" office:value="0.64443">
            <text:p>0,64443</text:p>
          </table:table-cell>
          <table:table-cell office:value-type="percentage" office:value="0.061739996">
            <text:p>6,17%</text:p>
          </table:table-cell>
          <table:table-cell office:value-type="percentage" office:value="0.21847">
            <text:p>21,85%</text:p>
          </table:table-cell>
          <table:table-cell office:value-type="float" office:value="0.652">
            <text:p>0,652</text:p>
          </table:table-cell>
          <table:table-cell table:number-columns-repeated="1013"/>
        </table:table-row>
        <table:table-row table:style-name="ro2">
          <table:table-cell office:value-type="string">
            <text:p>ABBV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IMPROVING</text:p>
          </table:table-cell>
          <table:table-cell office:value-type="float" office:value="201.55">
            <text:p>201,55</text:p>
          </table:table-cell>
          <table:table-cell office:value-type="float" office:value="98.79903">
            <text:p>98,79903</text:p>
          </table:table-cell>
          <table:table-cell/>
          <table:table-cell office:value-type="percentage" office:value="0.47621">
            <text:p>47,62%</text:p>
          </table:table-cell>
          <table:table-cell/>
          <table:table-cell office:value-type="float" office:value="0.305">
            <text:p>0,30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PO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EADING</text:p>
          </table:table-cell>
          <table:table-cell office:value-type="float" office:value="133.2">
            <text:p>133,2</text:p>
          </table:table-cell>
          <table:table-cell office:value-type="float" office:value="83.77358">
            <text:p>83,77358</text:p>
          </table:table-cell>
          <table:table-cell office:value-type="float" office:value="1.01267">
            <text:p>1,01267</text:p>
          </table:table-cell>
          <table:table-cell office:value-type="percentage" office:value="0">
            <text:p>0,00%</text:p>
          </table:table-cell>
          <table:table-cell office:value-type="percentage" office:value="0.08492">
            <text:p>8,49%</text:p>
          </table:table-cell>
          <table:table-cell office:value-type="float" office:value="1.519">
            <text:p>1,51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BY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59.4">
            <text:p>59,4</text:p>
          </table:table-cell>
          <table:table-cell office:value-type="float" office:value="11.785715">
            <text:p>11,785715</text:p>
          </table:table-cell>
          <table:table-cell office:value-type="float" office:value="1.39474">
            <text:p>1,39474</text:p>
          </table:table-cell>
          <table:table-cell office:value-type="percentage" office:value="0.06241">
            <text:p>6,24%</text:p>
          </table:table-cell>
          <table:table-cell office:value-type="percentage" office:value="0.37041">
            <text:p>37,04%</text:p>
          </table:table-cell>
          <table:table-cell office:value-type="float" office:value="1.247">
            <text:p>1,24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A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EADING</text:p>
          </table:table-cell>
          <table:table-cell office:value-type="float" office:value="237.36">
            <text:p>237,36</text:p>
          </table:table-cell>
          <table:table-cell office:value-type="float" office:value="93.44882">
            <text:p>93,44882</text:p>
          </table:table-cell>
          <table:table-cell office:value-type="float" office:value="8.28696">
            <text:p>8,28696</text:p>
          </table:table-cell>
          <table:table-cell office:value-type="percentage" office:value="-0.035350002">
            <text:p>-3,54%</text:p>
          </table:table-cell>
          <table:table-cell office:value-type="percentage" office:value="1.69947">
            <text:p>169,95%</text:p>
          </table:table-cell>
          <table:table-cell office:value-type="float" office:value="1.207">
            <text:p>1,2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LDR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77.4">
            <text:p>77,4</text:p>
          </table:table-cell>
          <table:table-cell office:value-type="float" office:value="29.541986">
            <text:p>29,541986</text:p>
          </table:table-cell>
          <table:table-cell office:value-type="float" office:value="1.32159">
            <text:p>1,32159</text:p>
          </table:table-cell>
          <table:table-cell office:value-type="percentage" office:value="0.081499994">
            <text:p>8,15%</text:p>
          </table:table-cell>
          <table:table-cell office:value-type="percentage" office:value="0.06958">
            <text:p>6,96%</text:p>
          </table:table-cell>
          <table:table-cell office:value-type="float" office:value="1.485">
            <text:p>1,48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BRE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46.33">
            <text:p>146,33</text:p>
          </table:table-cell>
          <table:table-cell office:value-type="float" office:value="33.408676">
            <text:p>33,408676</text:p>
          </table:table-cell>
          <table:table-cell office:value-type="float" office:value="1.13689">
            <text:p>1,13689</text:p>
          </table:table-cell>
          <table:table-cell office:value-type="percentage" office:value="0.05213">
            <text:p>5,21%</text:p>
          </table:table-cell>
          <table:table-cell office:value-type="percentage" office:value="0.15597">
            <text:p>15,60%</text:p>
          </table:table-cell>
          <table:table-cell office:value-type="float" office:value="1.278">
            <text:p>1,27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DW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04.79">
            <text:p>104,79</text:p>
          </table:table-cell>
          <table:table-cell office:value-type="float" office:value="12.763702">
            <text:p>12,763702</text:p>
          </table:table-cell>
          <table:table-cell office:value-type="float" office:value="2.40522">
            <text:p>2,40522</text:p>
          </table:table-cell>
          <table:table-cell office:value-type="percentage" office:value="0.086540006">
            <text:p>8,65%</text:p>
          </table:table-cell>
          <table:table-cell office:value-type="percentage" office:value="0.44157">
            <text:p>44,16%</text:p>
          </table:table-cell>
          <table:table-cell office:value-type="float" office:value="1.035">
            <text:p>1,03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OR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261.08">
            <text:p>261,08</text:p>
          </table:table-cell>
          <table:table-cell office:value-type="float" office:value="20.006128">
            <text:p>20,006128</text:p>
          </table:table-cell>
          <table:table-cell office:value-type="float" office:value="4.20985">
            <text:p>4,20985</text:p>
          </table:table-cell>
          <table:table-cell office:value-type="percentage" office:value="0.01613">
            <text:p>1,61%</text:p>
          </table:table-cell>
          <table:table-cell office:value-type="percentage" office:value="1.0713401">
            <text:p>107,13%</text:p>
          </table:table-cell>
          <table:table-cell office:value-type="float" office:value="0.645">
            <text:p>0,64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SGP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32.77">
            <text:p>32,77</text:p>
          </table:table-cell>
          <table:table-cell office:value-type="float" office:value="468.14285">
            <text:p>468,14285</text:p>
          </table:table-cell>
          <table:table-cell office:value-type="float" office:value="0.14526">
            <text:p>0,14526</text:p>
          </table:table-cell>
          <table:table-cell office:value-type="percentage" office:value="0.07972">
            <text:p>7,97%</text:p>
          </table:table-cell>
          <table:table-cell office:value-type="percentage" office:value="0.00303">
            <text:p>0,30%</text:p>
          </table:table-cell>
          <table:table-cell office:value-type="float" office:value="0.746">
            <text:p>0,746</text:p>
          </table:table-cell>
          <table:table-cell table:number-columns-repeated="1013"/>
        </table:table-row>
        <table:table-row table:style-name="ro2">
          <table:table-cell office:value-type="string">
            <text:p>CVS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EADING</text:p>
          </table:table-cell>
          <table:table-cell office:value-type="float" office:value="90.55">
            <text:p>90,55</text:p>
          </table:table-cell>
          <table:table-cell office:value-type="float" office:value="39.714912">
            <text:p>39,714912</text:p>
          </table:table-cell>
          <table:table-cell office:value-type="float" office:value="1.00912">
            <text:p>1,00912</text:p>
          </table:table-cell>
          <table:table-cell office:value-type="percentage" office:value="0.038">
            <text:p>3,80%</text:p>
          </table:table-cell>
          <table:table-cell office:value-type="percentage" office:value="0.037520003">
            <text:p>3,75%</text:p>
          </table:table-cell>
          <table:table-cell office:value-type="float" office:value="0.592">
            <text:p>0,59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G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13.29">
            <text:p>113,29</text:p>
          </table:table-cell>
          <table:table-cell office:value-type="float" office:value="16.538687">
            <text:p>16,538687</text:p>
          </table:table-cell>
          <table:table-cell office:value-type="float" office:value="1.84665">
            <text:p>1,84665</text:p>
          </table:table-cell>
          <table:table-cell office:value-type="percentage" office:value="0.077410005">
            <text:p>7,74%</text:p>
          </table:table-cell>
          <table:table-cell office:value-type="percentage" office:value="0.18992001">
            <text:p>18,99%</text:p>
          </table:table-cell>
          <table:table-cell office:value-type="float" office:value="0.282">
            <text:p>0,28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M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78.8">
            <text:p>78,8</text:p>
          </table:table-cell>
          <table:table-cell office:value-type="float" office:value="28.759125">
            <text:p>28,759125</text:p>
          </table:table-cell>
          <table:table-cell office:value-type="float" office:value="1.99048">
            <text:p>1,99048</text:p>
          </table:table-cell>
          <table:table-cell office:value-type="percentage" office:value="0.09907">
            <text:p>9,91%</text:p>
          </table:table-cell>
          <table:table-cell office:value-type="percentage" office:value="0.040149998">
            <text:p>4,01%</text:p>
          </table:table-cell>
          <table:table-cell office:value-type="float" office:value="1.29">
            <text:p>1,2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GPC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04.72">
            <text:p>104,72</text:p>
          </table:table-cell>
          <table:table-cell office:value-type="float" office:value="238">
            <text:p>238</text:p>
          </table:table-cell>
          <table:table-cell office:value-type="float" office:value="1.49454">
            <text:p>1,49454</text:p>
          </table:table-cell>
          <table:table-cell office:value-type="percentage" office:value="0.082370006">
            <text:p>8,24%</text:p>
          </table:table-cell>
          <table:table-cell office:value-type="percentage" office:value="0.01342">
            <text:p>1,34%</text:p>
          </table:table-cell>
          <table:table-cell office:value-type="float" office:value="0.709">
            <text:p>0,7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RL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20.44">
            <text:p>20,44</text:p>
          </table:table-cell>
          <table:table-cell office:value-type="float" office:value="22.966293">
            <text:p>22,966293</text:p>
          </table:table-cell>
          <table:table-cell office:value-type="float" office:value="4.244">
            <text:p>4,244</text:p>
          </table:table-cell>
          <table:table-cell office:value-type="percentage" office:value="0.09977">
            <text:p>9,98%</text:p>
          </table:table-cell>
          <table:table-cell office:value-type="percentage" office:value="0.061160002">
            <text:p>6,12%</text:p>
          </table:table-cell>
          <table:table-cell office:value-type="float" office:value="0.313">
            <text:p>0,31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RM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EADING</text:p>
          </table:table-cell>
          <table:table-cell office:value-type="float" office:value="128.84">
            <text:p>128,84</text:p>
          </table:table-cell>
          <table:table-cell office:value-type="float" office:value="141.58241">
            <text:p>141,58241</text:p>
          </table:table-cell>
          <table:table-cell/>
          <table:table-cell office:value-type="percentage" office:value="0.33811">
            <text:p>33,81%</text:p>
          </table:table-cell>
          <table:table-cell/>
          <table:table-cell office:value-type="float" office:value="1.227">
            <text:p>1,22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BL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WEAKENING</text:p>
          </table:table-cell>
          <table:table-cell office:value-type="float" office:value="355.15">
            <text:p>355,15</text:p>
          </table:table-cell>
          <table:table-cell office:value-type="float" office:value="47.86388">
            <text:p>47,86388</text:p>
          </table:table-cell>
          <table:table-cell office:value-type="float" office:value="3.2891">
            <text:p>3,2891</text:p>
          </table:table-cell>
          <table:table-cell office:value-type="percentage" office:value="0.07276">
            <text:p>7,28%</text:p>
          </table:table-cell>
          <table:table-cell office:value-type="percentage" office:value="0.59696996">
            <text:p>59,70%</text:p>
          </table:table-cell>
          <table:table-cell office:value-type="float" office:value="1.286">
            <text:p>1,28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J</text:p>
          </table:table-cell>
          <table:table-cell office:value-type="string">
            <text:p>Industrials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18.43">
            <text:p>118,43</text:p>
          </table:table-cell>
          <table:table-cell office:value-type="float" office:value="34.9351">
            <text:p>34,9351</text:p>
          </table:table-cell>
          <table:table-cell office:value-type="float" office:value="1.38776">
            <text:p>1,38776</text:p>
          </table:table-cell>
          <table:table-cell office:value-type="percentage" office:value="0.077800006">
            <text:p>7,78%</text:p>
          </table:table-cell>
          <table:table-cell office:value-type="percentage" office:value="0.09380999">
            <text:p>9,38%</text:p>
          </table:table-cell>
          <table:table-cell office:value-type="float" office:value="0.708">
            <text:p>0,70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KR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65.64">
            <text:p>65,64</text:p>
          </table:table-cell>
          <table:table-cell office:value-type="float" office:value="42.62338">
            <text:p>42,62338</text:p>
          </table:table-cell>
          <table:table-cell office:value-type="float" office:value="4.1597">
            <text:p>4,1597</text:p>
          </table:table-cell>
          <table:table-cell office:value-type="percentage" office:value="0.0548">
            <text:p>5,48%</text:p>
          </table:table-cell>
          <table:table-cell office:value-type="percentage" office:value="0.14405">
            <text:p>14,41%</text:p>
          </table:table-cell>
          <table:table-cell office:value-type="float" office:value="0.457">
            <text:p>0,45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PC</text:p>
          </table:table-cell>
          <table:table-cell office:value-type="string">
            <text:p>Energy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IMPROVING</text:p>
          </table:table-cell>
          <table:table-cell office:value-type="float" office:value="244.87">
            <text:p>244,87</text:p>
          </table:table-cell>
          <table:table-cell office:value-type="float" office:value="16.131092">
            <text:p>16,131092</text:p>
          </table:table-cell>
          <table:table-cell office:value-type="float" office:value="1.46523">
            <text:p>1,46523</text:p>
          </table:table-cell>
          <table:table-cell office:value-type="percentage" office:value="0.07546">
            <text:p>7,55%</text:p>
          </table:table-cell>
          <table:table-cell office:value-type="percentage" office:value="0.27458">
            <text:p>27,46%</text:p>
          </table:table-cell>
          <table:table-cell office:value-type="float" office:value="0.53">
            <text:p>0,5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ET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78.08">
            <text:p>78,08</text:p>
          </table:table-cell>
          <table:table-cell office:value-type="float" office:value="15.102514">
            <text:p>15,102514</text:p>
          </table:table-cell>
          <table:table-cell office:value-type="float" office:value="1.42391">
            <text:p>1,42391</text:p>
          </table:table-cell>
          <table:table-cell office:value-type="percentage" office:value="0.07861">
            <text:p>7,86%</text:p>
          </table:table-cell>
          <table:table-cell office:value-type="percentage" office:value="0.13014">
            <text:p>13,01%</text:p>
          </table:table-cell>
          <table:table-cell office:value-type="float" office:value="0.775">
            <text:p>0,77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NRG</text:p>
          </table:table-cell>
          <table:table-cell office:value-type="string">
            <text:p>Utilities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38.11">
            <text:p>138,11</text:p>
          </table:table-cell>
          <table:table-cell office:value-type="float" office:value="151.76923">
            <text:p>151,76923</text:p>
          </table:table-cell>
          <table:table-cell office:value-type="float" office:value="4.79237">
            <text:p>4,79237</text:p>
          </table:table-cell>
          <table:table-cell office:value-type="percentage" office:value="0.06973">
            <text:p>6,97%</text:p>
          </table:table-cell>
          <table:table-cell office:value-type="percentage" office:value="0.062480003">
            <text:p>6,25%</text:p>
          </table:table-cell>
          <table:table-cell office:value-type="float" office:value="1.315">
            <text:p>1,31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RU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IMPROVING</text:p>
          </table:table-cell>
          <table:table-cell office:value-type="float" office:value="100.81">
            <text:p>100,81</text:p>
          </table:table-cell>
          <table:table-cell office:value-type="float" office:value="10.38208">
            <text:p>10,38208</text:p>
          </table:table-cell>
          <table:table-cell office:value-type="float" office:value="1.58972">
            <text:p>1,58972</text:p>
          </table:table-cell>
          <table:table-cell office:value-type="percentage" office:value="0.08063">
            <text:p>8,06%</text:p>
          </table:table-cell>
          <table:table-cell office:value-type="percentage" office:value="0.10711">
            <text:p>10,71%</text:p>
          </table:table-cell>
          <table:table-cell office:value-type="float" office:value="0.851">
            <text:p>0,85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MCI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EADING</text:p>
          </table:table-cell>
          <table:table-cell office:value-type="float" office:value="35.37">
            <text:p>35,37</text:p>
          </table:table-cell>
          <table:table-cell office:value-type="float" office:value="18.61579">
            <text:p>18,61579</text:p>
          </table:table-cell>
          <table:table-cell office:value-type="float" office:value="1.21251">
            <text:p>1,21251</text:p>
          </table:table-cell>
          <table:table-cell office:value-type="percentage" office:value="0.04684">
            <text:p>4,68%</text:p>
          </table:table-cell>
          <table:table-cell office:value-type="percentage" office:value="0.17877">
            <text:p>17,88%</text:p>
          </table:table-cell>
          <table:table-cell office:value-type="float" office:value="1.684">
            <text:p>1,68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YY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72.44">
            <text:p>72,44</text:p>
          </table:table-cell>
          <table:table-cell office:value-type="float" office:value="20.122223">
            <text:p>20,122223</text:p>
          </table:table-cell>
          <table:table-cell office:value-type="float" office:value="6.7044">
            <text:p>6,7044</text:p>
          </table:table-cell>
          <table:table-cell office:value-type="percentage" office:value="0.054629996">
            <text:p>5,46%</text:p>
          </table:table-cell>
          <table:table-cell office:value-type="percentage" office:value="0.81894994">
            <text:p>81,89%</text:p>
          </table:table-cell>
          <table:table-cell office:value-type="float" office:value="0.662">
            <text:p>0,6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GT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25.25">
            <text:p>125,25</text:p>
          </table:table-cell>
          <table:table-cell office:value-type="float" office:value="15.405904">
            <text:p>15,405904</text:p>
          </table:table-cell>
          <table:table-cell office:value-type="float" office:value="1.25518">
            <text:p>1,25518</text:p>
          </table:table-cell>
          <table:table-cell office:value-type="percentage" office:value="0.07704">
            <text:p>7,70%</text:p>
          </table:table-cell>
          <table:table-cell office:value-type="percentage" office:value="0.24034001">
            <text:p>24,03%</text:p>
          </table:table-cell>
          <table:table-cell office:value-type="float" office:value="1.011">
            <text:p>1,0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WYNN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3">
            <text:p>3</text:p>
          </table:table-cell>
          <table:table-cell table:style-name="ce2" office:value-type="string">
            <text:p>LAGGING</text:p>
          </table:table-cell>
          <table:table-cell office:value-type="float" office:value="102.42">
            <text:p>102,42</text:p>
          </table:table-cell>
          <table:table-cell office:value-type="float" office:value="29.346704">
            <text:p>29,346704</text:p>
          </table:table-cell>
          <table:table-cell/>
          <table:table-cell office:value-type="percentage" office:value="0.24129">
            <text:p>24,13%</text:p>
          </table:table-cell>
          <table:table-cell/>
          <table:table-cell office:value-type="float" office:value="1.007">
            <text:p>1,00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DELL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2.5">
            <text:p>2,5</text:p>
          </table:table-cell>
          <table:table-cell table:style-name="ce2" office:value-type="string">
            <text:p>LEADING</text:p>
          </table:table-cell>
          <table:table-cell office:value-type="float" office:value="260.46">
            <text:p>260,46</text:p>
          </table:table-cell>
          <table:table-cell office:value-type="float" office:value="30.041521">
            <text:p>30,041521</text:p>
          </table:table-cell>
          <table:table-cell/>
          <table:table-cell office:value-type="percentage" office:value="0.10090999">
            <text:p>10,09%</text:p>
          </table:table-cell>
          <table:table-cell/>
          <table:table-cell office:value-type="float" office:value="1.062">
            <text:p>1,06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LOW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2.5">
            <text:p>2,5</text:p>
          </table:table-cell>
          <table:table-cell table:style-name="ce2" office:value-type="string">
            <text:p>LAGGING</text:p>
          </table:table-cell>
          <table:table-cell office:value-type="float" office:value="229.2">
            <text:p>229,2</text:p>
          </table:table-cell>
          <table:table-cell office:value-type="float" office:value="19.341772">
            <text:p>19,341772</text:p>
          </table:table-cell>
          <table:table-cell/>
          <table:table-cell office:value-type="percentage" office:value="0.14371">
            <text:p>14,37%</text:p>
          </table:table-cell>
          <table:table-cell/>
          <table:table-cell office:value-type="float" office:value="0.904">
            <text:p>0,90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PSKY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2.5">
            <text:p>2,5</text:p>
          </table:table-cell>
          <table:table-cell table:style-name="ce2" office:value-type="string">
            <text:p>LAGGING</text:p>
          </table:table-cell>
          <table:table-cell office:value-type="float" office:value="11.09">
            <text:p>11,09</text:p>
          </table:table-cell>
          <table:table-cell office:value-type="float" office:value="369.6667">
            <text:p>369,6667</text:p>
          </table:table-cell>
          <table:table-cell office:value-type="float" office:value="1.30167">
            <text:p>1,30167</text:p>
          </table:table-cell>
          <table:table-cell office:value-type="percentage" office:value="0.10637999">
            <text:p>10,64%</text:p>
          </table:table-cell>
          <table:table-cell office:value-type="percentage" office:value="-0.0076800003">
            <text:p>-0,77%</text:p>
          </table:table-cell>
          <table:table-cell office:value-type="float" office:value="1.45">
            <text:p>1,4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SBUX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2.5">
            <text:p>2,5</text:p>
          </table:table-cell>
          <table:table-cell table:style-name="ce2" office:value-type="string">
            <text:p>IMPROVING</text:p>
          </table:table-cell>
          <table:table-cell office:value-type="float" office:value="104.93">
            <text:p>104,93</text:p>
          </table:table-cell>
          <table:table-cell office:value-type="float" office:value="80.09924">
            <text:p>80,09924</text:p>
          </table:table-cell>
          <table:table-cell/>
          <table:table-cell office:value-type="percentage" office:value="0.14024">
            <text:p>14,02%</text:p>
          </table:table-cell>
          <table:table-cell/>
          <table:table-cell office:value-type="float" office:value="1.009">
            <text:p>1,009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H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2">
            <text:p>2</text:p>
          </table:table-cell>
          <table:table-cell table:style-name="ce2" office:value-type="string">
            <text:p>LAGGING</text:p>
          </table:table-cell>
          <table:table-cell office:value-type="float" office:value="183.65">
            <text:p>183,65</text:p>
          </table:table-cell>
          <table:table-cell office:value-type="float" office:value="27.995426">
            <text:p>27,995426</text:p>
          </table:table-cell>
          <table:table-cell/>
          <table:table-cell office:value-type="percentage" office:value="0.01593">
            <text:p>1,59%</text:p>
          </table:table-cell>
          <table:table-cell/>
          <table:table-cell office:value-type="float" office:value="0.538">
            <text:p>0,53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PQ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2">
            <text:p>2</text:p>
          </table:table-cell>
          <table:table-cell table:style-name="ce2" office:value-type="string">
            <text:p>LEADING</text:p>
          </table:table-cell>
          <table:table-cell office:value-type="float" office:value="22.68">
            <text:p>22,68</text:p>
          </table:table-cell>
          <table:table-cell office:value-type="float" office:value="8.590909">
            <text:p>8,590909</text:p>
          </table:table-cell>
          <table:table-cell/>
          <table:table-cell office:value-type="percentage" office:value="0.07927">
            <text:p>7,93%</text:p>
          </table:table-cell>
          <table:table-cell/>
          <table:table-cell office:value-type="float" office:value="1.108">
            <text:p>1,108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INTC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2">
            <text:p>2</text:p>
          </table:table-cell>
          <table:table-cell table:style-name="ce2" office:value-type="string">
            <text:p>LEADING</text:p>
          </table:table-cell>
          <table:table-cell office:value-type="float" office:value="124.92">
            <text:p>124,92</text:p>
          </table:table-cell>
          <table:table-cell/>
          <table:table-cell office:value-type="float" office:value="0.36028">
            <text:p>0,36028</text:p>
          </table:table-cell>
          <table:table-cell office:value-type="percentage" office:value="0.26364002">
            <text:p>26,36%</text:p>
          </table:table-cell>
          <table:table-cell office:value-type="percentage" office:value="-0.02911">
            <text:p>-2,91%</text:p>
          </table:table-cell>
          <table:table-cell office:value-type="float" office:value="2.19">
            <text:p>2,19</text:p>
          </table:table-cell>
          <table:table-cell table:number-columns-repeated="1013"/>
        </table:table-row>
        <table:table-row table:style-name="ro2">
          <table:table-cell office:value-type="string">
            <text:p>IVZ</text:p>
          </table:table-cell>
          <table:table-cell office:value-type="string">
            <text:p>Financial Services</text:p>
          </table:table-cell>
          <table:table-cell table:style-name="ce1" office:value-type="string">
            <text:p>NO</text:p>
          </table:table-cell>
          <table:table-cell office:value-type="float" office:value="2">
            <text:p>2</text:p>
          </table:table-cell>
          <table:table-cell table:style-name="ce2" office:value-type="string">
            <text:p>LEADING</text:p>
          </table:table-cell>
          <table:table-cell office:value-type="float" office:value="27.59">
            <text:p>27,59</text:p>
          </table:table-cell>
          <table:table-cell/>
          <table:table-cell office:value-type="float" office:value="0.14829">
            <text:p>0,14829</text:p>
          </table:table-cell>
          <table:table-cell office:value-type="percentage" office:value="0.20138">
            <text:p>20,14%</text:p>
          </table:table-cell>
          <table:table-cell office:value-type="percentage" office:value="-0.01535">
            <text:p>-1,54%</text:p>
          </table:table-cell>
          <table:table-cell office:value-type="float" office:value="1.573">
            <text:p>1,573</text:p>
          </table:table-cell>
          <table:table-cell table:number-columns-repeated="1013"/>
        </table:table-row>
        <table:table-row table:style-name="ro2">
          <table:table-cell office:value-type="string">
            <text:p>MCK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2">
            <text:p>2</text:p>
          </table:table-cell>
          <table:table-cell table:style-name="ce2" office:value-type="string">
            <text:p>LAGGING</text:p>
          </table:table-cell>
          <table:table-cell office:value-type="float" office:value="736.09">
            <text:p>736,09</text:p>
          </table:table-cell>
          <table:table-cell office:value-type="float" office:value="19.194004">
            <text:p>19,194004</text:p>
          </table:table-cell>
          <table:table-cell/>
          <table:table-cell office:value-type="percentage" office:value="0.01708">
            <text:p>1,71%</text:p>
          </table:table-cell>
          <table:table-cell/>
          <table:table-cell office:value-type="float" office:value="0.355">
            <text:p>0,3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ALB</text:p>
          </table:table-cell>
          <table:table-cell office:value-type="string">
            <text:p>Basic Materials</text:p>
          </table:table-cell>
          <table:table-cell table:style-name="ce1" office:value-type="string">
            <text:p>NO</text:p>
          </table:table-cell>
          <table:table-cell office:value-type="float" office:value="1.5">
            <text:p>1,5</text:p>
          </table:table-cell>
          <table:table-cell table:style-name="ce2" office:value-type="string">
            <text:p>LEADING</text:p>
          </table:table-cell>
          <table:table-cell office:value-type="float" office:value="203.52">
            <text:p>203,52</text:p>
          </table:table-cell>
          <table:table-cell/>
          <table:table-cell office:value-type="float" office:value="0.19845">
            <text:p>0,19845</text:p>
          </table:table-cell>
          <table:table-cell office:value-type="percentage" office:value="0.19428">
            <text:p>19,43%</text:p>
          </table:table-cell>
          <table:table-cell office:value-type="percentage" office:value="-0.0182">
            <text:p>-1,82%</text:p>
          </table:table-cell>
          <table:table-cell office:value-type="float" office:value="1.365">
            <text:p>1,365</text:p>
          </table:table-cell>
          <table:table-cell table:number-columns-repeated="1013"/>
        </table:table-row>
        <table:table-row table:style-name="ro2">
          <table:table-cell office:value-type="string">
            <text:p>ARE</text:p>
          </table:table-cell>
          <table:table-cell office:value-type="string">
            <text:p>Real Estate</text:p>
          </table:table-cell>
          <table:table-cell table:style-name="ce1" office:value-type="string">
            <text:p>NO</text:p>
          </table:table-cell>
          <table:table-cell office:value-type="float" office:value="1.5">
            <text:p>1,5</text:p>
          </table:table-cell>
          <table:table-cell table:style-name="ce2" office:value-type="string">
            <text:p>LAGGING</text:p>
          </table:table-cell>
          <table:table-cell office:value-type="float" office:value="46.26">
            <text:p>46,26</text:p>
          </table:table-cell>
          <table:table-cell/>
          <table:table-cell office:value-type="float" office:value="0.66509">
            <text:p>0,66509</text:p>
          </table:table-cell>
          <table:table-cell office:value-type="percentage" office:value="0.63498">
            <text:p>63,50%</text:p>
          </table:table-cell>
          <table:table-cell office:value-type="percentage" office:value="-0.04144">
            <text:p>-4,14%</text:p>
          </table:table-cell>
          <table:table-cell office:value-type="float" office:value="1.137">
            <text:p>1,137</text:p>
          </table:table-cell>
          <table:table-cell table:number-columns-repeated="1013"/>
        </table:table-row>
        <table:table-row table:style-name="ro2">
          <table:table-cell office:value-type="string">
            <text:p>KHC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1.5">
            <text:p>1,5</text:p>
          </table:table-cell>
          <table:table-cell table:style-name="ce2" office:value-type="string">
            <text:p>IMPROVING</text:p>
          </table:table-cell>
          <table:table-cell office:value-type="float" office:value="23.96">
            <text:p>23,96</text:p>
          </table:table-cell>
          <table:table-cell/>
          <table:table-cell office:value-type="float" office:value="0.50258">
            <text:p>0,50258</text:p>
          </table:table-cell>
          <table:table-cell office:value-type="percentage" office:value="0.23056999">
            <text:p>23,06%</text:p>
          </table:table-cell>
          <table:table-cell office:value-type="percentage" office:value="-0.12576">
            <text:p>-12,58%</text:p>
          </table:table-cell>
          <table:table-cell office:value-type="float" office:value="0.046">
            <text:p>0,046</text:p>
          </table:table-cell>
          <table:table-cell table:number-columns-repeated="1013"/>
        </table:table-row>
        <table:table-row table:style-name="ro2">
          <table:table-cell office:value-type="string">
            <text:p>TAP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1.5">
            <text:p>1,5</text:p>
          </table:table-cell>
          <table:table-cell table:style-name="ce2" office:value-type="string">
            <text:p>IMPROVING</text:p>
          </table:table-cell>
          <table:table-cell office:value-type="float" office:value="42.41">
            <text:p>42,41</text:p>
          </table:table-cell>
          <table:table-cell/>
          <table:table-cell office:value-type="float" office:value="0.62567">
            <text:p>0,62567</text:p>
          </table:table-cell>
          <table:table-cell office:value-type="percentage" office:value="0.21851">
            <text:p>21,85%</text:p>
          </table:table-cell>
          <table:table-cell office:value-type="percentage" office:value="-0.18080999">
            <text:p>-18,08%</text:p>
          </table:table-cell>
          <table:table-cell office:value-type="float" office:value="0.438">
            <text:p>0,438</text:p>
          </table:table-cell>
          <table:table-cell table:number-columns-repeated="1013"/>
        </table:table-row>
        <table:table-row table:style-name="ro2">
          <table:table-cell office:value-type="string">
            <text:p>OMC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1.5">
            <text:p>1,5</text:p>
          </table:table-cell>
          <table:table-cell table:style-name="ce2" office:value-type="string">
            <text:p>LAGGING</text:p>
          </table:table-cell>
          <table:table-cell office:value-type="float" office:value="77.06">
            <text:p>77,06</text:p>
          </table:table-cell>
          <table:table-cell/>
          <table:table-cell office:value-type="float" office:value="1.10574">
            <text:p>1,10574</text:p>
          </table:table-cell>
          <table:table-cell office:value-type="percentage" office:value="0.15921">
            <text:p>15,92%</text:p>
          </table:table-cell>
          <table:table-cell office:value-type="percentage" office:value="0.02015">
            <text:p>2,02%</text:p>
          </table:table-cell>
          <table:table-cell office:value-type="float" office:value="0.682">
            <text:p>0,682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VTRS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1.5">
            <text:p>1,5</text:p>
          </table:table-cell>
          <table:table-cell table:style-name="ce2" office:value-type="string">
            <text:p>LEADING</text:p>
          </table:table-cell>
          <table:table-cell office:value-type="float" office:value="17.17">
            <text:p>17,17</text:p>
          </table:table-cell>
          <table:table-cell/>
          <table:table-cell office:value-type="float" office:value="0.99675">
            <text:p>0,99675</text:p>
          </table:table-cell>
          <table:table-cell office:value-type="percentage" office:value="0.28327">
            <text:p>28,33%</text:p>
          </table:table-cell>
          <table:table-cell office:value-type="percentage" office:value="-0.01957">
            <text:p>-1,96%</text:p>
          </table:table-cell>
          <table:table-cell office:value-type="float" office:value="0.872">
            <text:p>0,872</text:p>
          </table:table-cell>
          <table:table-cell table:number-columns-repeated="1013"/>
        </table:table-row>
        <table:table-row table:style-name="ro2">
          <table:table-cell office:value-type="string">
            <text:p>WBD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1.5">
            <text:p>1,5</text:p>
          </table:table-cell>
          <table:table-cell table:style-name="ce2" office:value-type="string">
            <text:p>LAGGING</text:p>
          </table:table-cell>
          <table:table-cell office:value-type="float" office:value="27.11">
            <text:p>27,11</text:p>
          </table:table-cell>
          <table:table-cell/>
          <table:table-cell office:value-type="float" office:value="0.96318">
            <text:p>0,96318</text:p>
          </table:table-cell>
          <table:table-cell office:value-type="percentage" office:value="0.20382">
            <text:p>20,38%</text:p>
          </table:table-cell>
          <table:table-cell office:value-type="percentage" office:value="-0.049590003">
            <text:p>-4,96%</text:p>
          </table:table-cell>
          <table:table-cell office:value-type="float" office:value="1.574">
            <text:p>1,574</text:p>
          </table:table-cell>
          <table:table-cell table:number-columns-repeated="1013"/>
        </table:table-row>
        <table:table-row table:style-name="ro2">
          <table:table-cell office:value-type="string">
            <text:p>CRL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IMPROVING</text:p>
          </table:table-cell>
          <table:table-cell office:value-type="float" office:value="177.62">
            <text:p>177,62</text:p>
          </table:table-cell>
          <table:table-cell/>
          <table:table-cell office:value-type="float" office:value="1.02551">
            <text:p>1,02551</text:p>
          </table:table-cell>
          <table:table-cell office:value-type="percentage" office:value="0.22091">
            <text:p>22,09%</text:p>
          </table:table-cell>
          <table:table-cell office:value-type="percentage" office:value="-0.0587">
            <text:p>-5,87%</text:p>
          </table:table-cell>
          <table:table-cell office:value-type="float" office:value="1.446">
            <text:p>1,44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AG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IMPROVING</text:p>
          </table:table-cell>
          <table:table-cell office:value-type="float" office:value="14.13">
            <text:p>14,13</text:p>
          </table:table-cell>
          <table:table-cell/>
          <table:table-cell office:value-type="float" office:value="0.89813">
            <text:p>0,89813</text:p>
          </table:table-cell>
          <table:table-cell office:value-type="percentage" office:value="0.15467">
            <text:p>15,47%</text:p>
          </table:table-cell>
          <table:table-cell office:value-type="percentage" office:value="-0.00511">
            <text:p>-0,51%</text:p>
          </table:table-cell>
          <table:table-cell office:value-type="float" office:value="-0.027">
            <text:p>-0,027</text:p>
          </table:table-cell>
          <table:table-cell table:number-columns-repeated="1013"/>
        </table:table-row>
        <table:table-row table:style-name="ro2">
          <table:table-cell office:value-type="string">
            <text:p>CRWD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LEADING</text:p>
          </table:table-cell>
          <table:table-cell office:value-type="float" office:value="527.77">
            <text:p>527,77</text:p>
          </table:table-cell>
          <table:table-cell/>
          <table:table-cell office:value-type="float" office:value="0.18336">
            <text:p>0,18336</text:p>
          </table:table-cell>
          <table:table-cell office:value-type="percentage" office:value="-0.0097">
            <text:p>-0,97%</text:p>
          </table:table-cell>
          <table:table-cell office:value-type="percentage" office:value="-0.04137">
            <text:p>-4,14%</text:p>
          </table:table-cell>
          <table:table-cell office:value-type="float" office:value="1.06">
            <text:p>1,06</text:p>
          </table:table-cell>
          <table:table-cell table:number-columns-repeated="1013"/>
        </table:table-row>
        <table:table-row table:style-name="ro2">
          <table:table-cell office:value-type="string">
            <text:p>FISV</text:p>
          </table:table-cell>
          <table:table-cell office:value-type="string">
            <text:p>N/A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LAGGING</text:p>
          </table:table-cell>
          <table:table-cell office:value-type="float" office:value="55.48">
            <text:p>55,48</text:p>
          </table:table-cell>
          <table:table-cell office:value-type="float" office:value="9.40339">
            <text:p>9,40339</text:p>
          </table:table-cell>
          <table:table-cell table:number-columns-repeated="4"/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AS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IMPROVING</text:p>
          </table:table-cell>
          <table:table-cell office:value-type="float" office:value="97.78">
            <text:p>97,78</text:p>
          </table:table-cell>
          <table:table-cell/>
          <table:table-cell office:value-type="float" office:value="6.00584">
            <text:p>6,00584</text:p>
          </table:table-cell>
          <table:table-cell office:value-type="percentage" office:value="0.25527">
            <text:p>25,53%</text:p>
          </table:table-cell>
          <table:table-cell office:value-type="percentage" office:value="-0.36355">
            <text:p>-36,36%</text:p>
          </table:table-cell>
          <table:table-cell office:value-type="float" office:value="0.517">
            <text:p>0,517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HPE</text:p>
          </table:table-cell>
          <table:table-cell office:value-type="string">
            <text:p>Technology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LEADING</text:p>
          </table:table-cell>
          <table:table-cell office:value-type="float" office:value="31.35">
            <text:p>31,35</text:p>
          </table:table-cell>
          <table:table-cell/>
          <table:table-cell office:value-type="float" office:value="0.87223">
            <text:p>0,87223</text:p>
          </table:table-cell>
          <table:table-cell office:value-type="percentage" office:value="0.13681">
            <text:p>13,68%</text:p>
          </table:table-cell>
          <table:table-cell office:value-type="percentage" office:value="-0.00471">
            <text:p>-0,47%</text:p>
          </table:table-cell>
          <table:table-cell office:value-type="float" office:value="1.295">
            <text:p>1,295</text:p>
          </table:table-cell>
          <table:table-cell table:number-columns-repeated="1013"/>
        </table:table-row>
        <table:table-row table:style-name="ro2">
          <table:table-cell office:value-type="string">
            <text:p>IP</text:p>
          </table:table-cell>
          <table:table-cell office:value-type="string">
            <text:p>Consumer Cyclical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IMPROVING</text:p>
          </table:table-cell>
          <table:table-cell office:value-type="float" office:value="33.03">
            <text:p>33,03</text:p>
          </table:table-cell>
          <table:table-cell/>
          <table:table-cell office:value-type="float" office:value="0.65904">
            <text:p>0,65904</text:p>
          </table:table-cell>
          <table:table-cell office:value-type="percentage" office:value="0.16462">
            <text:p>16,46%</text:p>
          </table:table-cell>
          <table:table-cell office:value-type="percentage" office:value="-0.16036">
            <text:p>-16,04%</text:p>
          </table:table-cell>
          <table:table-cell office:value-type="float" office:value="0.896">
            <text:p>0,896</text:p>
          </table:table-cell>
          <table:table-cell table:number-columns-repeated="1013"/>
        </table:table-row>
        <table:table-row table:style-name="ro2">
          <table:table-cell office:value-type="string">
            <text:p>LYV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IMPROVING</text:p>
          </table:table-cell>
          <table:table-cell office:value-type="float" office:value="163.28">
            <text:p>163,28</text:p>
          </table:table-cell>
          <table:table-cell/>
          <table:table-cell office:value-type="float" office:value="7.38269">
            <text:p>7,38269</text:p>
          </table:table-cell>
          <table:table-cell office:value-type="percentage" office:value="0.058319997">
            <text:p>5,83%</text:p>
          </table:table-cell>
          <table:table-cell office:value-type="percentage" office:value="0.14927">
            <text:p>14,93%</text:p>
          </table:table-cell>
          <table:table-cell office:value-type="float" office:value="1.113">
            <text:p>1,11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MRNA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IMPROVING</text:p>
          </table:table-cell>
          <table:table-cell office:value-type="float" office:value="54.35">
            <text:p>54,35</text:p>
          </table:table-cell>
          <table:table-cell/>
          <table:table-cell office:value-type="float" office:value="0.17522">
            <text:p>0,17522</text:p>
          </table:table-cell>
          <table:table-cell office:value-type="percentage" office:value="-1.03326">
            <text:p>-103,33%</text:p>
          </table:table-cell>
          <table:table-cell office:value-type="percentage" office:value="-0.36556998">
            <text:p>-36,56%</text:p>
          </table:table-cell>
          <table:table-cell office:value-type="float" office:value="1.056">
            <text:p>1,056</text:p>
          </table:table-cell>
          <table:table-cell table:number-columns-repeated="1013"/>
        </table:table-row>
        <table:table-row table:style-name="ro2">
          <table:table-cell office:value-type="string">
            <text:p>SJM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1">
            <text:p>1</text:p>
          </table:table-cell>
          <table:table-cell table:style-name="ce2" office:value-type="string">
            <text:p>IMPROVING</text:p>
          </table:table-cell>
          <table:table-cell office:value-type="float" office:value="99.25">
            <text:p>99,25</text:p>
          </table:table-cell>
          <table:table-cell/>
          <table:table-cell office:value-type="float" office:value="1.43204">
            <text:p>1,43204</text:p>
          </table:table-cell>
          <table:table-cell office:value-type="percentage" office:value="0.21052">
            <text:p>21,05%</text:p>
          </table:table-cell>
          <table:table-cell office:value-type="percentage" office:value="-0.20683001">
            <text:p>-20,68%</text:p>
          </table:table-cell>
          <table:table-cell office:value-type="float" office:value="0.245">
            <text:p>0,24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BAX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0.5">
            <text:p>0,5</text:p>
          </table:table-cell>
          <table:table-cell table:style-name="ce2" office:value-type="string">
            <text:p>IMPROVING</text:p>
          </table:table-cell>
          <table:table-cell office:value-type="float" office:value="17.99">
            <text:p>17,99</text:p>
          </table:table-cell>
          <table:table-cell/>
          <table:table-cell office:value-type="float" office:value="1.61021">
            <text:p>1,61021</text:p>
          </table:table-cell>
          <table:table-cell office:value-type="percentage" office:value="0.16864">
            <text:p>16,86%</text:p>
          </table:table-cell>
          <table:table-cell office:value-type="percentage" office:value="-0.15010999">
            <text:p>-15,01%</text:p>
          </table:table-cell>
          <table:table-cell office:value-type="float" office:value="0.621">
            <text:p>0,62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CNC</text:p>
          </table:table-cell>
          <table:table-cell office:value-type="string">
            <text:p>Healthcare</text:p>
          </table:table-cell>
          <table:table-cell table:style-name="ce1" office:value-type="string">
            <text:p>NO</text:p>
          </table:table-cell>
          <table:table-cell office:value-type="float" office:value="0.5">
            <text:p>0,5</text:p>
          </table:table-cell>
          <table:table-cell table:style-name="ce2" office:value-type="string">
            <text:p>LEADING</text:p>
          </table:table-cell>
          <table:table-cell office:value-type="float" office:value="55.96">
            <text:p>55,96</text:p>
          </table:table-cell>
          <table:table-cell/>
          <table:table-cell office:value-type="float" office:value="0.76049">
            <text:p>0,76049</text:p>
          </table:table-cell>
          <table:table-cell office:value-type="percentage" office:value="0.01629">
            <text:p>1,63%</text:p>
          </table:table-cell>
          <table:table-cell office:value-type="percentage" office:value="-0.26044">
            <text:p>-26,04%</text:p>
          </table:table-cell>
          <table:table-cell office:value-type="float" office:value="1.062">
            <text:p>1,062</text:p>
          </table:table-cell>
          <table:table-cell table:number-columns-repeated="1013"/>
        </table:table-row>
        <table:table-row table:style-name="ro2">
          <table:table-cell office:value-type="string">
            <text:p>EL</text:p>
          </table:table-cell>
          <table:table-cell office:value-type="string">
            <text:p>Consumer Defensive</text:p>
          </table:table-cell>
          <table:table-cell table:style-name="ce1" office:value-type="string">
            <text:p>NO</text:p>
          </table:table-cell>
          <table:table-cell office:value-type="float" office:value="0.5">
            <text:p>0,5</text:p>
          </table:table-cell>
          <table:table-cell table:style-name="ce2" office:value-type="string">
            <text:p>IMPROVING</text:p>
          </table:table-cell>
          <table:table-cell office:value-type="float" office:value="86.2">
            <text:p>86,2</text:p>
          </table:table-cell>
          <table:table-cell/>
          <table:table-cell office:value-type="float" office:value="2.32908">
            <text:p>2,32908</text:p>
          </table:table-cell>
          <table:table-cell office:value-type="percentage" office:value="0.15843001">
            <text:p>15,84%</text:p>
          </table:table-cell>
          <table:table-cell office:value-type="percentage" office:value="-0.05949">
            <text:p>-5,95%</text:p>
          </table:table-cell>
          <table:table-cell office:value-type="float" office:value="1.211">
            <text:p>1,211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2">
          <table:table-cell office:value-type="string">
            <text:p>TTWO</text:p>
          </table:table-cell>
          <table:table-cell office:value-type="string">
            <text:p>Communication Services</text:p>
          </table:table-cell>
          <table:table-cell table:style-name="ce1" office:value-type="string">
            <text:p>NO</text:p>
          </table:table-cell>
          <table:table-cell office:value-type="float" office:value="0.5">
            <text:p>0,5</text:p>
          </table:table-cell>
          <table:table-cell table:style-name="ce2" office:value-type="string">
            <text:p>IMPROVING</text:p>
          </table:table-cell>
          <table:table-cell office:value-type="float" office:value="220.45">
            <text:p>220,45</text:p>
          </table:table-cell>
          <table:table-cell/>
          <table:table-cell office:value-type="float" office:value="1.00449">
            <text:p>1,00449</text:p>
          </table:table-cell>
          <table:table-cell office:value-type="percentage" office:value="0.12547">
            <text:p>12,55%</text:p>
          </table:table-cell>
          <table:table-cell office:value-type="percentage" office:value="-0.86217004">
            <text:p>-86,22%</text:p>
          </table:table-cell>
          <table:table-cell office:value-type="float" office:value="0.973">
            <text:p>0,973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DOW</text:p>
          </table:table-cell>
          <table:table-cell office:value-type="string">
            <text:p>Basic Materials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LAGGING</text:p>
          </table:table-cell>
          <table:table-cell office:value-type="float" office:value="36.87">
            <text:p>36,87</text:p>
          </table:table-cell>
          <table:table-cell/>
          <table:table-cell office:value-type="float" office:value="1.17133">
            <text:p>1,17133</text:p>
          </table:table-cell>
          <table:table-cell office:value-type="percentage" office:value="0.06717">
            <text:p>6,72%</text:p>
          </table:table-cell>
          <table:table-cell office:value-type="percentage" office:value="-0.15262">
            <text:p>-15,26%</text:p>
          </table:table-cell>
          <table:table-cell office:value-type="float" office:value="0.454">
            <text:p>0,45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SATS</text:p>
          </table:table-cell>
          <table:table-cell office:value-type="string">
            <text:p>Communication Services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IMPROVING</text:p>
          </table:table-cell>
          <table:table-cell office:value-type="float" office:value="127.15">
            <text:p>127,15</text:p>
          </table:table-cell>
          <table:table-cell/>
          <table:table-cell office:value-type="float" office:value="5.32734">
            <text:p>5,32734</text:p>
          </table:table-cell>
          <table:table-cell office:value-type="percentage" office:value="0.099589996">
            <text:p>9,96%</text:p>
          </table:table-cell>
          <table:table-cell office:value-type="percentage" office:value="-1.11347">
            <text:p>-111,35%</text:p>
          </table:table-cell>
          <table:table-cell office:value-type="float" office:value="0.96">
            <text:p>0,96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F</text:p>
          </table:table-cell>
          <table:table-cell office:value-type="string">
            <text:p>Consumer Cyclical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IMPROVING</text:p>
          </table:table-cell>
          <table:table-cell office:value-type="float" office:value="12.32">
            <text:p>12,32</text:p>
          </table:table-cell>
          <table:table-cell/>
          <table:table-cell office:value-type="float" office:value="4.25544">
            <text:p>4,25544</text:p>
          </table:table-cell>
          <table:table-cell office:value-type="percentage" office:value="0.03991">
            <text:p>3,99%</text:p>
          </table:table-cell>
          <table:table-cell office:value-type="percentage" office:value="-0.14813">
            <text:p>-14,81%</text:p>
          </table:table-cell>
          <table:table-cell office:value-type="float" office:value="1.664">
            <text:p>1,664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>
          <table:table-cell office:value-type="string">
            <text:p>LYB</text:p>
          </table:table-cell>
          <table:table-cell office:value-type="string">
            <text:p>Basic Materials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LAGGING</text:p>
          </table:table-cell>
          <table:table-cell office:value-type="float" office:value="71.76">
            <text:p>71,76</text:p>
          </table:table-cell>
          <table:table-cell/>
          <table:table-cell office:value-type="float" office:value="1.4124">
            <text:p>1,4124</text:p>
          </table:table-cell>
          <table:table-cell office:value-type="percentage" office:value="0.07485">
            <text:p>7,49%</text:p>
          </table:table-cell>
          <table:table-cell office:value-type="percentage" office:value="-0.060089998">
            <text:p>-6,01%</text:p>
          </table:table-cell>
          <table:table-cell office:value-type="float" office:value="0.355">
            <text:p>0,355</text:p>
          </table:table-cell>
          <table:table-cell office:value-type="string">
            <text:p>Debito Alto; </text:p>
          </table:table-cell>
          <table:table-cell table:number-columns-repeated="1012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0">10/05/2026</text:date>, <text:time>12.10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ati" style:display-name="PageStyle_D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10T12:10:27.74</dc:date>
    <dc:creator>Matteo </dc:creator>
    <meta:document-statistic meta:table-count="1" meta:cell-count="5672" meta:object-count="0"/>
    <meta:generator>OpenOffice/4.1.16$Win32 OpenOffice.org_project/4116m3$Build-9816</meta:generator>
  </office:meta>
</office:document-meta>
</file>